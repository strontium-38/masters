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943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1.6654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1.0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1.5902in"/>
    </style:style>
    <style:style style:name="co23" style:family="table-column">
      <style:table-column-properties fo:break-before="auto" style:column-width="1.5154in"/>
    </style:style>
    <style:style style:name="co24" style:family="table-column">
      <style:table-column-properties fo:break-before="auto" style:column-width="1.2437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0.7827in"/>
    </style:style>
    <style:style style:name="co28" style:family="table-column">
      <style:table-column-properties fo:break-before="auto" style:column-width="1.4402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1.8047in"/>
    </style:style>
    <style:style style:name="co31" style:family="table-column">
      <style:table-column-properties fo:break-before="auto" style:column-width="0.8791in"/>
    </style:style>
    <style:style style:name="co32" style:family="table-column">
      <style:table-column-properties fo:break-before="auto" style:column-width="1.2791in"/>
    </style:style>
    <style:style style:name="co33" style:family="table-column">
      <style:table-column-properties fo:break-before="auto" style:column-width="1.5799in"/>
    </style:style>
    <style:style style:name="co34" style:family="table-column">
      <style:table-column-properties fo:break-before="auto" style:column-width="1.011in"/>
    </style:style>
    <style:style style:name="co35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8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8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9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94" style:family="table-cell" style:parent-style-name="Default">
      <style:table-cell-properties fo:border-bottom="none" fo:border-left="0.74pt solid #000000" fo:border-right="0.74pt solid #000000" fo:border-top="none"/>
    </style:style>
    <style:style style:name="ce19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98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0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4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06" style:family="table-cell" style:parent-style-name="Default" style:data-style-name="N137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1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 style:data-style-name="N137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12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3" style:family="table-cell" style:parent-style-name="Default" style:data-style-name="N137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14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215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16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17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22" style:family="table-cell" style:parent-style-name="Default" style:data-style-name="N136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3" style:family="table-cell" style:parent-style-name="Default" style:data-style-name="N136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4" style:family="table-cell" style:parent-style-name="Default" style:data-style-name="N136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8" style:family="table-cell" style:parent-style-name="Default" style:data-style-name="N136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9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43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4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45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6" style:family="table-cell" style:parent-style-name="Default" style:data-style-name="N137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7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3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4" style:family="table-cell" style:parent-style-name="Default" style:data-style-name="N137">
      <style:table-cell-properties fo:border-bottom="0.74pt solid #000000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5" style:family="table-cell" style:parent-style-name="Default" style:data-style-name="N1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6" style:family="table-cell" style:parent-style-name="Default" style:data-style-name="N1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7" style:family="table-cell" style:parent-style-name="Default" style:data-style-name="N1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8" style:family="table-cell" style:parent-style-name="Default" style:data-style-name="N1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9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137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6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65" style:family="table-cell" style:parent-style-name="Default" style:data-style-name="N137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2" style:family="table-cell" style:parent-style-name="Default" style:data-style-name="N63"/>
    <style:style style:name="ce63" style:family="table-cell" style:parent-style-name="Default" style:data-style-name="N137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4" style:family="table-cell" style:parent-style-name="Default" style:data-style-name="N137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none" fo:border-left="0.74pt solid #000000" fo:border-right="0.74pt solid #000000" fo:border-top="none"/>
    </style:style>
    <style:style style:name="ce10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3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7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8" style:family="table-cell" style:parent-style-name="Default" style:data-style-name="N137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9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0" style:family="table-cell" style:parent-style-name="Default" style:data-style-name="N137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1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2" style:family="table-cell" style:parent-style-name="Default" style:data-style-name="N137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5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6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7" style:family="table-cell" style:parent-style-name="Default" style:data-style-name="N136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136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 style:data-style-name="N136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136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 style:data-style-name="N137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 style:data-style-name="N137">
      <style:table-cell-properties fo:border-bottom="0.74pt solid #000000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63"/>
    <style:style style:name="ce132" style:family="table-cell" style:parent-style-name="Default" style:data-style-name="N1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1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1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 style:data-style-name="N1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37" style:family="table-cell" style:parent-style-name="Default" style:data-style-name="N137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38" style:family="table-cell" style:parent-style-name="Default" style:data-style-name="N137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1" style:family="table-cell" style:parent-style-name="Default" style:data-style-name="N137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8" style:family="table-cell" style:parent-style-name="Default" style:data-style-name="N137">
      <style:table-cell-properties fo:border-bottom="none" fo:background-color="#afd09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49" style:family="table-cell" style:parent-style-name="Default" style:data-style-name="N137">
      <style:table-cell-properties fo:border-bottom="none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95" style:family="table-cell" style:parent-style-name="Default" style:data-style-name="N137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8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27" style:family="table-cell" style:parent-style-name="Default" style:data-style-name="N135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0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1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2" style:family="table-cell" style:parent-style-name="Default" style:data-style-name="N135">
      <style:table-cell-properties fo:border-bottom="0.74pt solid #000000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3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4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5" style:family="table-cell" style:parent-style-name="Default" style:data-style-name="N135">
      <style:table-cell-properties fo:border-bottom="0.74pt solid #000000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7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0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41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42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132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14" style:family="table-cell" style:parent-style-name="Default" style:data-style-name="N132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5" style:family="table-cell" style:parent-style-name="Default" style:data-style-name="N132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6" style:family="table-cell" style:parent-style-name="Default" style:data-style-name="N132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7" style:family="table-cell" style:parent-style-name="Default" style:data-style-name="N132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8" style:family="table-cell" style:parent-style-name="Default" style:data-style-name="N132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49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0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0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196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 style:data-style-name="N135">
      <style:table-cell-properties fo:border-bottom="0.74pt solid #000000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74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none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77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78" style:family="table-cell" style:parent-style-name="Default" style:data-style-name="N137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2" style:family="table-cell" style:parent-style-name="Default" style:data-style-name="N13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9" style:family="table-cell" style:parent-style-name="Default" style:data-style-name="N135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64" style:family="table-cell" style:parent-style-name="Default" style:data-style-name="N0">
      <style:table-cell-properties fo:background-color="#81aca6" style:text-align-source="fix" style:repeat-content="false" fo:border="none" style:vertical-align="middle"/>
      <style:paragraph-properties fo:text-align="center" fo:margin-left="0in"/>
    </style:style>
    <style:style style:name="ce358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6" style:family="table-cell" style:parent-style-name="Default" style:data-style-name="N0">
      <style:table-cell-properties fo:border-bottom="none" fo:background-color="#8e86a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60" style:family="table-cell" style:parent-style-name="Default" style:data-style-name="N135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361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1" style:family="table-cell" style:parent-style-name="Default" style:data-style-name="N135">
      <style:table-cell-properties fo:border-bottom="none" fo:background-color="#b7b3ca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 style:data-style-name="N132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3" style:family="table-cell" style:parent-style-name="Default" style:data-style-name="N132">
      <style:table-cell-properties fo:background-color="#b3cac7" style:text-align-source="fix" style:repeat-content="false" style:vertical-align="middle"/>
      <style:paragraph-properties fo:text-align="center" fo:margin-left="0in"/>
    </style:style>
    <style:style style:name="ce322" style:family="table-cell" style:parent-style-name="Default" style:data-style-name="N132">
      <style:table-cell-properties fo:background-color="#b3cac7" style:text-align-source="fix" style:repeat-content="false" fo:border="none" style:vertical-align="middle"/>
      <style:paragraph-properties fo:text-align="center" fo:margin-left="0in"/>
    </style:style>
    <style:style style:name="ce324" style:family="table-cell" style:parent-style-name="Default" style:data-style-name="N132">
      <style:table-cell-properties fo:background-color="#afd095" style:text-align-source="fix" style:repeat-content="false" fo:border="none" style:vertical-align="middle"/>
      <style:paragraph-properties fo:text-align="center" fo:margin-left="0in"/>
    </style:style>
    <style:style style:name="ce325" style:family="table-cell" style:parent-style-name="Default" style:data-style-name="N132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26" style:family="table-cell" style:parent-style-name="Default" style:data-style-name="N132">
      <style:table-cell-properties fo:background-color="#b7b3ca" style:text-align-source="fix" style:repeat-content="false" fo:border="none" style:vertical-align="middle"/>
      <style:paragraph-properties fo:text-align="center" fo:margin-left="0in"/>
    </style:style>
    <style:style style:name="ce327" style:family="table-cell" style:parent-style-name="Default" style:data-style-name="N132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328" style:family="table-cell" style:parent-style-name="Default" style:data-style-name="N132">
      <style:table-cell-properties fo:background-color="#b4c7dc" style:text-align-source="fix" style:repeat-content="false" fo:border="none" style:vertical-align="middle"/>
      <style:paragraph-properties fo:text-align="center" fo:margin-left="0in"/>
    </style:style>
    <style:style style:name="ce329" style:family="table-cell" style:parent-style-name="Default" style:data-style-name="N132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330" style:family="table-cell" style:parent-style-name="Default" style:data-style-name="N132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01" style:family="table-cell" style:parent-style-name="Default" style:data-style-name="N135">
      <style:table-cell-properties fo:background-color="#b3cac7" style:text-align-source="fix" style:repeat-content="false" style:vertical-align="middle"/>
      <style:paragraph-properties fo:text-align="center" fo:margin-left="0in"/>
    </style:style>
    <style:style style:name="ce408" style:family="table-cell" style:parent-style-name="Default" style:data-style-name="N135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275" style:family="table-cell" style:parent-style-name="Default" style:data-style-name="N135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414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6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202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8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" style:family="table-cell" style:parent-style-name="Default" style:data-style-name="N135">
      <style:table-cell-properties fo:border-bottom="0.74pt solid #000000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82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3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4" style:family="table-cell" style:parent-style-name="Default" style:data-style-name="N135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85" style:family="table-cell" style:parent-style-name="Default" style:data-style-name="N135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 style:data-style-name="N132">
      <style:table-cell-properties fo:border-bottom="none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33" style:family="table-cell" style:parent-style-name="Default" style:data-style-name="N132">
      <style:table-cell-properties fo:border-bottom="none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4" style:family="table-cell" style:parent-style-name="Default" style:data-style-name="N132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5" style:family="table-cell" style:parent-style-name="Default" style:data-style-name="N132">
      <style:table-cell-properties fo:border-bottom="none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6" style:family="table-cell" style:parent-style-name="Default" style:data-style-name="N132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7" style:family="table-cell" style:parent-style-name="Default" style:data-style-name="N132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93" style:family="table-cell" style:parent-style-name="Default" style:data-style-name="N135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88" style:family="table-cell" style:parent-style-name="Default" style:data-style-name="N133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89" style:family="table-cell" style:parent-style-name="Default" style:data-style-name="N133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90" style:family="table-cell" style:parent-style-name="Default" style:data-style-name="N133">
      <style:table-cell-properties fo:border-bottom="none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92" style:family="table-cell" style:parent-style-name="Default" style:data-style-name="N133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07" style:family="table-cell" style:parent-style-name="Default" style:data-style-name="N0">
      <style:table-cell-properties fo:border-bottom="none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08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9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35">
      <style:table-cell-properties fo:background-color="#b3cac7" style:text-align-source="fix" style:repeat-content="false" fo:border="none" style:vertical-align="middle"/>
      <style:paragraph-properties fo:text-align="center" fo:margin-left="0in"/>
    </style:style>
    <style:style style:name="ce301" style:family="table-cell" style:parent-style-name="Default" style:data-style-name="N135">
      <style:table-cell-properties fo:background-color="#b7b3ca" style:text-align-source="fix" style:repeat-content="false" fo:border="none" style:vertical-align="middle"/>
      <style:paragraph-properties fo:text-align="center" fo:margin-left="0in"/>
    </style:style>
    <style:style style:name="ce219" style:family="table-cell" style:parent-style-name="Default" style:data-style-name="N13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0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1" style:family="table-cell" style:parent-style-name="Default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06" style:family="table-cell" style:parent-style-name="Default" style:data-style-name="N135">
      <style:table-cell-properties fo:border-bottom="none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7" style:family="table-cell" style:parent-style-name="Default" style:data-style-name="N135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8" style:family="table-cell" style:parent-style-name="Default" style:data-style-name="N135">
      <style:table-cell-properties fo:border-bottom="none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9" style:family="table-cell" style:parent-style-name="Default" style:data-style-name="N135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0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12" style:family="table-cell" style:parent-style-name="Default" style:data-style-name="N135">
      <style:table-cell-properties fo:border-bottom="none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13" style:family="table-cell" style:parent-style-name="Default" style:data-style-name="N135">
      <style:table-cell-properties fo:border-bottom="none" fo:background-color="#b7b3ca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91" style:family="table-cell" style:parent-style-name="Default" style:data-style-name="N133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25" style:family="table-cell" style:parent-style-name="Default" style:data-style-name="N133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20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21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1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32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7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7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135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0" style:family="table-cell" style:parent-style-name="Default" style:data-style-name="N135">
      <style:table-cell-properties fo:border-bottom="0.74pt solid #000000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1" style:family="table-cell" style:parent-style-name="Default" style:data-style-name="N135">
      <style:table-cell-properties fo:border-bottom="0.74pt solid #000000" fo:background-color="#8e86a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2" style:family="table-cell" style:parent-style-name="Default" style:data-style-name="N135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3" style:family="table-cell" style:parent-style-name="Default" style:data-style-name="N135">
      <style:table-cell-properties fo:border-bottom="0.74pt solid #000000" fo:background-color="#729fcf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4" style:family="table-cell" style:parent-style-name="Default" style:data-style-name="N135">
      <style:table-cell-properties fo:border-bottom="0.74pt solid #000000" fo:background-color="#81ac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5" style:family="table-cell" style:parent-style-name="Default" style:data-style-name="N135">
      <style:table-cell-properties fo:border-bottom="none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6" style:family="table-cell" style:parent-style-name="Default" style:data-style-name="N135">
      <style:table-cell-properties fo:border-bottom="0.74pt solid #000000" fo:background-color="#77bc6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7" style:family="table-cell" style:parent-style-name="Default" style:data-style-name="N135">
      <style:table-cell-properties fo:border-bottom="none" fo:background-color="#e8f2a1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8" style:family="table-cell" style:parent-style-name="Default" style:data-style-name="N135">
      <style:table-cell-properties fo:border-bottom="0.74pt solid #000000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1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92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3" style:family="table-cell" style:parent-style-name="Default">
      <style:table-cell-properties fo:border-bottom="none" fo:background-color="#8e86a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4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5" style:family="table-cell" style:parent-style-name="Default">
      <style:table-cell-properties fo:border-bottom="none" fo:background-color="#81ac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7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46" style:family="table-cell" style:parent-style-name="Default" style:data-style-name="N135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547" style:family="table-cell" style:parent-style-name="Default" style:data-style-name="N135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548" style:family="table-cell" style:parent-style-name="Default" style:data-style-name="N135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order-bottom="none" fo:background-color="#729fc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6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2" style:family="table-cell" style:parent-style-name="Default" style:data-style-name="N135">
      <style:table-cell-properties fo:border-bottom="none" fo:background-color="#bf819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09" style:family="table-cell" style:parent-style-name="Default" style:data-style-name="N135">
      <style:table-cell-properties fo:border-bottom="0.74pt solid #000000" fo:background-color="#a1467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0" style:family="table-cell" style:parent-style-name="Default" style:data-style-name="N135">
      <style:table-cell-properties fo:border-bottom="0.74pt solid #000000" fo:background-color="#8e86a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 style:data-style-name="N135">
      <style:table-cell-properties fo:border-bottom="none" fo:background-color="#b4c7dc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 style:data-style-name="N135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7" style:family="table-cell" style:parent-style-name="Default" style:data-style-name="N135">
      <style:table-cell-properties fo:border-bottom="0.74pt solid #000000" fo:background-color="#81aca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8" style:family="table-cell" style:parent-style-name="Default" style:data-style-name="N135">
      <style:table-cell-properties fo:border-bottom="none" fo:background-color="#afd095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20" style:family="table-cell" style:parent-style-name="Default" style:data-style-name="N135">
      <style:table-cell-properties fo:border-bottom="0.74pt solid #000000" fo:background-color="#77bc6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2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61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2" style:family="table-cell" style:parent-style-name="Default" style:data-style-name="N135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ce425" style:family="table-cell" style:parent-style-name="Default" style:data-style-name="N135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ce564" style:family="table-cell" style:parent-style-name="Default" style:data-style-name="N135">
      <style:table-cell-properties fo:background-color="#8e86ae" style:text-align-source="fix" style:repeat-content="false" style:vertical-align="middle"/>
      <style:paragraph-properties fo:text-align="center" fo:margin-left="0in"/>
    </style:style>
    <style:style style:name="ce427" style:family="table-cell" style:parent-style-name="Default" style:data-style-name="N135">
      <style:table-cell-properties fo:background-color="#8e86ae" style:text-align-source="fix" style:repeat-content="false" style:vertical-align="middle"/>
      <style:paragraph-properties fo:text-align="center" fo:margin-left="0in"/>
    </style:style>
    <style:style style:name="ce566" style:family="table-cell" style:parent-style-name="Default" style:data-style-name="N135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428" style:family="table-cell" style:parent-style-name="Default" style:data-style-name="N135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568" style:family="table-cell" style:parent-style-name="Default" style:data-style-name="N135">
      <style:table-cell-properties fo:background-color="#81aca6" style:text-align-source="fix" style:repeat-content="false" style:vertical-align="middle"/>
      <style:paragraph-properties fo:text-align="center" fo:margin-left="0in"/>
    </style:style>
    <style:style style:name="ce430" style:family="table-cell" style:parent-style-name="Default" style:data-style-name="N135">
      <style:table-cell-properties fo:background-color="#81aca6" style:text-align-source="fix" style:repeat-content="false" style:vertical-align="middle"/>
      <style:paragraph-properties fo:text-align="center" fo:margin-left="0in"/>
    </style:style>
    <style:style style:name="ce570" style:family="table-cell" style:parent-style-name="Default" style:data-style-name="N135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431" style:family="table-cell" style:parent-style-name="Default" style:data-style-name="N135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432" style:family="table-cell" style:parent-style-name="Default" style:data-style-name="N135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424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3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43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35" style:family="table-cell" style:parent-style-name="Default" style:data-style-name="N135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36" style:family="table-cell" style:parent-style-name="Default" style:data-style-name="N135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9" style:family="table-cell" style:parent-style-name="Default" style:data-style-name="N0">
      <style:table-cell-properties fo:background-color="#729fcf" style:text-align-source="fix" style:repeat-content="false" fo:border="none" style:vertical-align="middle"/>
      <style:paragraph-properties fo:text-align="center" fo:margin-left="0in"/>
    </style:style>
    <style:style style:name="ce440" style:family="table-cell" style:parent-style-name="Default" style:data-style-name="N0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135">
      <style:table-cell-properties fo:border-bottom="none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86" style:family="table-cell" style:parent-style-name="Default" style:data-style-name="N135">
      <style:table-cell-properties fo:border-bottom="none" fo:background-color="#bf819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0" style:family="table-cell" style:parent-style-name="Default" style:data-style-name="N135">
      <style:table-cell-properties fo:border-bottom="none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2" style:family="table-cell" style:parent-style-name="Default" style:data-style-name="N135">
      <style:table-cell-properties fo:border-bottom="none" fo:background-color="#8e86a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3" style:family="table-cell" style:parent-style-name="Default" style:data-style-name="N135">
      <style:table-cell-properties fo:border-bottom="none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4" style:family="table-cell" style:parent-style-name="Default" style:data-style-name="N135">
      <style:table-cell-properties fo:border-bottom="none" fo:background-color="#81ac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5" style:family="table-cell" style:parent-style-name="Default" style:data-style-name="N135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4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6" style:family="table-cell" style:parent-style-name="Default" style:data-style-name="N135">
      <style:table-cell-properties fo:border-bottom="none" fo:background-color="#d4ea6b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7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6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in"/>
    </style:style>
    <style:style style:name="ce459" style:family="table-cell" style:parent-style-name="Default" style:data-style-name="N13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00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602" style:family="table-cell" style:parent-style-name="Default" style:data-style-name="N135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2" style:family="table-cell" style:parent-style-name="Default" style:data-style-name="N13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4" style:family="table-cell" style:parent-style-name="Default" style:data-style-name="N13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135">
      <style:table-cell-properties fo:border-bottom="0.74pt solid #000000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7" style:family="table-cell" style:parent-style-name="Default" style:data-style-name="N135">
      <style:table-cell-properties fo:border-bottom="0.74pt solid #000000" fo:background-color="#8e86a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8" style:family="table-cell" style:parent-style-name="Default" style:data-style-name="N135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69" style:family="table-cell" style:parent-style-name="Default" style:data-style-name="N135">
      <style:table-cell-properties fo:border-bottom="0.74pt solid #000000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0" style:family="table-cell" style:parent-style-name="Default" style:data-style-name="N135">
      <style:table-cell-properties fo:border-bottom="0.74pt solid #000000" fo:background-color="#81ac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1" style:family="table-cell" style:parent-style-name="Default" style:data-style-name="N135">
      <style:table-cell-properties fo:border-bottom="none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72" style:family="table-cell" style:parent-style-name="Default" style:data-style-name="N135">
      <style:table-cell-properties fo:border-bottom="0.74pt solid #000000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5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4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4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48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49" style:family="table-cell" style:parent-style-name="Default" style:data-style-name="N137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5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35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1" style:family="table-cell" style:parent-style-name="Default" style:data-style-name="N135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3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5" style:family="table-cell" style:parent-style-name="Default" style:data-style-name="N135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7" style:family="table-cell" style:parent-style-name="Default" style:data-style-name="N135">
      <style:table-cell-properties style:text-align-source="fix" style:repeat-content="false" fo:border="none" style:vertical-align="middle"/>
      <style:paragraph-properties fo:text-align="center" fo:margin-left="0in"/>
    </style:style>
    <style:style style:name="ce88" style:family="table-cell" style:parent-style-name="Default" style:data-style-name="N13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1" style:family="table-cell" style:parent-style-name="Default" style:data-style-name="N135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35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3" style:family="table-cell" style:parent-style-name="Default" style:data-style-name="N0">
      <style:table-cell-properties fo:background-color="#3465a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7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92" style:family="table-cell" style:parent-style-name="Default" style:data-style-name="N0">
      <style:table-cell-properties fo:border-bottom="none" fo:background-color="#b3cac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13" style:family="table-cell" style:parent-style-name="Default" style:data-style-name="N37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4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19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6" style:family="table-cell" style:parent-style-name="Default">
      <style:table-cell-properties fo:border-bottom="none" fo:background-color="#b4c7dc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2" style:family="table-cell" style:parent-style-name="Default">
      <style:table-cell-properties fo:border-bottom="none" fo:background-color="#b4c7dc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6" style:family="table-cell" style:parent-style-name="Default">
      <style:table-cell-properties fo:border-bottom="none" fo:background-color="#ffffa6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9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solid" svg:stroke-width="0.0102in" svg:stroke-color="#bcbcbc" draw:stroke-linejoin="round" draw:fill="solid" draw:fill-color="#ffffff" draw:textarea-horizontal-align="justify" draw:textarea-vertical-align="top" draw:auto-grow-height="false" draw:fit-to-size="false" style:shrink-to-fit="false" fo:min-height="13.548in" fo:min-width="7.3181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.1654in" fo:margin-bottom="0.1378in" fo:line-height="100%" fo:text-align="start" fo:text-indent="0in"/>
      <style:text-properties fo:font-size="10pt" style:font-size-asian="10pt" style:font-size-complex="10pt"/>
    </style:style>
    <style:style style:name="gr2" style:family="graphic" style:parent-style-name="Default">
      <style:graphic-properties draw:stroke="solid" svg:stroke-width="0.0102in" svg:stroke-color="#bcbcbc" draw:stroke-linejoin="round" draw:fill="solid" draw:fill-color="#ffffff" draw:textarea-horizontal-align="justify" draw:textarea-vertical-align="top" draw:auto-grow-height="false" draw:fit-to-size="false" style:shrink-to-fit="false" fo:min-height="20.5972in" fo:min-width="7.3181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.1654in" fo:margin-bottom="0.1378in" fo:line-height="100%" fo:text-align="start" fo:text-indent="0in"/>
      <style:text-properties fo:font-size="10pt" style:font-size-asian="10pt" style:font-size-complex="10pt"/>
    </style:style>
    <style:style style:name="gr3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8807in" fo:min-width="4.2697in" fo:padding-top="0.0492in" fo:padding-bottom="0.0492in" fo:padding-left="0.0984in" fo:padding-right="0.0984in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gr5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5996in" fo:min-width="4.2697in" fo:padding-top="0.0492in" fo:padding-bottom="0.0492in" fo:padding-left="0.0984in" fo:padding-right="0.0984in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margin-left="0in" fo:margin-right="0in" fo:margin-top="0.1654in" fo:margin-bottom="0.1378in" fo:line-height="100%" fo:text-align="start" fo:text-indent="0in"/>
    </style:style>
    <style:style style:name="P2" style:family="paragraph">
      <style:paragraph-properties fo:margin-left="0in" fo:margin-right="0in" fo:margin-top="0.1654in" fo:margin-bottom="0.1378in" fo:line-height="100%" fo:text-align="start" fo:text-indent="0in" loext:tab-stop-distance="1in">
        <style:tab-stops>
          <style:tab-stop style:position="0in"/>
        </style:tab-stops>
      </style:paragraph-properties>
    </style:style>
    <style:style style:name="P3" style:family="paragraph">
      <loext:graphic-properties draw:fill="solid" draw:fill-color="#ffffff"/>
      <style:paragraph-properties fo:margin-left="0in" fo:margin-right="0in" fo:margin-top="0.1654in" fo:margin-bottom="0.1378in" fo:line-height="100%" fo:text-align="start" fo:text-indent="0in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in" fo:margin-right="0in" fo:margin-top="0in" fo:margin-bottom="0in" fo:line-height="100%" fo:text-align="start" fo:text-indent="0in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V.$A$2:.$A$100])" table:allow-empty-cell="true" table:display-list="unsorted" table:base-cell-address="COV.F14">
          <table:error-message table:message-type="stop" table:display="true"/>
        </table:content-validation>
        <table:content-validation table:name="val2" table:condition="of:cell-content-is-in-list([$COV.$O$45:.$O$47])" table:allow-empty-cell="true" table:display-list="unsorted" table:base-cell-address="COV.J82">
          <table:error-message table:message-type="stop" table:display="true"/>
        </table:content-validation>
      </table:content-validations>
      <table:table table:name="Caracterizacao" table:style-name="ta1">
        <table:table-column table:style-name="co1" table:default-cell-style-name="Default"/>
        <table:table-column table:style-name="co1" table:default-cell-style-name="ce93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71" office:value-type="string" calcext:value-type="string" table:number-columns-spanned="10" table:number-rows-spanned="1">
            <text:p>Determinacao densidade</text:p>
          </table:table-cell>
          <table:covered-table-cell table:style-name="Default"/>
          <table:covered-table-cell table:number-columns-repeated="8"/>
          <table:table-cell table:number-columns-repeated="10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m0 (g)</text:p>
          </table:table-cell>
          <table:table-cell table:style-name="ce75" office:value-type="string" calcext:value-type="string">
            <text:p>m1 (g)</text:p>
          </table:table-cell>
          <table:table-cell table:style-name="ce75" office:value-type="string" calcext:value-type="string">
            <text:p>m1 - m0 (g)</text:p>
          </table:table-cell>
          <table:table-cell table:style-name="ce75" office:value-type="string" calcext:value-type="string">
            <text:p>V (L)</text:p>
          </table:table-cell>
          <table:table-cell table:style-name="ce75" office:value-type="string" calcext:value-type="string">
            <text:p>m2 (g)</text:p>
          </table:table-cell>
          <table:table-cell table:style-name="ce75" office:value-type="string" calcext:value-type="string">
            <text:p>m2 – m0 (g)</text:p>
          </table:table-cell>
          <table:table-cell table:style-name="ce75" office:value-type="string" calcext:value-type="string">
            <text:p>densidade (g/L)</text:p>
          </table:table-cell>
          <table:table-cell table:style-name="ce75" office:value-type="string" calcext:value-type="string">
            <text:p>densidade padrao (g/L)</text:p>
          </table:table-cell>
          <table:table-cell table:number-columns-repeated="10"/>
        </table:table-row>
        <table:table-row table:style-name="ro1">
          <table:table-cell table:style-name="ce93" office:value-type="string" calcext:value-type="string" table:number-columns-spanned="1" table:number-rows-spanned="2">
            <text:p>RA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6" calcext:value-type="float">
            <text:p>136.0000</text:p>
          </table:table-cell>
          <table:table-cell table:style-name="ce107" office:value-type="float" office:value="235" calcext:value-type="float">
            <text:p>235.0000</text:p>
          </table:table-cell>
          <table:table-cell table:style-name="ce107" table:formula="of:=[.D3]-[.C3]" office:value-type="float" office:value="99" calcext:value-type="float">
            <text:p>99.0000</text:p>
          </table:table-cell>
          <table:table-cell table:style-name="ce107" table:formula="of:=[.E3]/[.$C$9]" office:value-type="float" office:value="0.0991775277747167" calcext:value-type="float">
            <text:p>0.0992</text:p>
          </table:table-cell>
          <table:table-cell table:style-name="ce107" office:value-type="float" office:value="242" calcext:value-type="float">
            <text:p>242.0000</text:p>
          </table:table-cell>
          <table:table-cell table:style-name="ce107" table:formula="of:=[.G3]-[.C3]" office:value-type="float" office:value="106" calcext:value-type="float">
            <text:p>106.0000</text:p>
          </table:table-cell>
          <table:table-cell table:style-name="ce107" table:formula="of:=[.H3]/[.F3]" office:value-type="float" office:value="1068.79050505051" calcext:value-type="float">
            <text:p>1068.7905</text:p>
          </table:table-cell>
          <table:table-cell table:style-name="ce141" table:formula="of:=MEDIAN([.I3:.I4])" office:value-type="float" office:value="1068.43760252525" calcext:value-type="float" table:number-columns-spanned="1" table:number-rows-spanned="2">
            <text:p>1068.4376</text:p>
          </table:table-cell>
          <table:table-cell table:number-columns-repeated="10"/>
        </table:table-row>
        <table:table-row table:style-name="ro1">
          <table:covered-table-cell table:style-name="ce93"/>
          <table:table-cell office:value-type="float" office:value="2" calcext:value-type="float">
            <text:p>2</text:p>
          </table:table-cell>
          <table:table-cell table:style-name="ce108" office:value-type="float" office:value="116" calcext:value-type="float">
            <text:p>116.0000</text:p>
          </table:table-cell>
          <table:table-cell table:style-name="ce108" office:value-type="float" office:value="216" calcext:value-type="float">
            <text:p>216.0000</text:p>
          </table:table-cell>
          <table:table-cell table:style-name="ce108" table:formula="of:=[.D4]-[.C4]" office:value-type="float" office:value="100" calcext:value-type="float">
            <text:p>100.0000</text:p>
          </table:table-cell>
          <table:table-cell table:style-name="ce108" table:formula="of:=[.E4]/[.$C$9]" office:value-type="float" office:value="0.100179320984562" calcext:value-type="float">
            <text:p>0.1002</text:p>
          </table:table-cell>
          <table:table-cell table:style-name="ce108" office:value-type="float" office:value="223" calcext:value-type="float">
            <text:p>223.0000</text:p>
          </table:table-cell>
          <table:table-cell table:style-name="ce108" table:formula="of:=[.G4]-[.C4]" office:value-type="float" office:value="107" calcext:value-type="float">
            <text:p>107.0000</text:p>
          </table:table-cell>
          <table:table-cell table:style-name="ce108" table:formula="of:=[.H4]/[.F4]" office:value-type="float" office:value="1068.0847" calcext:value-type="float">
            <text:p>1068.0847</text:p>
          </table:table-cell>
          <table:covered-table-cell table:style-name="ce108"/>
          <table:table-cell table:number-columns-repeated="10"/>
        </table:table-row>
        <table:table-row table:style-name="ro1">
          <table:table-cell table:style-name="ce94" office:value-type="string" calcext:value-type="string" table:number-columns-spanned="1" table:number-rows-spanned="2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09" office:value-type="float" office:value="114.21" calcext:value-type="float">
            <text:p>114.2100</text:p>
          </table:table-cell>
          <table:table-cell table:style-name="ce109" office:value-type="float" office:value="213.96" calcext:value-type="float">
            <text:p>213.9600</text:p>
          </table:table-cell>
          <table:table-cell table:style-name="ce109" table:formula="of:=[.D5]-[.C5]" office:value-type="float" office:value="99.75" calcext:value-type="float">
            <text:p>99.7500</text:p>
          </table:table-cell>
          <table:table-cell table:style-name="ce109" table:formula="of:=[.E5]/[.$C$9]" office:value-type="float" office:value="0.099928872682101" calcext:value-type="float">
            <text:p>0.0999</text:p>
          </table:table-cell>
          <table:table-cell table:style-name="ce109" office:value-type="float" office:value="203.47" calcext:value-type="float">
            <text:p>203.4700</text:p>
          </table:table-cell>
          <table:table-cell table:style-name="ce109" table:formula="of:=[.G5]-[.C5]" office:value-type="float" office:value="89.26" calcext:value-type="float">
            <text:p>89.2600</text:p>
          </table:table-cell>
          <table:table-cell table:style-name="ce109" table:formula="of:=[.H5]/[.F5]" office:value-type="float" office:value="893.23533433584" calcext:value-type="float">
            <text:p>893.2353</text:p>
          </table:table-cell>
          <table:table-cell table:style-name="ce137" table:formula="of:=MEDIAN([.I5:.I6])" office:value-type="float" office:value="893.074035663281" calcext:value-type="float" table:number-columns-spanned="1" table:number-rows-spanned="2">
            <text:p>893.0740</text:p>
          </table:table-cell>
          <table:table-cell table:number-columns-repeated="10"/>
        </table:table-row>
        <table:table-row table:style-name="ro1">
          <table:covered-table-cell table:style-name="ce95"/>
          <table:table-cell table:style-name="ce104" office:value-type="float" office:value="2" calcext:value-type="float">
            <text:p>2</text:p>
          </table:table-cell>
          <table:table-cell table:style-name="ce110" office:value-type="float" office:value="115.74" calcext:value-type="float">
            <text:p>115.7400</text:p>
          </table:table-cell>
          <table:table-cell table:style-name="ce110" office:value-type="float" office:value="214.9" calcext:value-type="float">
            <text:p>214.9000</text:p>
          </table:table-cell>
          <table:table-cell table:style-name="ce110" table:formula="of:=[.D6]-[.C6]" office:value-type="float" office:value="99.16" calcext:value-type="float">
            <text:p>99.1600</text:p>
          </table:table-cell>
          <table:table-cell table:style-name="ce110" table:formula="of:=[.E6]/[.$C$9]" office:value-type="float" office:value="0.099337814688292" calcext:value-type="float">
            <text:p>0.0993</text:p>
          </table:table-cell>
          <table:table-cell table:style-name="ce110" office:value-type="float" office:value="204.44" calcext:value-type="float">
            <text:p>204.4400</text:p>
          </table:table-cell>
          <table:table-cell table:style-name="ce110" table:formula="of:=[.G6]-[.C6]" office:value-type="float" office:value="88.7" calcext:value-type="float">
            <text:p>88.7000</text:p>
          </table:table-cell>
          <table:table-cell table:style-name="ce110" table:formula="of:=[.H6]/[.F6]" office:value-type="float" office:value="892.912736990722" calcext:value-type="float">
            <text:p>892.9127</text:p>
          </table:table-cell>
          <table:covered-table-cell table:style-name="ce110"/>
          <table:table-cell table:number-columns-repeated="10"/>
        </table:table-row>
        <table:table-row table:style-name="ro1">
          <table:table-cell table:style-name="ce96" office:value-type="string" calcext:value-type="string" table:number-columns-spanned="1" table:number-rows-spanned="2">
            <text:p>Inoculo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136" calcext:value-type="float">
            <text:p>136.0000</text:p>
          </table:table-cell>
          <table:table-cell table:style-name="ce111" office:value-type="float" office:value="235" calcext:value-type="float">
            <text:p>235.0000</text:p>
          </table:table-cell>
          <table:table-cell table:style-name="ce111" table:formula="of:=[.D7]-[.C7]" office:value-type="float" office:value="99" calcext:value-type="float">
            <text:p>99.0000</text:p>
          </table:table-cell>
          <table:table-cell table:style-name="ce111" table:formula="of:=[.E7]/[.$C$9]" office:value-type="float" office:value="0.0991775277747167" calcext:value-type="float">
            <text:p>0.0992</text:p>
          </table:table-cell>
          <table:table-cell table:style-name="ce111" office:value-type="float" office:value="242" calcext:value-type="float">
            <text:p>242.0000</text:p>
          </table:table-cell>
          <table:table-cell table:style-name="ce111" table:formula="of:=[.G7]-[.C7]" office:value-type="float" office:value="106" calcext:value-type="float">
            <text:p>106.0000</text:p>
          </table:table-cell>
          <table:table-cell table:style-name="ce111" table:formula="of:=[.H7]/[.F7]" office:value-type="float" office:value="1068.79050505051" calcext:value-type="float">
            <text:p>1068.7905</text:p>
          </table:table-cell>
          <table:table-cell table:style-name="ce138" table:formula="of:=MEDIAN([.I7:.I8])" office:value-type="float" office:value="1068.43760252525" calcext:value-type="float" table:number-columns-spanned="1" table:number-rows-spanned="2">
            <text:p>1068.4376</text:p>
          </table:table-cell>
          <table:table-cell table:number-columns-repeated="10"/>
        </table:table-row>
        <table:table-row table:style-name="ro1"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116" calcext:value-type="float">
            <text:p>116.0000</text:p>
          </table:table-cell>
          <table:table-cell table:style-name="ce112" office:value-type="float" office:value="216" calcext:value-type="float">
            <text:p>216.0000</text:p>
          </table:table-cell>
          <table:table-cell table:style-name="ce112" table:formula="of:=[.D8]-[.C8]" office:value-type="float" office:value="100" calcext:value-type="float">
            <text:p>100.0000</text:p>
          </table:table-cell>
          <table:table-cell table:style-name="ce112" table:formula="of:=[.E8]/[.$C$9]" office:value-type="float" office:value="0.100179320984562" calcext:value-type="float">
            <text:p>0.1002</text:p>
          </table:table-cell>
          <table:table-cell table:style-name="ce112" office:value-type="float" office:value="223" calcext:value-type="float">
            <text:p>223.0000</text:p>
          </table:table-cell>
          <table:table-cell table:style-name="ce112" table:formula="of:=[.G8]-[.C8]" office:value-type="float" office:value="107" calcext:value-type="float">
            <text:p>107.0000</text:p>
          </table:table-cell>
          <table:table-cell table:style-name="ce112" table:formula="of:=[.H8]/[.F8]" office:value-type="float" office:value="1068.0847" calcext:value-type="float">
            <text:p>1068.0847</text:p>
          </table:table-cell>
          <table:covered-table-cell table:style-name="ce112"/>
          <table:table-cell table:number-columns-repeated="10"/>
        </table:table-row>
        <table:table-row table:style-name="ro1">
          <table:table-cell table:style-name="ce98" office:value-type="string" calcext:value-type="string" table:number-columns-spanned="2" table:number-rows-spanned="1">
            <text:p>Densidade agua (g/L)</text:p>
          </table:table-cell>
          <table:covered-table-cell table:style-name="ce98"/>
          <table:table-cell table:style-name="ce113" office:value-type="float" office:value="998.21" calcext:value-type="float">
            <text:p>998.2100</text:p>
          </table:table-cell>
          <table:table-cell table:style-name="ce121" table:number-columns-repeated="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ce121" table:number-columns-repeated="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99" office:value-type="string" calcext:value-type="string" table:number-columns-spanned="20" table:number-rows-spanned="1">
            <text:p>Determinacao de Solidos</text:p>
          </table:table-cell>
          <table:covered-table-cell table:style-name="Default"/>
          <table:covered-table-cell table:number-columns-repeated="18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m0 (g)</text:p>
          </table:table-cell>
          <table:table-cell table:style-name="ce75" office:value-type="string" calcext:value-type="string">
            <text:p>m1 (g)</text:p>
          </table:table-cell>
          <table:table-cell table:style-name="ce75" office:value-type="string" calcext:value-type="string">
            <text:p>m sub (g)</text:p>
          </table:table-cell>
          <table:table-cell table:style-name="ce75" office:value-type="string" calcext:value-type="string">
            <text:p>V sub (L)</text:p>
          </table:table-cell>
          <table:table-cell table:style-name="ce75" office:value-type="string" calcext:value-type="string">
            <text:p>m2 (g)</text:p>
          </table:table-cell>
          <table:table-cell table:style-name="ce75" office:value-type="string" calcext:value-type="string">
            <text:p>TS (g/L)</text:p>
          </table:table-cell>
          <table:table-cell table:style-name="ce75" office:value-type="string" calcext:value-type="string">
            <text:p>media TS (g/L)</text:p>
          </table:table-cell>
          <table:table-cell table:style-name="ce75" office:value-type="string" calcext:value-type="string">
            <text:p>TS %</text:p>
          </table:table-cell>
          <table:table-cell table:style-name="ce75" office:value-type="string" calcext:value-type="string">
            <text:p>media TS %</text:p>
          </table:table-cell>
          <table:table-cell table:style-name="ce75" office:value-type="string" calcext:value-type="string">
            <text:p>m3 (g)</text:p>
          </table:table-cell>
          <table:table-cell table:style-name="ce75" office:value-type="string" calcext:value-type="string">
            <text:p>VS (g/L)</text:p>
          </table:table-cell>
          <table:table-cell table:style-name="ce75" office:value-type="string" calcext:value-type="string">
            <text:p>media VS (g/L)</text:p>
          </table:table-cell>
          <table:table-cell table:style-name="ce75" office:value-type="string" calcext:value-type="string">
            <text:p>VS %</text:p>
          </table:table-cell>
          <table:table-cell table:style-name="ce75" office:value-type="string" calcext:value-type="string">
            <text:p>media VS %</text:p>
          </table:table-cell>
          <table:table-cell table:style-name="ce75" office:value-type="string" calcext:value-type="string">
            <text:p>FS (g/L)</text:p>
          </table:table-cell>
          <table:table-cell table:style-name="ce75" office:value-type="string" calcext:value-type="string">
            <text:p>media FS (g/L)</text:p>
          </table:table-cell>
          <table:table-cell table:style-name="ce75" office:value-type="string" calcext:value-type="string">
            <text:p>FS %</text:p>
          </table:table-cell>
          <table:table-cell table:style-name="ce75" office:value-type="string" calcext:value-type="string">
            <text:p>media FS %</text:p>
          </table:table-cell>
        </table:table-row>
        <table:table-row table:style-name="ro1">
          <table:table-cell table:style-name="ce100" office:value-type="string" calcext:value-type="string" table:number-columns-spanned="1" table:number-rows-spanned="3">
            <text:p>RA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float" office:value="78.731" calcext:value-type="float">
            <text:p>78.7310</text:p>
          </table:table-cell>
          <table:table-cell table:style-name="ce123" table:formula="of:=105.9875" office:value-type="float" office:value="105.9875" calcext:value-type="float">
            <text:p>105.9875</text:p>
          </table:table-cell>
          <table:table-cell table:style-name="ce107" table:formula="of:=[.D14]-[.C14]" office:value-type="float" office:value="27.2565" calcext:value-type="float">
            <text:p>27.2565</text:p>
          </table:table-cell>
          <table:table-cell table:style-name="ce107" table:formula="of:=[.E14]/[.$J$3]" office:value-type="float" office:value="0.0255106146915639" calcext:value-type="float">
            <text:p>0.0255</text:p>
          </table:table-cell>
          <table:table-cell table:style-name="ce123" office:value-type="float" office:value="91.0021" calcext:value-type="float">
            <text:p>91.0021</text:p>
          </table:table-cell>
          <table:table-cell table:style-name="ce107" table:formula="of:=(([.G14]-[.C14]))/([.F14])" office:value-type="float" office:value="481.019377555726" calcext:value-type="float">
            <text:p>481.0194</text:p>
          </table:table-cell>
          <table:table-cell table:style-name="ce107" table:formula="of:=MEDIAN([.H14:.H16])" office:value-type="float" office:value="536.39975270356" calcext:value-type="float" table:number-columns-spanned="1" table:number-rows-spanned="3">
            <text:p>536.3998</text:p>
          </table:table-cell>
          <table:table-cell table:style-name="ce107" table:formula="of:=(([.G14]-[.C14])*100)/([.D14]-[.C14])" office:value-type="float" office:value="45.0208207216627" calcext:value-type="float">
            <text:p>45.0208</text:p>
          </table:table-cell>
          <table:table-cell table:style-name="ce107" table:formula="of:=MEDIAN([.J14:.J16])" office:value-type="float" office:value="50.2041252980781" calcext:value-type="float" table:number-columns-spanned="1" table:number-rows-spanned="3">
            <text:p>50.2041</text:p>
          </table:table-cell>
          <table:table-cell table:style-name="ce123" office:value-type="float" office:value="79.2024" calcext:value-type="float">
            <text:p>79.2024</text:p>
          </table:table-cell>
          <table:table-cell table:style-name="ce107" table:formula="of:=([.G14]-[.L14])/[.F14]" office:value-type="float" office:value="462.540794985315" calcext:value-type="float">
            <text:p>462.5408</text:p>
          </table:table-cell>
          <table:table-cell table:style-name="ce107" table:formula="of:=MEDIAN([.M14:.M16])" office:value-type="float" office:value="520.806779510477" calcext:value-type="float" table:number-columns-spanned="1" table:number-rows-spanned="3">
            <text:p>520.8068</text:p>
          </table:table-cell>
          <table:table-cell table:style-name="ce107" table:formula="of:=(([.G14]-[.L14])*100)/([.G14]-[.C14])" office:value-type="float" office:value="96.1584536023665" calcext:value-type="float">
            <text:p>96.1585</text:p>
          </table:table-cell>
          <table:table-cell table:style-name="ce107" table:formula="of:=MEDIAN([.O14:.O16])" office:value-type="float" office:value="96.2398284236423" calcext:value-type="float" table:number-columns-spanned="1" table:number-rows-spanned="3">
            <text:p>96.2398</text:p>
          </table:table-cell>
          <table:table-cell table:style-name="ce107" table:formula="of:=([.L14]-[.C14])/[.F14]" office:value-type="float" office:value="18.478582570411" calcext:value-type="float">
            <text:p>18.4786</text:p>
          </table:table-cell>
          <table:table-cell table:style-name="ce107" table:formula="of:=MEDIAN([.Q14:.Q16])" office:value-type="float" office:value="18.478582570411" calcext:value-type="float" table:number-columns-spanned="1" table:number-rows-spanned="3">
            <text:p>18.4786</text:p>
          </table:table-cell>
          <table:table-cell table:style-name="ce107" table:formula="of:=(([.L14]-[.C14])*100)/([.G14]-[.C14])" office:value-type="float" office:value="3.84154639763349" calcext:value-type="float">
            <text:p>3.8415</text:p>
          </table:table-cell>
          <table:table-cell table:style-name="ce107" table:formula="of:=MEDIAN([.S14:.S16])" office:value-type="float" office:value="3.76017157635774" calcext:value-type="float" table:number-columns-spanned="1" table:number-rows-spanned="3">
            <text:p>3.7602</text:p>
          </table:table-cell>
        </table:table-row>
        <table:table-row table:style-name="ro1">
          <table:covered-table-cell table:style-name="ce93"/>
          <table:table-cell office:value-type="float" office:value="2" calcext:value-type="float">
            <text:p>2</text:p>
          </table:table-cell>
          <table:table-cell table:style-name="ce114" office:value-type="float" office:value="84.3206" calcext:value-type="float">
            <text:p>84.3206</text:p>
          </table:table-cell>
          <table:table-cell table:style-name="ce124" table:formula="of:=113.2979" office:value-type="float" office:value="113.2979" calcext:value-type="float">
            <text:p>113.2979</text:p>
          </table:table-cell>
          <table:table-cell table:style-name="ce114" table:formula="of:=[.D15]-[.C15]" office:value-type="float" office:value="28.9773" calcext:value-type="float">
            <text:p>28.9773</text:p>
          </table:table-cell>
          <table:table-cell table:style-name="ce114" table:formula="of:=[.E15]/[.$J$3]" office:value-type="float" office:value="0.027121190728885" calcext:value-type="float">
            <text:p>0.0271</text:p>
          </table:table-cell>
          <table:table-cell table:style-name="ce124" office:value-type="float" office:value="98.8684" calcext:value-type="float">
            <text:p>98.8684</text:p>
          </table:table-cell>
          <table:table-cell table:style-name="ce114" table:formula="of:=(([.G15]-[.C15]))/([.F15])" office:value-type="float" office:value="536.39975270356" calcext:value-type="float">
            <text:p>536.3998</text:p>
          </table:table-cell>
          <table:covered-table-cell table:style-name="ce114"/>
          <table:table-cell table:style-name="ce114" table:formula="of:=(([.G15]-[.C15])*100)/([.D15]-[.C15])" office:value-type="float" office:value="50.2041252980781" calcext:value-type="float">
            <text:p>50.2041</text:p>
          </table:table-cell>
          <table:covered-table-cell table:style-name="ce114"/>
          <table:table-cell table:style-name="ce124" office:value-type="float" office:value="84.7435" calcext:value-type="float">
            <text:p>84.7435</text:p>
          </table:table-cell>
          <table:table-cell table:style-name="ce114" table:formula="of:=([.G15]-[.L15])/[.F15]" office:value-type="float" office:value="520.806779510477" calcext:value-type="float">
            <text:p>520.8068</text:p>
          </table:table-cell>
          <table:covered-table-cell table:style-name="ce114"/>
          <table:table-cell table:style-name="ce114" table:formula="of:=(([.G15]-[.L15])*100)/([.G15]-[.C15])" office:value-type="float" office:value="97.0930312487112" calcext:value-type="float">
            <text:p>97.0930</text:p>
          </table:table-cell>
          <table:covered-table-cell table:style-name="ce114"/>
          <table:table-cell table:style-name="ce114" table:formula="of:=([.L15]-[.C15])/[.F15]" office:value-type="float" office:value="15.5929731930831" calcext:value-type="float">
            <text:p>15.5930</text:p>
          </table:table-cell>
          <table:covered-table-cell table:style-name="ce114"/>
          <table:table-cell table:style-name="ce114" table:formula="of:=(([.L15]-[.C15])*100)/([.G15]-[.C15])" office:value-type="float" office:value="2.90696875128885" calcext:value-type="float">
            <text:p>2.9070</text:p>
          </table:table-cell>
          <table:covered-table-cell table:style-name="ce114"/>
        </table:table-row>
        <table:table-row table:style-name="ro1">
          <table:covered-table-cell table:style-name="ce101"/>
          <table:table-cell office:value-type="float" office:value="3" calcext:value-type="float">
            <text:p>3</text:p>
          </table:table-cell>
          <table:table-cell table:style-name="ce114" office:value-type="float" office:value="77.5887" calcext:value-type="float">
            <text:p>77.5887</text:p>
          </table:table-cell>
          <table:table-cell table:style-name="ce124" table:formula="of:=108.8399" office:value-type="float" office:value="108.8399" calcext:value-type="float">
            <text:p>108.8399</text:p>
          </table:table-cell>
          <table:table-cell table:style-name="ce114" table:formula="of:=[.D16]-[.C16]" office:value-type="float" office:value="31.2512" calcext:value-type="float">
            <text:p>31.2512</text:p>
          </table:table-cell>
          <table:table-cell table:style-name="ce114" table:formula="of:=[.E16]/[.$J$3]" office:value-type="float" office:value="0.0292494385504009" calcext:value-type="float">
            <text:p>0.0292</text:p>
          </table:table-cell>
          <table:table-cell table:style-name="ce124" office:value-type="float" office:value="93.4417" calcext:value-type="float">
            <text:p>93.4417</text:p>
          </table:table-cell>
          <table:table-cell table:style-name="ce114" table:formula="of:=(([.G16]-[.C16]))/([.F16])" office:value-type="float" office:value="541.993309467567" calcext:value-type="float">
            <text:p>541.9933</text:p>
          </table:table-cell>
          <table:covered-table-cell table:style-name="ce114"/>
          <table:table-cell table:style-name="ce114" table:formula="of:=(([.G16]-[.C16])*100)/([.D16]-[.C16])" office:value-type="float" office:value="50.727652058161" calcext:value-type="float">
            <text:p>50.7277</text:p>
          </table:table-cell>
          <table:covered-table-cell table:style-name="ce114"/>
          <table:table-cell table:style-name="ce124" office:value-type="float" office:value="78.1848" calcext:value-type="float">
            <text:p>78.1848</text:p>
          </table:table-cell>
          <table:table-cell table:style-name="ce114" table:formula="of:=([.G16]-[.L16])/[.F16]" office:value-type="float" office:value="521.613431099207" calcext:value-type="float">
            <text:p>521.6134</text:p>
          </table:table-cell>
          <table:covered-table-cell table:style-name="ce114"/>
          <table:table-cell table:style-name="ce114" table:formula="of:=(([.G16]-[.L16])*100)/([.G16]-[.C16])" office:value-type="float" office:value="96.2398284236423" calcext:value-type="float">
            <text:p>96.2398</text:p>
          </table:table-cell>
          <table:covered-table-cell table:style-name="ce114"/>
          <table:table-cell table:style-name="ce114" table:formula="of:=([.L16]-[.C16])/[.F16]" office:value-type="float" office:value="20.3798783683601" calcext:value-type="float">
            <text:p>20.3799</text:p>
          </table:table-cell>
          <table:covered-table-cell table:style-name="ce114"/>
          <table:table-cell table:style-name="ce114" table:formula="of:=(([.L16]-[.C16])*100)/([.G16]-[.C16])" office:value-type="float" office:value="3.76017157635774" calcext:value-type="float">
            <text:p>3.7602</text:p>
          </table:table-cell>
          <table:covered-table-cell table:style-name="ce114"/>
        </table:table-row>
        <table:table-row table:style-name="ro1">
          <table:table-cell table:style-name="ce94" office:value-type="string" calcext:value-type="string" table:number-columns-spanned="1" table:number-rows-spanned="3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09" office:value-type="float" office:value="84.2193" calcext:value-type="float">
            <text:p>84.2193</text:p>
          </table:table-cell>
          <table:table-cell table:style-name="ce125" table:formula="of:=88.6434" office:value-type="float" office:value="88.6434" calcext:value-type="float">
            <text:p>88.6434</text:p>
          </table:table-cell>
          <table:table-cell table:style-name="ce109" table:formula="of:=[.D17]-[.C17]" office:value-type="float" office:value="4.4241" calcext:value-type="float">
            <text:p>4.4241</text:p>
          </table:table-cell>
          <table:table-cell table:style-name="ce109" table:formula="of:=[.E17]/[.$J$5]" office:value-type="float" office:value="0.00495378862594997" calcext:value-type="float">
            <text:p>0.0050</text:p>
          </table:table-cell>
          <table:table-cell table:style-name="ce125" office:value-type="float" office:value="88.4966" calcext:value-type="float">
            <text:p>88.4966</text:p>
          </table:table-cell>
          <table:table-cell table:style-name="ce109" table:formula="of:=(([.G17]-[.C17]))/([.F17])" office:value-type="float" office:value="863.440151159005" calcext:value-type="float">
            <text:p>863.4402</text:p>
          </table:table-cell>
          <table:table-cell table:style-name="ce137" table:formula="of:=MEDIAN([.H17:.H19])" office:value-type="float" office:value="867.723994290837" calcext:value-type="float" table:number-columns-spanned="1" table:number-rows-spanned="3">
            <text:p>867.7240</text:p>
          </table:table-cell>
          <table:table-cell table:style-name="ce109" table:formula="of:=(([.G17]-[.C17])*100)/([.D17]-[.C17])" office:value-type="float" office:value="96.6818109898059" calcext:value-type="float">
            <text:p>96.6818</text:p>
          </table:table-cell>
          <table:table-cell table:style-name="ce137" table:formula="of:=MEDIAN([.J17:.J19])" office:value-type="float" office:value="97.1614848982126" calcext:value-type="float" table:number-columns-spanned="1" table:number-rows-spanned="3">
            <text:p>97.1615</text:p>
          </table:table-cell>
          <table:table-cell table:style-name="ce125" office:value-type="float" office:value="84.2144" calcext:value-type="float">
            <text:p>84.2144</text:p>
          </table:table-cell>
          <table:table-cell table:style-name="ce109" table:formula="of:=([.G17]-[.L17])/[.F17]" office:value-type="float" office:value="864.42929308047" calcext:value-type="float">
            <text:p>864.4293</text:p>
          </table:table-cell>
          <table:table-cell table:style-name="ce137" table:formula="of:=MEDIAN([.M17:.M19])" office:value-type="float" office:value="868.654816122481" calcext:value-type="float" table:number-columns-spanned="1" table:number-rows-spanned="3">
            <text:p>868.6548</text:p>
          </table:table-cell>
          <table:table-cell table:style-name="ce109" table:formula="of:=(([.G17]-[.L17])*100)/([.G17]-[.C17])" office:value-type="float" office:value="100.114558249363" calcext:value-type="float">
            <text:p>100.1146</text:p>
          </table:table-cell>
          <table:table-cell table:style-name="ce137" table:formula="of:=MEDIAN([.O17:.O19])" office:value-type="float" office:value="100.114558249363" calcext:value-type="float" table:number-columns-spanned="1" table:number-rows-spanned="3">
            <text:p>100.1146</text:p>
          </table:table-cell>
          <table:table-cell table:style-name="ce109" table:formula="of:=([.L17]-[.C17])/[.F17]" office:value-type="float" office:value="-0.989141921465551" calcext:value-type="float">
            <text:p>-0.9891</text:p>
          </table:table-cell>
          <table:table-cell table:style-name="ce137" table:formula="of:=MEDIAN([.Q17:.Q19])" office:value-type="float" office:value="-0.989141921465551" calcext:value-type="float" table:number-columns-spanned="1" table:number-rows-spanned="3">
            <text:p>-0.9891</text:p>
          </table:table-cell>
          <table:table-cell table:style-name="ce109" table:formula="of:=(([.L17]-[.C17])*100)/([.G17]-[.C17])" office:value-type="float" office:value="-0.114558249363064" calcext:value-type="float">
            <text:p>-0.1146</text:p>
          </table:table-cell>
          <table:table-cell table:style-name="ce137" table:formula="of:=MEDIAN([.S17:.S19])" office:value-type="float" office:value="-0.114558249363064" calcext:value-type="float" table:number-columns-spanned="1" table:number-rows-spanned="3">
            <text:p>-0.1146</text:p>
          </table:table-cell>
        </table:table-row>
        <table:table-row table:style-name="ro1">
          <table:covered-table-cell table:style-name="ce95"/>
          <table:table-cell table:style-name="ce95" office:value-type="float" office:value="2" calcext:value-type="float">
            <text:p>2</text:p>
          </table:table-cell>
          <table:table-cell table:style-name="ce115" office:value-type="float" office:value="73.478" calcext:value-type="float">
            <text:p>73.4780</text:p>
          </table:table-cell>
          <table:table-cell table:style-name="ce126" table:formula="of:=77.9874" office:value-type="float" office:value="77.9874" calcext:value-type="float">
            <text:p>77.9874</text:p>
          </table:table-cell>
          <table:table-cell table:style-name="ce115" table:formula="of:=[.D18]-[.C18]" office:value-type="float" office:value="4.5094" calcext:value-type="float">
            <text:p>4.5094</text:p>
          </table:table-cell>
          <table:table-cell table:style-name="ce115" table:formula="of:=[.E18]/[.$J$5]" office:value-type="float" office:value="0.00504930142398653" calcext:value-type="float">
            <text:p>0.0050</text:p>
          </table:table-cell>
          <table:table-cell table:style-name="ce126" office:value-type="float" office:value="77.8594" calcext:value-type="float">
            <text:p>77.8594</text:p>
          </table:table-cell>
          <table:table-cell table:style-name="ce115" table:formula="of:=(([.G18]-[.C18]))/([.F18])" office:value-type="float" office:value="867.723994290837" calcext:value-type="float">
            <text:p>867.7240</text:p>
          </table:table-cell>
          <table:covered-table-cell table:style-name="ce115"/>
          <table:table-cell table:style-name="ce115" table:formula="of:=(([.G18]-[.C18])*100)/([.D18]-[.C18])" office:value-type="float" office:value="97.1614848982126" calcext:value-type="float">
            <text:p>97.1615</text:p>
          </table:table-cell>
          <table:covered-table-cell table:style-name="ce115"/>
          <table:table-cell table:style-name="ce126" office:value-type="float" office:value="73.4733" calcext:value-type="float">
            <text:p>73.4733</text:p>
          </table:table-cell>
          <table:table-cell table:style-name="ce115" table:formula="of:=([.G18]-[.L18])/[.F18]" office:value-type="float" office:value="868.654816122481" calcext:value-type="float">
            <text:p>868.6548</text:p>
          </table:table-cell>
          <table:covered-table-cell table:style-name="ce115"/>
          <table:table-cell table:style-name="ce115" table:formula="of:=(([.G18]-[.L18])*100)/([.G18]-[.C18])" office:value-type="float" office:value="100.107271648332" calcext:value-type="float">
            <text:p>100.1073</text:p>
          </table:table-cell>
          <table:covered-table-cell table:style-name="ce115"/>
          <table:table-cell table:style-name="ce115" table:formula="of:=([.L18]-[.C18])/[.F18]" office:value-type="float" office:value="-0.930821831644378" calcext:value-type="float">
            <text:p>-0.9308</text:p>
          </table:table-cell>
          <table:covered-table-cell table:style-name="ce115"/>
          <table:table-cell table:style-name="ce115" table:formula="of:=(([.L18]-[.C18])*100)/([.G18]-[.C18])" office:value-type="float" office:value="-0.107271648331577" calcext:value-type="float">
            <text:p>-0.1073</text:p>
          </table:table-cell>
          <table:covered-table-cell table:style-name="ce115"/>
        </table:table-row>
        <table:table-row table:style-name="ro1">
          <table:covered-table-cell table:style-name="ce102"/>
          <table:table-cell table:style-name="ce104" office:value-type="float" office:value="3" calcext:value-type="float">
            <text:p>3</text:p>
          </table:table-cell>
          <table:table-cell table:style-name="ce110" office:value-type="float" office:value="86.2012" calcext:value-type="float">
            <text:p>86.2012</text:p>
          </table:table-cell>
          <table:table-cell table:style-name="ce127" table:formula="of:=90.6107" office:value-type="float" office:value="90.6107" calcext:value-type="float">
            <text:p>90.6107</text:p>
          </table:table-cell>
          <table:table-cell table:style-name="ce110" table:formula="of:=[.D19]-[.C19]" office:value-type="float" office:value="4.40949999999999" calcext:value-type="float">
            <text:p>4.4095</text:p>
          </table:table-cell>
          <table:table-cell table:style-name="ce110" table:formula="of:=[.E19]/[.$J$5]" office:value-type="float" office:value="0.00493744059721217" calcext:value-type="float">
            <text:p>0.0049</text:p>
          </table:table-cell>
          <table:table-cell table:style-name="ce127" office:value-type="float" office:value="90.5034" calcext:value-type="float">
            <text:p>90.5034</text:p>
          </table:table-cell>
          <table:table-cell table:style-name="ce110" table:formula="of:=(([.G19]-[.C19]))/([.F19])" office:value-type="float" office:value="871.342128638297" calcext:value-type="float">
            <text:p>871.3421</text:p>
          </table:table-cell>
          <table:covered-table-cell table:style-name="ce110"/>
          <table:table-cell table:style-name="ce110" table:formula="of:=(([.G19]-[.C19])*100)/([.D19]-[.C19])" office:value-type="float" office:value="97.5666175303324" calcext:value-type="float">
            <text:p>97.5666</text:p>
          </table:table-cell>
          <table:covered-table-cell table:style-name="ce110"/>
          <table:table-cell table:style-name="ce127" office:value-type="float" office:value="86.1958" calcext:value-type="float">
            <text:p>86.1958</text:p>
          </table:table-cell>
          <table:table-cell table:style-name="ce110" table:formula="of:=([.G19]-[.L19])/[.F19]" office:value-type="float" office:value="872.435812682424" calcext:value-type="float">
            <text:p>872.4358</text:p>
          </table:table-cell>
          <table:covered-table-cell table:style-name="ce110"/>
          <table:table-cell table:style-name="ce110" table:formula="of:=(([.G19]-[.L19])*100)/([.G19]-[.C19])" office:value-type="float" office:value="100.125517177258" calcext:value-type="float">
            <text:p>100.1255</text:p>
          </table:table-cell>
          <table:covered-table-cell table:style-name="ce110"/>
          <table:table-cell table:style-name="ce110" table:formula="of:=([.L19]-[.C19])/[.F19]" office:value-type="float" office:value="-1.09368404412673" calcext:value-type="float">
            <text:p>-1.0937</text:p>
          </table:table-cell>
          <table:covered-table-cell table:style-name="ce110"/>
          <table:table-cell table:style-name="ce110" table:formula="of:=(([.L19]-[.C19])*100)/([.G19]-[.C19])" office:value-type="float" office:value="-0.12551717725802" calcext:value-type="float">
            <text:p>-0.1255</text:p>
          </table:table-cell>
          <table:covered-table-cell table:style-name="ce110"/>
        </table:table-row>
        <table:table-row table:style-name="ro1">
          <table:table-cell table:style-name="ce96" office:value-type="string" calcext:value-type="string" table:number-columns-spanned="1" table:number-rows-spanned="3">
            <text:p>Inoculo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78.731" calcext:value-type="float">
            <text:p>78.7310</text:p>
          </table:table-cell>
          <table:table-cell table:style-name="ce128" table:formula="of:=105.9875" office:value-type="float" office:value="105.9875" calcext:value-type="float">
            <text:p>105.9875</text:p>
          </table:table-cell>
          <table:table-cell table:style-name="ce111" table:formula="of:=[.D20]-[.C20]" office:value-type="float" office:value="27.2565" calcext:value-type="float">
            <text:p>27.2565</text:p>
          </table:table-cell>
          <table:table-cell table:style-name="ce111" table:formula="of:=[.E20]/[.$J$7]" office:value-type="float" office:value="0.0255106146915639" calcext:value-type="float">
            <text:p>0.0255</text:p>
          </table:table-cell>
          <table:table-cell table:style-name="ce128" office:value-type="float" office:value="91.0021" calcext:value-type="float">
            <text:p>91.0021</text:p>
          </table:table-cell>
          <table:table-cell table:style-name="ce111" table:formula="of:=(([.G20]-[.C20]))/([.F20])" office:value-type="float" office:value="481.019377555726" calcext:value-type="float">
            <text:p>481.0194</text:p>
          </table:table-cell>
          <table:table-cell table:style-name="ce138" table:formula="of:=MEDIAN([.H20:.H22])" office:value-type="float" office:value="536.39975270356" calcext:value-type="float" table:number-columns-spanned="1" table:number-rows-spanned="3">
            <text:p>536.3998</text:p>
          </table:table-cell>
          <table:table-cell table:style-name="ce116" table:formula="of:=(([.G20]-[.C20])*100)/([.D20]-[.C20])" office:value-type="float" office:value="45.0208207216627" calcext:value-type="float">
            <text:p>45.0208</text:p>
          </table:table-cell>
          <table:table-cell table:style-name="ce112" table:formula="of:=MEDIAN([.J20:.J22])" office:value-type="float" office:value="50.2041252980781" calcext:value-type="float" table:number-columns-spanned="1" table:number-rows-spanned="3">
            <text:p>50.2041</text:p>
          </table:table-cell>
          <table:table-cell table:style-name="ce128" office:value-type="float" office:value="79.2024" calcext:value-type="float">
            <text:p>79.2024</text:p>
          </table:table-cell>
          <table:table-cell table:style-name="ce111" table:formula="of:=([.G20]-[.L20])/[.F20]" office:value-type="float" office:value="462.540794985315" calcext:value-type="float">
            <text:p>462.5408</text:p>
          </table:table-cell>
          <table:table-cell table:style-name="ce138" table:formula="of:=MEDIAN([.M20:.M22])" office:value-type="float" office:value="520.806779510477" calcext:value-type="float" table:number-columns-spanned="1" table:number-rows-spanned="3">
            <text:p>520.8068</text:p>
          </table:table-cell>
          <table:table-cell table:style-name="ce116" table:formula="of:=(([.G20]-[.L20])*100)/([.G20]-[.C20])" office:value-type="float" office:value="96.1584536023665" calcext:value-type="float">
            <text:p>96.1585</text:p>
          </table:table-cell>
          <table:table-cell table:style-name="ce112" table:formula="of:=MEDIAN([.O20:.O22])" office:value-type="float" office:value="96.2398284236423" calcext:value-type="float" table:number-columns-spanned="1" table:number-rows-spanned="3">
            <text:p>96.2398</text:p>
          </table:table-cell>
          <table:table-cell table:style-name="ce111" table:formula="of:=([.L20]-[.C20])/[.F20]" office:value-type="float" office:value="18.478582570411" calcext:value-type="float">
            <text:p>18.4786</text:p>
          </table:table-cell>
          <table:table-cell table:style-name="ce138" table:formula="of:=MEDIAN([.Q20:.Q22])" office:value-type="float" office:value="18.478582570411" calcext:value-type="float" table:number-columns-spanned="1" table:number-rows-spanned="3">
            <text:p>18.4786</text:p>
          </table:table-cell>
          <table:table-cell table:style-name="ce116" table:formula="of:=(([.L20]-[.C20])*100)/([.G20]-[.C20])" office:value-type="float" office:value="3.84154639763349" calcext:value-type="float">
            <text:p>3.8415</text:p>
          </table:table-cell>
          <table:table-cell table:style-name="ce112" table:formula="of:=MEDIAN([.S20:.S22])" office:value-type="float" office:value="3.76017157635774" calcext:value-type="float" table:number-columns-spanned="1" table:number-rows-spanned="3">
            <text:p>3.7602</text:p>
          </table:table-cell>
        </table:table-row>
        <table:table-row table:style-name="ro1">
          <table:covered-table-cell table:style-name="ce97"/>
          <table:table-cell table:style-name="ce97" office:value-type="float" office:value="2" calcext:value-type="float">
            <text:p>2</text:p>
          </table:table-cell>
          <table:table-cell table:style-name="ce116" office:value-type="float" office:value="84.3206" calcext:value-type="float">
            <text:p>84.3206</text:p>
          </table:table-cell>
          <table:table-cell table:style-name="ce129" table:formula="of:=113.2979" office:value-type="float" office:value="113.2979" calcext:value-type="float">
            <text:p>113.2979</text:p>
          </table:table-cell>
          <table:table-cell table:style-name="ce116" table:formula="of:=[.D21]-[.C21]" office:value-type="float" office:value="28.9773" calcext:value-type="float">
            <text:p>28.9773</text:p>
          </table:table-cell>
          <table:table-cell table:style-name="ce116" table:formula="of:=[.E21]/[.$J$7]" office:value-type="float" office:value="0.027121190728885" calcext:value-type="float">
            <text:p>0.0271</text:p>
          </table:table-cell>
          <table:table-cell table:style-name="ce129" office:value-type="float" office:value="98.8684" calcext:value-type="float">
            <text:p>98.8684</text:p>
          </table:table-cell>
          <table:table-cell table:style-name="ce116" table:formula="of:=(([.G21]-[.C21]))/([.F21])" office:value-type="float" office:value="536.39975270356" calcext:value-type="float">
            <text:p>536.3998</text:p>
          </table:table-cell>
          <table:covered-table-cell table:style-name="ce116"/>
          <table:table-cell table:style-name="ce116" table:formula="of:=(([.G21]-[.C21])*100)/([.D21]-[.C21])" office:value-type="float" office:value="50.2041252980781" calcext:value-type="float">
            <text:p>50.2041</text:p>
          </table:table-cell>
          <table:covered-table-cell table:style-name="ce116"/>
          <table:table-cell table:style-name="ce129" office:value-type="float" office:value="84.7435" calcext:value-type="float">
            <text:p>84.7435</text:p>
          </table:table-cell>
          <table:table-cell table:style-name="ce116" table:formula="of:=([.G21]-[.L21])/[.F21]" office:value-type="float" office:value="520.806779510477" calcext:value-type="float">
            <text:p>520.8068</text:p>
          </table:table-cell>
          <table:covered-table-cell table:style-name="ce116"/>
          <table:table-cell table:style-name="ce116" table:formula="of:=(([.G21]-[.L21])*100)/([.G21]-[.C21])" office:value-type="float" office:value="97.0930312487112" calcext:value-type="float">
            <text:p>97.0930</text:p>
          </table:table-cell>
          <table:covered-table-cell table:style-name="ce116"/>
          <table:table-cell table:style-name="ce116" table:formula="of:=([.L21]-[.C21])/[.F21]" office:value-type="float" office:value="15.5929731930831" calcext:value-type="float">
            <text:p>15.5930</text:p>
          </table:table-cell>
          <table:covered-table-cell table:style-name="ce116"/>
          <table:table-cell table:style-name="ce116" table:formula="of:=(([.L21]-[.C21])*100)/([.G21]-[.C21])" office:value-type="float" office:value="2.90696875128885" calcext:value-type="float">
            <text:p>2.9070</text:p>
          </table:table-cell>
          <table:covered-table-cell table:style-name="ce116"/>
        </table:table-row>
        <table:table-row table:style-name="ro1">
          <table:covered-table-cell table:style-name="ce102"/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77.5887" calcext:value-type="float">
            <text:p>77.5887</text:p>
          </table:table-cell>
          <table:table-cell table:style-name="ce130" table:formula="of:=108.8399" office:value-type="float" office:value="108.8399" calcext:value-type="float">
            <text:p>108.8399</text:p>
          </table:table-cell>
          <table:table-cell table:style-name="ce112" table:formula="of:=[.D22]-[.C22]" office:value-type="float" office:value="31.2512" calcext:value-type="float">
            <text:p>31.2512</text:p>
          </table:table-cell>
          <table:table-cell table:style-name="ce112" table:formula="of:=[.E22]/[.$J$7]" office:value-type="float" office:value="0.0292494385504009" calcext:value-type="float">
            <text:p>0.0292</text:p>
          </table:table-cell>
          <table:table-cell table:style-name="ce130" office:value-type="float" office:value="93.4417" calcext:value-type="float">
            <text:p>93.4417</text:p>
          </table:table-cell>
          <table:table-cell table:style-name="ce112" table:formula="of:=(([.G22]-[.C22]))/([.F22])" office:value-type="float" office:value="541.993309467567" calcext:value-type="float">
            <text:p>541.9933</text:p>
          </table:table-cell>
          <table:covered-table-cell table:style-name="ce112"/>
          <table:table-cell table:style-name="ce112" table:formula="of:=(([.G22]-[.C22])*100)/([.D22]-[.C22])" office:value-type="float" office:value="50.727652058161" calcext:value-type="float">
            <text:p>50.7277</text:p>
          </table:table-cell>
          <table:covered-table-cell table:style-name="ce112"/>
          <table:table-cell table:style-name="ce130" office:value-type="float" office:value="78.1848" calcext:value-type="float">
            <text:p>78.1848</text:p>
          </table:table-cell>
          <table:table-cell table:style-name="ce112" table:formula="of:=([.G22]-[.L22])/[.F22]" office:value-type="float" office:value="521.613431099207" calcext:value-type="float">
            <text:p>521.6134</text:p>
          </table:table-cell>
          <table:covered-table-cell table:style-name="ce112"/>
          <table:table-cell table:style-name="ce112" table:formula="of:=(([.G22]-[.L22])*100)/([.G22]-[.C22])" office:value-type="float" office:value="96.2398284236423" calcext:value-type="float">
            <text:p>96.2398</text:p>
          </table:table-cell>
          <table:covered-table-cell table:style-name="ce112"/>
          <table:table-cell table:style-name="ce112" table:formula="of:=([.L22]-[.C22])/[.F22]" office:value-type="float" office:value="20.3798783683601" calcext:value-type="float">
            <text:p>20.3799</text:p>
          </table:table-cell>
          <table:covered-table-cell table:style-name="ce112"/>
          <table:table-cell table:style-name="ce112" table:formula="of:=(([.L22]-[.C22])*100)/([.G22]-[.C22])" office:value-type="float" office:value="3.76017157635774" calcext:value-type="float">
            <text:p>3.7602</text:p>
          </table:table-cell>
          <table:covered-table-cell table:style-name="ce112"/>
        </table:table-row>
        <table:table-row table:style-name="ro1">
          <table:table-cell/>
          <table:table-cell table:style-name="Default"/>
          <table:table-cell office:value-type="float" office:value="71.7136" calcext:value-type="float">
            <text:p>71.7136</text:p>
          </table:table-cell>
          <table:table-cell office:value-type="float" office:value="94.3466" calcext:value-type="float">
            <text:p>94.3466</text:p>
          </table:table-cell>
          <table:table-cell table:style-name="ce131"/>
          <table:table-cell/>
          <table:table-cell office:value-type="float" office:value="71.7446" calcext:value-type="float">
            <text:p>71.7446</text:p>
          </table:table-cell>
          <table:table-cell table:number-columns-repeated="3"/>
          <table:table-cell table:style-name="ce131"/>
          <table:table-cell office:value-type="float" office:value="71.7204" calcext:value-type="float">
            <text:p>71.720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78.4856" calcext:value-type="float">
            <text:p>78.4856</text:p>
          </table:table-cell>
          <table:table-cell office:value-type="float" office:value="103.4794" calcext:value-type="float">
            <text:p>103.4794</text:p>
          </table:table-cell>
          <table:table-cell table:style-name="ce131"/>
          <table:table-cell/>
          <table:table-cell office:value-type="float" office:value="81.8396" calcext:value-type="float">
            <text:p>81.8396</text:p>
          </table:table-cell>
          <table:table-cell table:number-columns-repeated="3"/>
          <table:table-cell table:style-name="ce131"/>
          <table:table-cell office:value-type="float" office:value="78.4935" calcext:value-type="float">
            <text:p>78.493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73.2435" calcext:value-type="float">
            <text:p>73.2435</text:p>
          </table:table-cell>
          <table:table-cell office:value-type="float" office:value="96.3926" calcext:value-type="float">
            <text:p>96.3926</text:p>
          </table:table-cell>
          <table:table-cell table:number-columns-repeated="2"/>
          <table:table-cell office:value-type="float" office:value="76.1155" calcext:value-type="float">
            <text:p>76.1155</text:p>
          </table:table-cell>
          <table:table-cell table:number-columns-repeated="4"/>
          <table:table-cell office:value-type="float" office:value="73.2506" calcext:value-type="float">
            <text:p>73.2506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13" table:number-rows-spanned="1">
            <text:p>Resultado TOC</text:p>
          </table:table-cell>
          <table:covered-table-cell table:style-name="Default"/>
          <table:covered-table-cell table:number-columns-repeated="11"/>
          <table:table-cell table:number-columns-repeated="7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TOC (mg/L)</text:p>
          </table:table-cell>
          <table:table-cell table:style-name="ce75" office:value-type="string" calcext:value-type="string">
            <text:p>TC (mg/L)</text:p>
          </table:table-cell>
          <table:table-cell table:style-name="ce75" office:value-type="string" calcext:value-type="string">
            <text:p>IC (mg/L)</text:p>
          </table:table-cell>
          <table:table-cell table:style-name="ce75" office:value-type="string" calcext:value-type="string">
            <text:p>TN (mg/L)</text:p>
          </table:table-cell>
          <table:table-cell table:style-name="ce75" office:value-type="string" calcext:value-type="string">
            <text:p>diluicao</text:p>
          </table:table-cell>
          <table:table-cell table:style-name="ce75" office:value-type="string" calcext:value-type="string">
            <text:p>TC (mg/L)</text:p>
          </table:table-cell>
          <table:table-cell table:style-name="ce75" office:value-type="string" calcext:value-type="string">
            <text:p>media TC (mg/L)</text:p>
          </table:table-cell>
          <table:table-cell table:style-name="ce75" office:value-type="string" calcext:value-type="string">
            <text:p>IC (mg/L)</text:p>
          </table:table-cell>
          <table:table-cell table:style-name="ce75" office:value-type="string" calcext:value-type="string">
            <text:p>media IC (mg/L)</text:p>
          </table:table-cell>
          <table:table-cell table:style-name="ce75" office:value-type="string" calcext:value-type="string">
            <text:p>TN (mg/L)</text:p>
          </table:table-cell>
          <table:table-cell table:style-name="ce75" office:value-type="string" calcext:value-type="string">
            <text:p>media TN (mg/L)</text:p>
          </table:table-cell>
          <table:table-cell table:number-columns-repeated="7"/>
        </table:table-row>
        <table:table-row table:style-name="ro1">
          <table:table-cell table:style-name="ce93" office:value-type="string" calcext:value-type="string" table:number-columns-spanned="1" table:number-rows-spanned="2">
            <text:p>RA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5.039" calcext:value-type="float">
            <text:p>5.03900</text:p>
          </table:table-cell>
          <table:table-cell table:style-name="ce117" office:value-type="float" office:value="5.044" calcext:value-type="float">
            <text:p>5.04400</text:p>
          </table:table-cell>
          <table:table-cell table:style-name="ce117" office:value-type="float" office:value="0.00562" calcext:value-type="float">
            <text:p>0.00562</text:p>
          </table:table-cell>
          <table:table-cell table:style-name="ce117" office:value-type="float" office:value="0.6891" calcext:value-type="float">
            <text:p>0.68910</text:p>
          </table:table-cell>
          <table:table-cell table:style-name="ce132" office:value-type="float" office:value="400" calcext:value-type="float">
            <text:p>400</text:p>
          </table:table-cell>
          <table:table-cell table:style-name="ce100" table:formula="of:=[.D28]*[.G28]" office:value-type="float" office:value="2017.6" calcext:value-type="float">
            <text:p>2017.6</text:p>
          </table:table-cell>
          <table:table-cell table:style-name="ce139" table:formula="of:=MEDIAN([.H28:.H29])" office:value-type="float" office:value="1778.6" calcext:value-type="float" table:number-columns-spanned="1" table:number-rows-spanned="2">
            <text:p>1778.6</text:p>
          </table:table-cell>
          <table:table-cell table:style-name="ce100" table:formula="of:=[.E28]*[.G28]" office:value-type="float" office:value="2.248" calcext:value-type="float">
            <text:p>2.248</text:p>
          </table:table-cell>
          <table:table-cell table:style-name="ce139" table:formula="of:=MEDIAN([.J28:.J29])" office:value-type="float" office:value="16.68" calcext:value-type="float" table:number-columns-spanned="1" table:number-rows-spanned="2">
            <text:p>16.68</text:p>
          </table:table-cell>
          <table:table-cell table:style-name="ce100" table:formula="of:=[.F28]*[.G28]" office:value-type="float" office:value="275.64" calcext:value-type="float">
            <text:p>275.64</text:p>
          </table:table-cell>
          <table:table-cell table:style-name="ce139" table:formula="of:=MEDIAN([.L28:.L29])" office:value-type="float" office:value="281.76" calcext:value-type="float" table:number-columns-spanned="1" table:number-rows-spanned="2">
            <text:p>281.76</text:p>
          </table:table-cell>
          <table:table-cell table:number-columns-repeated="7"/>
        </table:table-row>
        <table:table-row table:style-name="ro1">
          <table:covered-table-cell table:style-name="ce93"/>
          <table:table-cell office:value-type="float" office:value="2" calcext:value-type="float">
            <text:p>2</text:p>
          </table:table-cell>
          <table:table-cell table:style-name="ce118" office:value-type="float" office:value="3.927" calcext:value-type="float">
            <text:p>3.92700</text:p>
          </table:table-cell>
          <table:table-cell table:style-name="ce118" office:value-type="float" office:value="3.849" calcext:value-type="float">
            <text:p>3.84900</text:p>
          </table:table-cell>
          <table:table-cell table:style-name="ce118" office:value-type="float" office:value="0.07778" calcext:value-type="float">
            <text:p>0.07778</text:p>
          </table:table-cell>
          <table:table-cell table:style-name="ce118" office:value-type="float" office:value="0.7197" calcext:value-type="float">
            <text:p>0.71970</text:p>
          </table:table-cell>
          <table:table-cell table:style-name="ce133" office:value-type="float" office:value="400" calcext:value-type="float">
            <text:p>400</text:p>
          </table:table-cell>
          <table:table-cell table:style-name="ce136" table:formula="of:=[.D29]*[.G29]" office:value-type="float" office:value="1539.6" calcext:value-type="float">
            <text:p>1539.6</text:p>
          </table:table-cell>
          <table:covered-table-cell table:style-name="ce136"/>
          <table:table-cell table:style-name="ce136" table:formula="of:=[.E29]*[.G29]" office:value-type="float" office:value="31.112" calcext:value-type="float">
            <text:p>31.112</text:p>
          </table:table-cell>
          <table:covered-table-cell table:style-name="ce136"/>
          <table:table-cell table:style-name="ce136" table:formula="of:=[.F29]*[.G29]" office:value-type="float" office:value="287.88" calcext:value-type="float">
            <text:p>287.88</text:p>
          </table:table-cell>
          <table:covered-table-cell table:style-name="ce136"/>
          <table:table-cell table:number-columns-repeated="7"/>
        </table:table-row>
        <table:table-row table:style-name="ro1">
          <table:table-cell table:style-name="ce94" office:value-type="string" calcext:value-type="string" table:number-columns-spanned="1" table:number-rows-spanned="2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19" office:value-type="float" office:value="8.808" calcext:value-type="float">
            <text:p>8.80800</text:p>
          </table:table-cell>
          <table:table-cell table:style-name="ce119" office:value-type="float" office:value="8.812" calcext:value-type="float">
            <text:p>8.81200</text:p>
          </table:table-cell>
          <table:table-cell table:style-name="ce119" office:value-type="float" office:value="0.00431" calcext:value-type="float">
            <text:p>0.00431</text:p>
          </table:table-cell>
          <table:table-cell table:style-name="ce119" office:value-type="float" office:value="0.5875" calcext:value-type="float">
            <text:p>0.58750</text:p>
          </table:table-cell>
          <table:table-cell table:style-name="ce134" office:value-type="float" office:value="800" calcext:value-type="float">
            <text:p>800</text:p>
          </table:table-cell>
          <table:table-cell table:style-name="ce103" table:formula="of:=[.D30]*[.G30]" office:value-type="float" office:value="7049.6" calcext:value-type="float">
            <text:p>7049.6</text:p>
          </table:table-cell>
          <table:table-cell table:style-name="ce94" table:formula="of:=MEDIAN([.H30:.H31])" office:value-type="float" office:value="5523.2" calcext:value-type="float" table:number-columns-spanned="1" table:number-rows-spanned="2">
            <text:p>5523.2</text:p>
          </table:table-cell>
          <table:table-cell table:style-name="ce103" table:formula="of:=[.E30]*[.G30]" office:value-type="float" office:value="3.448" calcext:value-type="float">
            <text:p>3.448</text:p>
          </table:table-cell>
          <table:table-cell table:style-name="ce94" table:formula="of:=MEDIAN([.J30:.J31])" office:value-type="float" office:value="3.228" calcext:value-type="float" table:number-columns-spanned="1" table:number-rows-spanned="2">
            <text:p>3.228</text:p>
          </table:table-cell>
          <table:table-cell table:style-name="ce103" table:formula="of:=[.F30]*[.G30]" office:value-type="float" office:value="470" calcext:value-type="float">
            <text:p>470</text:p>
          </table:table-cell>
          <table:table-cell table:style-name="ce94" table:formula="of:=MEDIAN([.L30:.L31])" office:value-type="float" office:value="488.6" calcext:value-type="float" table:number-columns-spanned="1" table:number-rows-spanned="2">
            <text:p>488.6</text:p>
          </table:table-cell>
          <table:table-cell table:number-columns-repeated="7"/>
        </table:table-row>
        <table:table-row table:style-name="ro1">
          <table:covered-table-cell table:style-name="ce95"/>
          <table:table-cell table:style-name="ce104" office:value-type="float" office:value="2" calcext:value-type="float">
            <text:p>2</text:p>
          </table:table-cell>
          <table:table-cell table:style-name="ce120" office:value-type="float" office:value="4.992" calcext:value-type="float">
            <text:p>4.99200</text:p>
          </table:table-cell>
          <table:table-cell table:style-name="ce120" office:value-type="float" office:value="4.996" calcext:value-type="float">
            <text:p>4.99600</text:p>
          </table:table-cell>
          <table:table-cell table:style-name="ce120" office:value-type="float" office:value="0.00376" calcext:value-type="float">
            <text:p>0.00376</text:p>
          </table:table-cell>
          <table:table-cell table:style-name="ce120" office:value-type="float" office:value="0.634" calcext:value-type="float">
            <text:p>0.63400</text:p>
          </table:table-cell>
          <table:table-cell table:style-name="ce135" office:value-type="float" office:value="800" calcext:value-type="float">
            <text:p>800</text:p>
          </table:table-cell>
          <table:table-cell table:style-name="ce104" table:formula="of:=[.D31]*[.G31]" office:value-type="float" office:value="3996.8" calcext:value-type="float">
            <text:p>3996.8</text:p>
          </table:table-cell>
          <table:covered-table-cell table:style-name="ce104"/>
          <table:table-cell table:style-name="ce104" table:formula="of:=[.E31]*[.G31]" office:value-type="float" office:value="3.008" calcext:value-type="float">
            <text:p>3.008</text:p>
          </table:table-cell>
          <table:covered-table-cell table:style-name="ce104"/>
          <table:table-cell table:style-name="ce104" table:formula="of:=[.F31]*[.G31]" office:value-type="float" office:value="507.2" calcext:value-type="float">
            <text:p>507.2</text:p>
          </table:table-cell>
          <table:covered-table-cell table:style-name="ce104"/>
          <table:table-cell table:number-columns-repeated="7"/>
        </table:table-row>
      </table:table>
      <table:table table:name="COV" table:style-name="ta1">
        <table:table-column table:style-name="co1" table:default-cell-style-name="ce147"/>
        <table:table-column table:style-name="co9" table:default-cell-style-name="ce147"/>
        <table:table-column table:style-name="co1" table:number-columns-repeated="3" table:default-cell-style-name="ce147"/>
        <table:table-column table:style-name="co10" table:default-cell-style-name="ce147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142" office:value-type="string" calcext:value-type="string">
            <text:p>Substrato</text:p>
          </table:table-cell>
          <table:table-cell table:style-name="ce142" office:value-type="string" calcext:value-type="string">
            <text:p>Densidade (g/L)</text:p>
          </table:table-cell>
          <table:table-cell table:style-name="ce142" office:value-type="string" calcext:value-type="string">
            <text:p>TC (g/L)</text:p>
          </table:table-cell>
          <table:table-cell table:style-name="ce142" office:value-type="string" calcext:value-type="string">
            <text:p>TN (g/L)</text:p>
          </table:table-cell>
          <table:table-cell table:style-name="ce142" office:value-type="string" calcext:value-type="string">
            <text:p>TS (g/L)</text:p>
          </table:table-cell>
          <table:table-cell table:style-name="ce142" office:value-type="string" calcext:value-type="string">
            <text:p>VS (g/L)</text:p>
          </table:table-cell>
          <table:table-cell table:number-columns-repeated="2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/>
          <table:table-cell table:style-name="ce60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>
            <draw:custom-shape draw:z-index="0" draw:name="CaixaDeTexto 5" draw:style-name="gr1" draw:text-style-name="P3" svg:width="7.5146in" svg:height="13.6461in" svg:x="0.2016in" svg:y="0in">
              <text:p text:style-name="P1"><text:span text:style-name="T1">Equação C/N Modificada</text:span></text:p>
              <text:p text:style-name="P1"><text:span text:style-name="T1">Ref: Response Surface Methodology to Optimize Methane </text:span><text:span text:style-name="T1">Production from Mesophilic Anaerobic Co-Digestion of Oily-</text:span><text:span text:style-name="T1">Biological Sludge and Sugarcane Bagasse; <text:s/>Aiban Abdulhakim Saeed </text:span><text:span text:style-name="T1">Ghaleb et. al.; Sustainability 2020, 12, 2116; </text:span><text:span text:style-name="T1">doi:10.3390/su12052116</text:span></text:p>
              <text:p text:style-name="P1"><text:span text:style-name="T1"/></text:p>
              <text:p text:style-name="P1"><text:span text:style-name="T1">R = [𝑄1(𝐶1*(100−𝑀1)+𝑄2(𝐶2*(100−𝑀2)] / </text:span><text:span text:style-name="T1">[𝑄1(𝑁1*(100−𝑀1)+𝑄2(𝑁2*(100−𝑀2)]</text:span></text:p>
              <text:p text:style-name="P1"><text:span text:style-name="T1">R= C/N ratio;</text:span></text:p>
              <text:p text:style-name="P1"><text:span text:style-name="T1">Q1, Q2= mass of materials “as is” or wet weight;</text:span></text:p>
              <text:p text:style-name="P1"><text:span text:style-name="T1">C1, C2= carbon content of materials (%);</text:span></text:p>
              <text:p text:style-name="P1"><text:span text:style-name="T1">N1, N2= nitrogen content of materials (%);</text:span></text:p>
              <text:p text:style-name="P1"><text:span text:style-name="T1">M1, M2= moisture content of materials.</text:span></text:p>
              <text:p text:style-name="P1"><text:span text:style-name="T1"/></text:p>
              <text:p text:style-name="P2"><text:span text:style-name="T1">C×(100−M) = TC</text:span></text:p>
              <text:p text:style-name="P2"><text:span text:style-name="T1">N×(100−M) = TN</text:span></text:p>
              <text:p text:style-name="P2"><text:span text:style-name="T1"/></text:p>
              <text:p text:style-name="P2"><text:span text:style-name="T1">R​ = [TC1*​V1​+TC2*​V2​+…​] / [TN1​*V1​+TN2*​V2​+…]</text:span></text:p>
              <text:p text:style-name="P2"><text:span text:style-name="T1">TC1*​V1​+TC2*​V2​=R(TN1*​V1​+TN2*​V2​)</text:span></text:p>
              <text:p text:style-name="P2"><text:span text:style-name="T1">TC1*​V1​−R*​TN1*​V1​=R*​TN2*​V2​−TC2*​V2</text:span></text:p>
              <text:p text:style-name="P2"><text:span text:style-name="T1">V1​(TC1​−R*​TN1​)=V2​(R*​TN2​−TC2​)</text:span></text:p>
              <text:p text:style-name="P2"><text:span text:style-name="T1">V1/V2 = [R*TN2-TC2] / [TC1-R*TN1]</text:span></text:p>
              <text:p text:style-name="P2"><text:span text:style-name="T1"/></text:p>
              <text:p text:style-name="P2"><text:span text:style-name="T1">V1/V2 = VR</text:span></text:p>
              <text:p text:style-name="P2"><text:span text:style-name="T1">V1 = VR*V2</text:span></text:p>
              <text:p text:style-name="P2"><text:span text:style-name="T1">V2 = V1/VR</text:span></text:p>
              <text:p text:style-name="P2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43" office:value-type="string" calcext:value-type="string">
            <text:p>RA</text:p>
          </table:table-cell>
          <table:table-cell table:style-name="ce148" table:formula="of:=[$Caracterizacao.J3]" office:value-type="float" office:value="1068.43760252525" calcext:value-type="float">
            <text:p>1068.4376</text:p>
          </table:table-cell>
          <table:table-cell table:style-name="ce143" table:formula="of:=[$Caracterizacao.I28]/1000" office:value-type="float" office:value="1.7786" calcext:value-type="float">
            <text:p>1.7786</text:p>
          </table:table-cell>
          <table:table-cell table:style-name="ce150" table:formula="of:=[$Caracterizacao.M28]/1000" office:value-type="float" office:value="0.28176" calcext:value-type="float">
            <text:p>0.28176</text:p>
          </table:table-cell>
          <table:table-cell table:style-name="ce195" table:formula="of:=[$Caracterizacao.I14]" office:value-type="float" office:value="536.39975270356" calcext:value-type="float">
            <text:p>536.3998</text:p>
          </table:table-cell>
          <table:table-cell table:style-name="ce148" table:formula="of:=[$Caracterizacao.N14]" office:value-type="float" office:value="520.806779510477" calcext:value-type="float">
            <text:p>520.8068</text:p>
          </table:table-cell>
          <table:table-cell table:number-columns-repeated="2"/>
          <table:table-cell table:style-name="ce51" office:value-type="string" calcext:value-type="string">
            <text:p>Substrato</text:p>
          </table:table-cell>
          <table:table-cell table:style-name="ce196" table:content-validation-name="val1" office:value-type="string" calcext:value-type="string">
            <text:p>GL – BIO</text:p>
          </table:table-cell>
          <table:table-cell table:style-name="ce202" table:content-validation-name="val1" office:value-type="string" calcext:value-type="string">
            <text:p>GL – PURO</text:p>
          </table:table-cell>
          <table:table-cell/>
          <table:table-cell table:style-name="ce61"/>
          <table:table-cell table:style-name="ce51" office:value-type="string" calcext:value-type="string">
            <text:p>Diluicao</text:p>
          </table:table-cell>
          <table:table-cell table:style-name="ce196" office:value-type="float" office:value="1" calcext:value-type="float">
            <text:p>1</text:p>
          </table:table-cell>
          <table:table-cell table:style-name="ce20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44" office:value-type="string" calcext:value-type="string">
            <text:p>GL – BIO</text:p>
          </table:table-cell>
          <table:table-cell table:style-name="ce149" table:formula="of:=[$Caracterizacao.J5]" office:value-type="float" office:value="893.074035663281" calcext:value-type="float">
            <text:p>893.0740</text:p>
          </table:table-cell>
          <table:table-cell table:style-name="ce144" table:formula="of:=[$Caracterizacao.I30]/1000" office:value-type="float" office:value="5.5232" calcext:value-type="float">
            <text:p>5.5232</text:p>
          </table:table-cell>
          <table:table-cell table:style-name="ce144" table:formula="of:=[$Caracterizacao.M30]/1000" office:value-type="float" office:value="0.4886" calcext:value-type="float">
            <text:p>0.4886</text:p>
          </table:table-cell>
          <table:table-cell table:style-name="ce149" table:formula="of:=[$Caracterizacao.I17]" office:value-type="float" office:value="867.723994290837" calcext:value-type="float">
            <text:p>867.7240</text:p>
          </table:table-cell>
          <table:table-cell table:style-name="ce149" table:formula="of:=[$Caracterizacao.N17]" office:value-type="float" office:value="868.654816122481" calcext:value-type="float">
            <text:p>868.6548</text:p>
          </table:table-cell>
          <table:table-cell table:number-columns-repeated="2"/>
          <table:table-cell table:style-name="ce48" office:value-type="string" calcext:value-type="string">
            <text:p>Densidade (g/L)</text:p>
          </table:table-cell>
          <table:table-cell table:style-name="ce54" table:formula="of:=INDEX([.$B$2:.$B$100];MATCH([.$J$2];[.$A$2:.$A$100];0))" office:value-type="float" office:value="893.074035663281" calcext:value-type="float">
            <text:p>893.074036</text:p>
          </table:table-cell>
          <table:table-cell table:style-name="ce58" table:formula="of:=INDEX([.$B$2:.$B$100];MATCH([.$K$2];[.$A$2:.$A$100];0))" office:value-type="float" office:value="1260" calcext:value-type="float">
            <text:p>1260.000000</text:p>
          </table:table-cell>
          <table:table-cell/>
          <table:table-cell table:style-name="ce61"/>
          <table:table-cell table:style-name="ce48" office:value-type="string" calcext:value-type="string">
            <text:p>Densidade ajustada (g/L)</text:p>
          </table:table-cell>
          <table:table-cell table:style-name="ce54" table:formula="of:=[.J3]" office:value-type="float" office:value="893.074035663281" calcext:value-type="float">
            <text:p>893.074036</text:p>
          </table:table-cell>
          <table:table-cell table:style-name="ce58" table:formula="of:=[.K3]" office:value-type="float" office:value="1260" calcext:value-type="float">
            <text:p>1260.00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 – PURO</text:p>
          </table:table-cell>
          <table:table-cell table:style-name="ce145" office:value-type="float" office:value="1260" calcext:value-type="float">
            <text:p>1260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00" calcext:value-type="float">
            <text:p>1000</text:p>
          </table:table-cell>
          <table:table-cell table:number-columns-repeated="2"/>
          <table:table-cell table:style-name="ce48" office:value-type="string" calcext:value-type="string">
            <text:p>TC (g/L)</text:p>
          </table:table-cell>
          <table:table-cell table:style-name="ce54" table:formula="of:=INDEX([.$C$2:.$C$100];MATCH([.$J$2];[.$A$2:.$A$100];0))" office:value-type="float" office:value="5.5232" calcext:value-type="float">
            <text:p>5.523200</text:p>
          </table:table-cell>
          <table:table-cell table:style-name="ce58" table:formula="of:=INDEX([.$C$2:.$C$100];MATCH([.$K$2];[.$A$2:.$A$100];0))" office:value-type="float" office:value="493" calcext:value-type="float">
            <text:p>493.000000</text:p>
          </table:table-cell>
          <table:table-cell/>
          <table:table-cell table:style-name="ce61"/>
          <table:table-cell table:style-name="ce48" office:value-type="string" calcext:value-type="string">
            <text:p>TC ajustado (g/L)</text:p>
          </table:table-cell>
          <table:table-cell table:style-name="ce54" table:formula="of:=[.J4]/[.$O$2]" office:value-type="float" office:value="5.5232" calcext:value-type="float">
            <text:p>5.523200</text:p>
          </table:table-cell>
          <table:table-cell table:style-name="ce58" table:formula="of:=[.K4]/[.$P$2]" office:value-type="float" office:value="4.93" calcext:value-type="float">
            <text:p>4.93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ucose</text:p>
          </table:table-cell>
          <table:table-cell table:style-name="ce145" office:value-type="float" office:value="1540" calcext:value-type="float">
            <text:p>1540</text:p>
          </table:table-cell>
          <table:table-cell table:style-name="ce145" office:value-type="float" office:value="616" calcext:value-type="float">
            <text:p>61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540" calcext:value-type="float">
            <text:p>1540</text:p>
          </table:table-cell>
          <table:table-cell table:number-columns-repeated="2"/>
          <table:table-cell table:style-name="ce48" office:value-type="string" calcext:value-type="string">
            <text:p>TN (g/L)</text:p>
          </table:table-cell>
          <table:table-cell table:style-name="ce54" table:formula="of:=INDEX([.$D$2:.$D$100];MATCH([.$J$2];[.$A$2:.$A$100];0))" office:value-type="float" office:value="0.4886" calcext:value-type="float">
            <text:p>0.488600</text:p>
          </table:table-cell>
          <table:table-cell table:style-name="ce58" table:formula="of:=INDEX([.$D$2:.$D$100];MATCH([.$K$2];[.$A$2:.$A$100];0))" office:value-type="float" office:value="0" calcext:value-type="float">
            <text:p>0.000000</text:p>
          </table:table-cell>
          <table:table-cell table:number-columns-repeated="2"/>
          <table:table-cell table:style-name="ce48" office:value-type="string" calcext:value-type="string">
            <text:p>TN ajustado (g/L)</text:p>
          </table:table-cell>
          <table:table-cell table:style-name="ce54" table:formula="of:=[.J5]/[.$O$2]" office:value-type="float" office:value="0.4886" calcext:value-type="float">
            <text:p>0.488600</text:p>
          </table:table-cell>
          <table:table-cell table:style-name="ce58" table:formula="of:=[.K5]/[.$P$2]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8" office:value-type="string" calcext:value-type="string">
            <text:p>TS (g/L)</text:p>
          </table:table-cell>
          <table:table-cell table:style-name="ce54" table:formula="of:=INDEX([.$E$2:.$E$100];MATCH([.$J$2];[.$A$2:.$A$100];0))" office:value-type="float" office:value="867.723994290837" calcext:value-type="float">
            <text:p>867.723994</text:p>
          </table:table-cell>
          <table:table-cell table:style-name="ce58" table:formula="of:=INDEX([.$E$2:.$E$100];MATCH([.$K$2];[.$A$2:.$A$100];0))" office:value-type="float" office:value="1000" calcext:value-type="float">
            <text:p>1000.000000</text:p>
          </table:table-cell>
          <table:table-cell table:number-columns-repeated="2"/>
          <table:table-cell table:style-name="ce48" office:value-type="string" calcext:value-type="string">
            <text:p>TS ajustado (g/L)</text:p>
          </table:table-cell>
          <table:table-cell table:style-name="ce54" table:formula="of:=[.J6]/[.$O$2]" office:value-type="float" office:value="867.723994290837" calcext:value-type="float">
            <text:p>867.723994</text:p>
          </table:table-cell>
          <table:table-cell table:style-name="ce58" table:formula="of:=[.K6]/[.$P$2]" office:value-type="float" office:value="10" calcext:value-type="float">
            <text:p>1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9" office:value-type="string" calcext:value-type="string">
            <text:p>VS (g/L)</text:p>
          </table:table-cell>
          <table:table-cell table:style-name="ce55" table:formula="of:=INDEX([.$F$2:.$F$100];MATCH([.$J$2];[.$A$2:.$A$100];0))" office:value-type="float" office:value="868.654816122481" calcext:value-type="float">
            <text:p>868.654816</text:p>
          </table:table-cell>
          <table:table-cell table:style-name="ce59" table:formula="of:=INDEX([.$F$2:.$F$100];MATCH([.$K$2];[.$A$2:.$A$100];0))" office:value-type="float" office:value="1000" calcext:value-type="float">
            <text:p>1000.000000</text:p>
          </table:table-cell>
          <table:table-cell table:number-columns-repeated="2"/>
          <table:table-cell table:style-name="ce49" office:value-type="string" calcext:value-type="string">
            <text:p>VS ajustado (g/L)</text:p>
          </table:table-cell>
          <table:table-cell table:style-name="ce55" table:formula="of:=[.J7]/[.$O$2]" office:value-type="float" office:value="868.654816122481" calcext:value-type="float">
            <text:p>868.654816</text:p>
          </table:table-cell>
          <table:table-cell table:style-name="ce59" table:formula="of:=[.K7]/[.$P$2]" office:value-type="float" office:value="10" calcext:value-type="float">
            <text:p>10.000000</text:p>
          </table:table-cell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8" table:number-rows-spanned="1">
            <text:p>C/N Calculation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 table:number-columns-spanned="2" table:number-rows-spanned="1">
            <text:p>Proporcao</text:p>
          </table:table-cell>
          <table:covered-table-cell table:style-name="ce174"/>
          <table:table-cell table:number-columns-repeated="7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4" office:value-type="string" calcext:value-type="string">
            <text:p>C</text:p>
          </table:table-cell>
          <table:table-cell table:style-name="ce17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N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Volume Ratio Parts</text:p>
          </table:table-cell>
          <table:table-cell table:number-columns-repeated="5"/>
        </table:table-row>
        <table:table-row table:style-name="ro2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C/N</text:p>
          </table:table-cell>
          <table:table-cell table:style-name="ce177" table:formula="of:=[.J13]/[.J14]" office:value-type="float" office:value="25" calcext:value-type="float">
            <text:p>25.0000</text:p>
          </table:table-cell>
          <table:table-cell/>
          <table:table-cell table:style-name="ce48" table:formula="of:=(([.J15]*[.P5])-[.P4])" office:value-type="float" office:value="-4.93" calcext:value-type="float">
            <text:p>-4.93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26" office:value-type="string" calcext:value-type="string">
            <text:p>Volume Ratio (L)</text:p>
          </table:table-cell>
          <table:table-cell table:style-name="ce178" table:formula="of:=(([.J15]*[.P5])-[.P4])/([.O4]-([.J15]*[.O5]))" office:value-type="float" office:value="0.736722555964016" calcext:value-type="float">
            <text:p>0.7367</text:p>
          </table:table-cell>
          <table:table-cell/>
          <table:table-cell table:style-name="ce49" table:formula="of:=([.O4]-([.J15]*[.O5]))" office:value-type="float" office:value="-6.6918" calcext:value-type="float">
            <text:p>-6.6918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27" office:value-type="string" calcext:value-type="string">
            <text:p>-</text:p>
          </table:table-cell>
          <table:table-cell table:style-name="ce262" office:value-type="string" calcext:value-type="string">
            <text:p>Volume (L)</text:p>
          </table:table-cell>
          <table:table-cell table:style-name="ce262" office:value-type="string" calcext:value-type="string">
            <text:p>From V Ratio (L)</text:p>
          </table:table-cell>
          <table:table-cell table:style-name="ce262" office:value-type="string" calcext:value-type="string">
            <text:p>Volume (mL)</text:p>
          </table:table-cell>
          <table:table-cell table:style-name="ce187" office:value-type="string" calcext:value-type="string" table:number-columns-spanned="2" table:number-rows-spanned="1">
            <text:p>Quantidade Carbono (g)</text:p>
          </table:table-cell>
          <table:covered-table-cell table:style-name="ce187"/>
          <table:table-cell table:style-name="ce225" office:value-type="string" calcext:value-type="string" table:number-columns-spanned="2" table:number-rows-spanned="1">
            <text:p>Concentracao Carbono (g/L)</text:p>
          </table:table-cell>
          <table:covered-table-cell table:style-name="ce99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0" office:value-type="string" calcext:value-type="string">
            <text:p>Sub 1</text:p>
          </table:table-cell>
          <table:table-cell table:style-name="ce159" office:value-type="string" calcext:value-type="string">
            <text:p>-</text:p>
          </table:table-cell>
          <table:table-cell table:style-name="ce159" table:formula="of:=[.J16]*[.J20]" office:value-type="float" office:value="0.736722555964016" calcext:value-type="float">
            <text:p>0.736723</text:p>
          </table:table-cell>
          <table:table-cell table:style-name="ce159" table:formula="of:=[.K19]*1000" office:value-type="float" office:value="736.722555964015" calcext:value-type="float">
            <text:p>736.722556</text:p>
          </table:table-cell>
          <table:table-cell table:style-name="ce159" table:formula="of:=[.K19]*[.O4]" office:value-type="float" office:value="4.06906602110045" calcext:value-type="float" table:number-columns-spanned="2" table:number-rows-spanned="1">
            <text:p>4.069066</text:p>
          </table:table-cell>
          <table:covered-table-cell table:style-name="ce159"/>
          <table:table-cell table:style-name="ce312" office:value-type="string" calcext:value-type="string" table:number-columns-spanned="2" table:number-rows-spanned="1">
            <text:p>-</text:p>
          </table:table-cell>
          <table:covered-table-cell table:style-name="ce312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1" office:value-type="string" calcext:value-type="string">
            <text:p>Sub 2</text:p>
          </table:table-cell>
          <table:table-cell table:style-name="ce264" office:value-type="float" office:value="1" calcext:value-type="float">
            <text:p>1</text:p>
          </table:table-cell>
          <table:table-cell table:style-name="ce401" office:value-type="string" calcext:value-type="string">
            <text:p>-</text:p>
          </table:table-cell>
          <table:table-cell table:style-name="ce401" table:formula="of:=[.J20]*1000" office:value-type="float" office:value="1000" calcext:value-type="float">
            <text:p>1000.000000</text:p>
          </table:table-cell>
          <table:table-cell table:style-name="ce300" table:formula="of:=[.J20]*[.P4]" office:value-type="float" office:value="4.93" calcext:value-type="float" table:number-columns-spanned="2" table:number-rows-spanned="1">
            <text:p>4.930000</text:p>
          </table:table-cell>
          <table:covered-table-cell table:style-name="ce300"/>
          <table:table-cell table:style-name="ce306" office:value-type="string" calcext:value-type="string" table:number-columns-spanned="2" table:number-rows-spanned="1">
            <text:p>-</text:p>
          </table:table-cell>
          <table:covered-table-cell table:style-name="ce306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2" office:value-type="string" calcext:value-type="string">
            <text:p>Mistura </text:p>
          </table:table-cell>
          <table:table-cell table:style-name="ce358" table:formula="of:=[.J20]+[.K19]" office:value-type="float" office:value="1.73672255596402" calcext:value-type="float">
            <text:p>1.736723</text:p>
          </table:table-cell>
          <table:table-cell table:style-name="ce358" office:value-type="string" calcext:value-type="string">
            <text:p>-</text:p>
          </table:table-cell>
          <table:table-cell table:style-name="ce358" table:formula="of:=[.J21]*1000" office:value-type="float" office:value="1736.72255596402" calcext:value-type="float">
            <text:p>1736.722556</text:p>
          </table:table-cell>
          <table:table-cell table:style-name="ce358" table:formula="of:=[.M19]+[.M20]" office:value-type="float" office:value="8.99906602110045" calcext:value-type="float" table:number-columns-spanned="2" table:number-rows-spanned="1">
            <text:p>8.999066</text:p>
          </table:table-cell>
          <table:covered-table-cell table:style-name="ce358"/>
          <table:table-cell table:style-name="ce320" table:formula="of:=[.M21]/[.J21]" office:value-type="float" office:value="5.18163709580272" calcext:value-type="float" table:number-columns-spanned="2" table:number-rows-spanned="1">
            <text:p>5.181637</text:p>
          </table:table-cell>
          <table:covered-table-cell table:style-name="ce320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3" office:value-type="string" calcext:value-type="string">
            <text:p>Sub 1</text:p>
          </table:table-cell>
          <table:table-cell table:style-name="ce266" office:value-type="float" office:value="1" calcext:value-type="float">
            <text:p>1</text:p>
          </table:table-cell>
          <table:table-cell table:style-name="ce171" office:value-type="string" calcext:value-type="string">
            <text:p>-</text:p>
          </table:table-cell>
          <table:table-cell table:style-name="ce171" table:formula="of:=[.J22]*1000" office:value-type="float" office:value="1000" calcext:value-type="float">
            <text:p>1000.000000</text:p>
          </table:table-cell>
          <table:table-cell table:style-name="ce171" table:formula="of:=[.J22]*[.O3]" office:value-type="float" office:value="893.074035663281" calcext:value-type="float" table:number-columns-spanned="2" table:number-rows-spanned="1">
            <text:p>893.074036</text:p>
          </table:table-cell>
          <table:covered-table-cell table:style-name="ce171"/>
          <table:table-cell table:style-name="ce313" office:value-type="string" calcext:value-type="string" table:number-columns-spanned="2" table:number-rows-spanned="1">
            <text:p>-</text:p>
          </table:table-cell>
          <table:covered-table-cell table:style-name="ce313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4" office:value-type="string" calcext:value-type="string">
            <text:p>Sub 2</text:p>
          </table:table-cell>
          <table:table-cell table:style-name="ce360" office:value-type="string" calcext:value-type="string">
            <text:p>-</text:p>
          </table:table-cell>
          <table:table-cell table:style-name="ce360" table:formula="of:=[.J22]/[.J16]" office:value-type="float" office:value="1.3573630831643" calcext:value-type="float">
            <text:p>1.357363</text:p>
          </table:table-cell>
          <table:table-cell table:style-name="ce360" table:formula="of:=[.K23]*1000" office:value-type="float" office:value="1357.3630831643" calcext:value-type="float">
            <text:p>1357.363083</text:p>
          </table:table-cell>
          <table:table-cell table:style-name="ce301" table:formula="of:=[.K23]*[.P3]" office:value-type="float" office:value="1710.27748478702" calcext:value-type="float" table:number-columns-spanned="2" table:number-rows-spanned="1">
            <text:p>1710.277485</text:p>
          </table:table-cell>
          <table:covered-table-cell table:style-name="ce301"/>
          <table:table-cell table:style-name="ce308" office:value-type="string" calcext:value-type="string" table:number-columns-spanned="2" table:number-rows-spanned="1">
            <text:p>-</text:p>
          </table:table-cell>
          <table:covered-table-cell table:style-name="ce308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5" office:value-type="string" calcext:value-type="string">
            <text:p>Mistura </text:p>
          </table:table-cell>
          <table:table-cell table:style-name="ce361" table:formula="of:=[.J22]+[.K23]" office:value-type="float" office:value="2.3573630831643" calcext:value-type="float">
            <text:p>2.357363</text:p>
          </table:table-cell>
          <table:table-cell table:style-name="ce361" office:value-type="string" calcext:value-type="string">
            <text:p>-</text:p>
          </table:table-cell>
          <table:table-cell table:style-name="ce361" table:formula="of:=[.J24]*1000" office:value-type="float" office:value="2357.3630831643" calcext:value-type="float">
            <text:p>2357.363083</text:p>
          </table:table-cell>
          <table:table-cell table:style-name="ce361" table:formula="of:=[.M22]+[.M23]" office:value-type="float" office:value="2603.3515204503" calcext:value-type="float" table:number-columns-spanned="2" table:number-rows-spanned="1">
            <text:p>2603.351520</text:p>
          </table:table-cell>
          <table:covered-table-cell table:style-name="ce361"/>
          <table:table-cell table:style-name="ce321" table:formula="of:=[.M24]/[.J24]" office:value-type="float" office:value="1104.34898172572" calcext:value-type="float" table:number-columns-spanned="2" table:number-rows-spanned="1">
            <text:p>1104.348982</text:p>
          </table:table-cell>
          <table:covered-table-cell table:style-name="ce321"/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8" table:number-rows-spanned="1">
            <text:p>Calculo ST e SV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87" office:value-type="string" calcext:value-type="string">
            <text:p>Mass (g)</text:p>
          </table:table-cell>
          <table:table-cell table:style-name="ce187" office:value-type="string" calcext:value-type="string">
            <text:p>Total Mass (g)</text:p>
          </table:table-cell>
          <table:table-cell table:style-name="ce187" office:value-type="string" calcext:value-type="string">
            <text:p>TS (g)</text:p>
          </table:table-cell>
          <table:table-cell table:style-name="ce187" office:value-type="string" calcext:value-type="string">
            <text:p>TS %</text:p>
          </table:table-cell>
          <table:table-cell table:style-name="ce187" office:value-type="string" calcext:value-type="string">
            <text:p>VS (g)</text:p>
          </table:table-cell>
          <table:table-cell table:style-name="ce187" office:value-type="string" calcext:value-type="string">
            <text:p>VS %</text:p>
          </table:table-cell>
          <table:table-cell table:style-name="ce99" office:value-type="string" calcext:value-type="string">
            <text:p>VS/TS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7" office:value-type="string" calcext:value-type="string">
            <text:p>Sub 1</text:p>
          </table:table-cell>
          <table:table-cell table:style-name="ce159" table:formula="of:=[.K19]*[.O3]" office:value-type="float" office:value="657.947786218951" calcext:value-type="float">
            <text:p>657.947786</text:p>
          </table:table-cell>
          <table:table-cell table:style-name="ce282" table:formula="of:=[.J30]+[.J31]" office:value-type="float" office:value="1917.94778621895" calcext:value-type="float" table:number-columns-spanned="1" table:number-rows-spanned="2">
            <text:p>1917.947786</text:p>
          </table:table-cell>
          <table:table-cell table:style-name="ce282" table:formula="of:=([.$O$6]*[.K19])+([.$P$6]*[.J20])" office:value-type="float" office:value="649.27183894525" calcext:value-type="float" table:number-columns-spanned="1" table:number-rows-spanned="2">
            <text:p>649.271839</text:p>
          </table:table-cell>
          <table:table-cell table:style-name="ce282" table:formula="of:=([.L30]/[.K30])*100" office:value-type="float" office:value="33.8524251603964" calcext:value-type="float" table:number-columns-spanned="1" table:number-rows-spanned="2">
            <text:p>33.852425</text:p>
          </table:table-cell>
          <table:table-cell table:style-name="ce282" table:formula="of:=([.$O$7]*[.K19])+([.$P$7]*[.J20])" office:value-type="float" office:value="649.957596384206" calcext:value-type="float" table:number-columns-spanned="1" table:number-rows-spanned="2">
            <text:p>649.957596</text:p>
          </table:table-cell>
          <table:table-cell table:style-name="ce282" table:formula="of:=([.N30]/[.K30])*100" office:value-type="float" office:value="33.8881799105457" calcext:value-type="float" table:number-columns-spanned="1" table:number-rows-spanned="2">
            <text:p>33.888180</text:p>
          </table:table-cell>
          <table:table-cell table:style-name="ce331" table:formula="of:=[.N30]/[.L30]" office:value-type="float" office:value="1.00105619464425" calcext:value-type="float" table:number-columns-spanned="1" table:number-rows-spanned="2">
            <text:p>1.001056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8" office:value-type="string" calcext:value-type="string">
            <text:p>Sub 2</text:p>
          </table:table-cell>
          <table:table-cell table:style-name="ce358" table:formula="of:=[.J20]*[.P3]" office:value-type="float" office:value="1260" calcext:value-type="float">
            <text:p>1260.000000</text:p>
          </table:table-cell>
          <table:covered-table-cell table:number-columns-repeated="5" table:style-name="ce358"/>
          <table:covered-table-cell table:style-name="ce320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9" office:value-type="string" calcext:value-type="string">
            <text:p>Sub 1</text:p>
          </table:table-cell>
          <table:table-cell table:style-name="ce171" table:formula="of:=[.J22]*[.O3]" office:value-type="float" office:value="893.074035663281" calcext:value-type="float">
            <text:p>893.074036</text:p>
          </table:table-cell>
          <table:table-cell table:style-name="ce283" table:formula="of:=[.J32]+[.J33]" office:value-type="float" office:value="2603.3515204503" calcext:value-type="float" table:number-columns-spanned="1" table:number-rows-spanned="2">
            <text:p>2603.351520</text:p>
          </table:table-cell>
          <table:table-cell table:style-name="ce283" table:formula="of:=([.$O$6]*[.K23])+([.$P$6]*[.J22])" office:value-type="float" office:value="1187.81651622625" calcext:value-type="float" table:number-columns-spanned="1" table:number-rows-spanned="2">
            <text:p>1187.816516</text:p>
          </table:table-cell>
          <table:table-cell table:style-name="ce283" table:formula="of:=([.L32]/[.K32])*100" office:value-type="float" office:value="45.6264360343008" calcext:value-type="float" table:number-columns-spanned="1" table:number-rows-spanned="2">
            <text:p>45.626436</text:p>
          </table:table-cell>
          <table:table-cell table:style-name="ce283" table:formula="of:=([.$O$7]*[.K23])+([.$P$7]*[.J22])" office:value-type="float" office:value="1189.07997941753" calcext:value-type="float" table:number-columns-spanned="1" table:number-rows-spanned="2">
            <text:p>1189.079979</text:p>
          </table:table-cell>
          <table:table-cell table:style-name="ce283" table:formula="of:=([.N32]/[.K32])*100" office:value-type="float" office:value="45.6749682122011" calcext:value-type="float" table:number-columns-spanned="1" table:number-rows-spanned="2">
            <text:p>45.674968</text:p>
          </table:table-cell>
          <table:table-cell table:style-name="ce332" table:formula="of:=[.N32]/[.L32]" office:value-type="float" office:value="1.00106368548847" calcext:value-type="float" table:number-columns-spanned="1" table:number-rows-spanned="2">
            <text:p>1.00106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0" office:value-type="string" calcext:value-type="string">
            <text:p>Sub 2</text:p>
          </table:table-cell>
          <table:table-cell table:style-name="ce361" table:formula="of:=[.K23]*[.P3]" office:value-type="float" office:value="1710.27748478702" calcext:value-type="float">
            <text:p>1710.277485</text:p>
          </table:table-cell>
          <table:covered-table-cell table:number-columns-repeated="5" table:style-name="ce361"/>
          <table:covered-table-cell table:style-name="ce321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>
            <text:p>TS % Alvo</text:p>
          </table:table-cell>
          <table:table-cell/>
          <table:table-cell table:style-name="ce154" office:value-type="string" calcext:value-type="string">
            <text:p>TS % Ratio</text:p>
          </table:table-cell>
          <table:table-cell table:style-name="ce199" office:value-type="string" calcext:value-type="string">
            <text:p>VS diluido (g)</text:p>
          </table:table-cell>
          <table:table-cell table:style-name="ce199" office:value-type="string" calcext:value-type="string">
            <text:p>Volume (L)</text:p>
          </table:table-cell>
          <table:table-cell table:style-name="ce311" office:value-type="string" calcext:value-type="string">
            <text:p>VS diluido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1" office:value-type="float" office:value="10" calcext:value-type="float">
            <text:p>10</text:p>
          </table:table-cell>
          <table:table-cell/>
          <table:table-cell table:style-name="ce230" table:formula="of:=[.M30]/[.$I$36]" office:value-type="float" office:value="3.38524251603964" calcext:value-type="float">
            <text:p>3.385243</text:p>
          </table:table-cell>
          <table:table-cell table:style-name="ce159" table:formula="of:=[.N30]/[.K36]" office:value-type="float" office:value="191.997351239871" calcext:value-type="float">
            <text:p>191.997351</text:p>
          </table:table-cell>
          <table:table-cell table:style-name="ce159" table:formula="of:=[.K36]*[.J21]" office:value-type="float" office:value="5.87922703501442" calcext:value-type="float">
            <text:p>5.879227</text:p>
          </table:table-cell>
          <table:table-cell table:style-name="ce312" table:formula="of:=[.L36]/[.M36]" office:value-type="float" office:value="32.6569037215961" calcext:value-type="float">
            <text:p>32.65690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2" office:value-type="float" office:value="15" calcext:value-type="float">
            <text:p>15</text:p>
          </table:table-cell>
          <table:table-cell/>
          <table:table-cell table:style-name="ce284" table:formula="of:=[.M30]/[.$I$37]" office:value-type="float" office:value="2.25682834402643" calcext:value-type="float">
            <text:p>2.256828</text:p>
          </table:table-cell>
          <table:table-cell table:style-name="ce408" table:formula="of:=[.N30]/[.K37]" office:value-type="float" office:value="287.996026859806" calcext:value-type="float">
            <text:p>287.996027</text:p>
          </table:table-cell>
          <table:table-cell table:style-name="ce408" table:formula="of:=[.K37]*[.J21]" office:value-type="float" office:value="3.91948469000961" calcext:value-type="float">
            <text:p>3.919485</text:p>
          </table:table-cell>
          <table:table-cell table:style-name="ce307" table:formula="of:=[.L37]/[.M37]" office:value-type="float" office:value="73.4780333735912" calcext:value-type="float">
            <text:p>73.47803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33" table:formula="of:=[.M32]/[.$I$36]" office:value-type="float" office:value="4.56264360343008" calcext:value-type="float">
            <text:p>4.562644</text:p>
          </table:table-cell>
          <table:table-cell table:style-name="ce171" table:formula="of:=[.N32]/[.K38]" office:value-type="float" office:value="260.612066768399" calcext:value-type="float">
            <text:p>260.612067</text:p>
          </table:table-cell>
          <table:table-cell table:style-name="ce171" table:formula="of:=[.K38]*[.J24]" office:value-type="float" office:value="10.7558075923618" calcext:value-type="float">
            <text:p>10.755808</text:p>
          </table:table-cell>
          <table:table-cell table:style-name="ce313" table:formula="of:=[.L38]/[.M38]" office:value-type="float" office:value="24.2298929699591" calcext:value-type="float">
            <text:p>24.22989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85" table:formula="of:=[.M32]/[.$I$37]" office:value-type="float" office:value="3.04176240228672" calcext:value-type="float">
            <text:p>3.041762</text:p>
          </table:table-cell>
          <table:table-cell table:style-name="ce414" table:formula="of:=[.N32]/[.K39]" office:value-type="float" office:value="390.918100152599" calcext:value-type="float">
            <text:p>390.918100</text:p>
          </table:table-cell>
          <table:table-cell table:style-name="ce414" table:formula="of:=[.K39]*[.J24]" office:value-type="float" office:value="7.17053839490786" calcext:value-type="float">
            <text:p>7.170538</text:p>
          </table:table-cell>
          <table:table-cell table:style-name="ce310" table:formula="of:=[.L39]/[.M39]" office:value-type="float" office:value="54.5172591824079" calcext:value-type="float">
            <text:p>54.517259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8" table:number-rows-spanned="1">
            <text:p>Calculo COV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string" calcext:value-type="string">
            <text:p>Reator</text:p>
          </table:table-cell>
          <table:table-cell table:style-name="ce188" office:value-type="string" calcext:value-type="string">
            <text:p>Volume (L)</text:p>
          </table:table-cell>
          <table:table-cell table:style-name="ce187" office:value-type="string" calcext:value-type="string">
            <text:p>Volume (m^3)</text:p>
          </table:table-cell>
          <table:table-cell table:style-name="ce188" office:value-type="string" calcext:value-type="string">
            <text:p>Tempo Retencao (d)</text:p>
          </table:table-cell>
          <table:table-cell table:style-name="ce218" office:value-type="string" calcext:value-type="string">
            <text:p>Fluxo (L/d)</text:p>
          </table:table-cell>
          <table:table-cell/>
          <table:table-cell table:style-name="ce75" office:value-type="string" calcext:value-type="string">
            <text:p>COV Alvo</text:p>
          </table:table-cell>
          <table:table-cell table:number-columns-repeated="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5" office:value-type="string" calcext:value-type="string">
            <text:p>Reator Pequeno 1 </text:p>
          </table:table-cell>
          <table:table-cell table:style-name="ce189" office:value-type="float" office:value="1" calcext:value-type="float">
            <text:p>1</text:p>
          </table:table-cell>
          <table:table-cell table:style-name="ce199" table:formula="of:=[.J45]/1000" office:value-type="float" office:value="0.001" calcext:value-type="float">
            <text:p>0.001</text:p>
          </table:table-cell>
          <table:table-cell table:style-name="ce207" office:value-type="float" office:value="30" calcext:value-type="float">
            <text:p>30</text:p>
          </table:table-cell>
          <table:table-cell table:style-name="ce219" table:formula="of:=[.J45]/[.L45]" office:value-type="float" office:value="0.0333333333333333" calcext:value-type="float">
            <text:p>0.033333333</text:p>
          </table:table-cell>
          <table:table-cell/>
          <table:table-cell table:style-name="ce24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6" office:value-type="string" calcext:value-type="string">
            <text:p>Reator Pequeno 2</text:p>
          </table:table-cell>
          <table:table-cell table:style-name="ce375" office:value-type="float" office:value="1" calcext:value-type="float">
            <text:p>1</text:p>
          </table:table-cell>
          <table:table-cell table:style-name="ce280" table:formula="of:=[.J46]/1000" office:value-type="float" office:value="0.001" calcext:value-type="float">
            <text:p>0.001</text:p>
          </table:table-cell>
          <table:table-cell table:style-name="ce208" office:value-type="float" office:value="3" calcext:value-type="float">
            <text:p>3</text:p>
          </table:table-cell>
          <table:table-cell table:style-name="ce220" table:formula="of:=[.J46]/[.L46]" office:value-type="float" office:value="0.333333333333333" calcext:value-type="float">
            <text:p>0.333333333</text:p>
          </table:table-cell>
          <table:table-cell/>
          <table:table-cell table:style-name="ce241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7" office:value-type="string" calcext:value-type="string">
            <text:p>Reator Grande</text:p>
          </table:table-cell>
          <table:table-cell table:style-name="ce191" office:value-type="float" office:value="4" calcext:value-type="float">
            <text:p>4</text:p>
          </table:table-cell>
          <table:table-cell table:style-name="ce200" table:formula="of:=[.J47]/1000" office:value-type="float" office:value="0.004" calcext:value-type="float">
            <text:p>0.004</text:p>
          </table:table-cell>
          <table:table-cell table:style-name="ce209" office:value-type="float" office:value="12" calcext:value-type="float">
            <text:p>12</text:p>
          </table:table-cell>
          <table:table-cell table:style-name="ce221" table:formula="of:=[.J47]/[.L47]" office:value-type="float" office:value="0.333333333333333" calcext:value-type="float">
            <text:p>0.333333333</text:p>
          </table:table-cell>
          <table:table-cell/>
          <table:table-cell table:style-name="ce242" office:value-type="float" office:value="2.6" calcext:value-type="float">
            <text:p>2.6</text:p>
          </table:table-cell>
          <table:table-cell table:number-columns-repeated="2"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VS (g/d)</text:p>
          </table:table-cell>
          <table:table-cell table:style-name="ce187" office:value-type="string" calcext:value-type="string">
            <text:p>VS (Kg/d)</text:p>
          </table:table-cell>
          <table:table-cell table:style-name="ce218" office:value-type="string" calcext:value-type="string">
            <text:p>COV (Kg SV/m³ d)</text:p>
          </table:table-cell>
          <table:table-cell table:number-columns-repeated="2"/>
          <table:table-cell table:style-name="ce75" office:value-type="string" calcext:value-type="string">
            <text:p>COV Ratio</text:p>
          </table:table-cell>
          <table:table-cell table:style-name="ce75" office:value-type="string" calcext:value-type="string">
            <text:p>Volume (L)</text:p>
          </table:table-cell>
          <table:table-cell table:style-name="ce75" office:value-type="string" calcext:value-type="string">
            <text:p>TS % diluido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22" table:formula="of:=[.$M$45]*[.$N$36]" office:value-type="float" office:value="1.08856345738654" calcext:value-type="float">
            <text:p>1.088563457</text:p>
          </table:table-cell>
          <table:table-cell table:style-name="ce172" table:formula="of:=[.I51]/1000" office:value-type="float" office:value="0.00108856345738654" calcext:value-type="float">
            <text:p>0.001088563</text:p>
          </table:table-cell>
          <table:table-cell table:style-name="ce302" table:formula="of:=[.J51]*(1/[.K45])" office:value-type="float" office:value="1.08856345738654" calcext:value-type="float">
            <text:p>1.088563457</text:p>
          </table:table-cell>
          <table:table-cell table:number-columns-repeated="2"/>
          <table:table-cell table:style-name="ce288" table:formula="of:=[.K51]/[.$O$45]" office:value-type="float" office:value="0.272140864346634" calcext:value-type="float">
            <text:p>0.27214086</text:p>
          </table:table-cell>
          <table:table-cell table:style-name="ce288" table:formula="of:=[.N51]*[.$M$36]" office:value-type="float" office:value="1.59997792699892" calcext:value-type="float">
            <text:p>1.59997793</text:p>
          </table:table-cell>
          <table:table-cell table:style-name="ce288" table:formula="of:=([.$M$30]*[.$J$21])/[.O51]" office:value-type="float" office:value="36.74567589843" calcext:value-type="float">
            <text:p>36.7456759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4" table:formula="of:=[.$M$46]*[.$N$36]" office:value-type="float" office:value="10.8856345738654" calcext:value-type="float">
            <text:p>10.885634574</text:p>
          </table:table-cell>
          <table:table-cell table:style-name="ce323" table:formula="of:=[.I52]/1000" office:value-type="float" office:value="0.0108856345738654" calcext:value-type="float">
            <text:p>0.010885635</text:p>
          </table:table-cell>
          <table:table-cell table:style-name="ce333" table:formula="of:=[.J52]*(1/[.K46])" office:value-type="float" office:value="10.8856345738654" calcext:value-type="float">
            <text:p>10.885634574</text:p>
          </table:table-cell>
          <table:table-cell table:number-columns-repeated="2"/>
          <table:table-cell table:style-name="ce288" table:formula="of:=[.K52]/[.$O$46]" office:value-type="float" office:value="0.766593984075025" calcext:value-type="float">
            <text:p>0.76659398</text:p>
          </table:table-cell>
          <table:table-cell table:style-name="ce288" table:formula="of:=[.N52]*[.$M$36]" office:value-type="float" office:value="4.5069800760533" calcext:value-type="float">
            <text:p>4.50698008</text:p>
          </table:table-cell>
          <table:table-cell table:style-name="ce288" table:formula="of:=([.$M$30]*[.$J$21])/[.O52]" office:value-type="float" office:value="13.0447149439426" calcext:value-type="float">
            <text:p>13.0447149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4" table:formula="of:=[.$M$47]*[.$N$36]" office:value-type="float" office:value="10.8856345738654" calcext:value-type="float">
            <text:p>10.885634574</text:p>
          </table:table-cell>
          <table:table-cell table:style-name="ce322" table:formula="of:=[.I53]/1000" office:value-type="float" office:value="0.0108856345738654" calcext:value-type="float">
            <text:p>0.010885635</text:p>
          </table:table-cell>
          <table:table-cell table:style-name="ce333" table:formula="of:=[.J53]*(1/[.K47])" office:value-type="float" office:value="2.72140864346634" calcext:value-type="float">
            <text:p>2.721408643</text:p>
          </table:table-cell>
          <table:table-cell table:number-columns-repeated="2"/>
          <table:table-cell table:style-name="ce288" table:formula="of:=[.K53]/[.$O$47]" office:value-type="float" office:value="1.04669563210244" calcext:value-type="float">
            <text:p>1.04669563</text:p>
          </table:table-cell>
          <table:table-cell table:style-name="ce288" table:formula="of:=[.N53]*[.$M$36]" office:value-type="float" office:value="6.15376125768816" calcext:value-type="float">
            <text:p>6.15376126</text:p>
          </table:table-cell>
          <table:table-cell table:style-name="ce288" table:formula="of:=([.$M$30]*[.$J$21])/[.O53]" office:value-type="float" office:value="9.55387573359179" calcext:value-type="float">
            <text:p>9.5538757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5]*[.$N$37]" office:value-type="float" office:value="2.4492677791197" calcext:value-type="float">
            <text:p>2.449267779</text:p>
          </table:table-cell>
          <table:table-cell table:style-name="ce324" table:formula="of:=[.I54]/1000" office:value-type="float" office:value="0.0024492677791197" calcext:value-type="float">
            <text:p>0.002449268</text:p>
          </table:table-cell>
          <table:table-cell table:style-name="ce334" table:formula="of:=[.J54]*(1/[.K45])" office:value-type="float" office:value="2.4492677791197" calcext:value-type="float">
            <text:p>2.449267779</text:p>
          </table:table-cell>
          <table:table-cell table:number-columns-repeated="2"/>
          <table:table-cell table:style-name="ce289" table:formula="of:=[.K54]/[.$O$45]" office:value-type="float" office:value="0.612316944779926" calcext:value-type="float">
            <text:p>0.61231694</text:p>
          </table:table-cell>
          <table:table-cell table:style-name="ce289" table:formula="of:=[.N54]*[.$M$37]" office:value-type="float" office:value="2.39996689049838" calcext:value-type="float">
            <text:p>2.39996689</text:p>
          </table:table-cell>
          <table:table-cell table:style-name="ce289" table:formula="of:=([.$M$30]*[.$J$21])/[.O54]" office:value-type="float" office:value="24.49711726562" calcext:value-type="float">
            <text:p>24.49711727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6]*[.$N$37]" office:value-type="float" office:value="24.492677791197" calcext:value-type="float">
            <text:p>24.492677791</text:p>
          </table:table-cell>
          <table:table-cell table:style-name="ce325" table:formula="of:=[.I55]/1000" office:value-type="float" office:value="0.024492677791197" calcext:value-type="float">
            <text:p>0.024492678</text:p>
          </table:table-cell>
          <table:table-cell table:style-name="ce334" table:formula="of:=[.J55]*(1/[.K46])" office:value-type="float" office:value="24.492677791197" calcext:value-type="float">
            <text:p>24.492677791</text:p>
          </table:table-cell>
          <table:table-cell table:number-columns-repeated="2"/>
          <table:table-cell table:style-name="ce289" table:formula="of:=[.K55]/[.$O$46]" office:value-type="float" office:value="1.72483646416881" calcext:value-type="float">
            <text:p>1.72483646</text:p>
          </table:table-cell>
          <table:table-cell table:style-name="ce289" table:formula="of:=[.N55]*[.$M$37]" office:value-type="float" office:value="6.76047011407995" calcext:value-type="float">
            <text:p>6.76047011</text:p>
          </table:table-cell>
          <table:table-cell table:style-name="ce289" table:formula="of:=([.$M$30]*[.$J$21])/[.O55]" office:value-type="float" office:value="8.69647662929509" calcext:value-type="float">
            <text:p>8.6964766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7]*[.$N$37]" office:value-type="float" office:value="24.492677791197" calcext:value-type="float">
            <text:p>24.492677791</text:p>
          </table:table-cell>
          <table:table-cell table:style-name="ce324" table:formula="of:=[.I56]/1000" office:value-type="float" office:value="0.024492677791197" calcext:value-type="float">
            <text:p>0.024492678</text:p>
          </table:table-cell>
          <table:table-cell table:style-name="ce334" table:formula="of:=[.J56]*(1/[.K47])" office:value-type="float" office:value="6.12316944779926" calcext:value-type="float">
            <text:p>6.123169448</text:p>
          </table:table-cell>
          <table:table-cell table:number-columns-repeated="2"/>
          <table:table-cell table:style-name="ce289" table:formula="of:=[.K56]/[.$O$47]" office:value-type="float" office:value="2.35506517223049" calcext:value-type="float">
            <text:p>2.35506517</text:p>
          </table:table-cell>
          <table:table-cell table:style-name="ce289" table:formula="of:=[.N56]*[.$M$37]" office:value-type="float" office:value="9.23064188653224" calcext:value-type="float">
            <text:p>9.23064189</text:p>
          </table:table-cell>
          <table:table-cell table:style-name="ce289" table:formula="of:=([.$M$30]*[.$J$21])/[.O56]" office:value-type="float" office:value="6.36925048906119" calcext:value-type="float">
            <text:p>6.3692504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5]*[.$N$38]" office:value-type="float" office:value="0.807663098998635" calcext:value-type="float">
            <text:p>0.807663099</text:p>
          </table:table-cell>
          <table:table-cell table:style-name="ce326" table:formula="of:=[.I57]/1000" office:value-type="float" office:value="0.000807663098998635" calcext:value-type="float">
            <text:p>0.000807663</text:p>
          </table:table-cell>
          <table:table-cell table:style-name="ce335" table:formula="of:=[.J57]*(1/[.K45])" office:value-type="float" office:value="0.807663098998635" calcext:value-type="float">
            <text:p>0.807663099</text:p>
          </table:table-cell>
          <table:table-cell table:number-columns-repeated="2"/>
          <table:table-cell table:style-name="ce290" table:formula="of:=[.K57]/[.$O$45]" office:value-type="float" office:value="0.201915774749659" calcext:value-type="float">
            <text:p>0.20191577</text:p>
          </table:table-cell>
          <table:table-cell table:style-name="ce290" table:formula="of:=[.N57]*[.$M$38]" office:value-type="float" office:value="2.17176722306999" calcext:value-type="float">
            <text:p>2.17176722</text:p>
          </table:table-cell>
          <table:table-cell table:style-name="ce290" table:formula="of:=([.$M$32]*[.$J$24])/[.O57]" office:value-type="float" office:value="49.5256005252601" calcext:value-type="float">
            <text:p>49.5256005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6]*[.$N$38]" office:value-type="float" office:value="8.07663098998635" calcext:value-type="float">
            <text:p>8.076630990</text:p>
          </table:table-cell>
          <table:table-cell table:style-name="ce327" table:formula="of:=[.I58]/1000" office:value-type="float" office:value="0.00807663098998635" calcext:value-type="float">
            <text:p>0.008076631</text:p>
          </table:table-cell>
          <table:table-cell table:style-name="ce335" table:formula="of:=[.J58]*(1/[.K46])" office:value-type="float" office:value="8.07663098998635" calcext:value-type="float">
            <text:p>8.076630990</text:p>
          </table:table-cell>
          <table:table-cell table:number-columns-repeated="2"/>
          <table:table-cell table:style-name="ce290" table:formula="of:=[.K58]/[.$O$46]" office:value-type="float" office:value="0.568776830280729" calcext:value-type="float">
            <text:p>0.56877683</text:p>
          </table:table-cell>
          <table:table-cell table:style-name="ce290" table:formula="of:=[.N58]*[.$M$38]" office:value-type="float" office:value="6.11765414949294" calcext:value-type="float">
            <text:p>6.11765415</text:p>
          </table:table-cell>
          <table:table-cell table:style-name="ce290" table:formula="of:=([.$M$32]*[.$J$24])/[.O58]" office:value-type="float" office:value="17.5815881864673" calcext:value-type="float">
            <text:p>17.5815881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7]*[.$N$38]" office:value-type="float" office:value="8.07663098998635" calcext:value-type="float">
            <text:p>8.076630990</text:p>
          </table:table-cell>
          <table:table-cell table:style-name="ce326" table:formula="of:=[.I59]/1000" office:value-type="float" office:value="0.00807663098998635" calcext:value-type="float">
            <text:p>0.008076631</text:p>
          </table:table-cell>
          <table:table-cell table:style-name="ce335" table:formula="of:=[.J59]*(1/[.K47])" office:value-type="float" office:value="2.01915774749659" calcext:value-type="float">
            <text:p>2.019157747</text:p>
          </table:table-cell>
          <table:table-cell table:number-columns-repeated="2"/>
          <table:table-cell table:style-name="ce290" table:formula="of:=[.K59]/[.$O$47]" office:value-type="float" office:value="0.776599133652534" calcext:value-type="float">
            <text:p>0.77659913</text:p>
          </table:table-cell>
          <table:table-cell table:style-name="ce290" table:formula="of:=[.N59]*[.$M$38]" office:value-type="float" office:value="8.35295085796152" calcext:value-type="float">
            <text:p>8.35295086</text:p>
          </table:table-cell>
          <table:table-cell table:style-name="ce290" table:formula="of:=([.$M$32]*[.$J$24])/[.O59]" office:value-type="float" office:value="12.8766561365676" calcext:value-type="float">
            <text:p>12.8766561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7" table:formula="of:=[.$M$45]*[.$N$39]" office:value-type="float" office:value="1.81724197274693" calcext:value-type="float">
            <text:p>1.817241973</text:p>
          </table:table-cell>
          <table:table-cell table:style-name="ce328" table:formula="of:=[.I60]/1000" office:value-type="float" office:value="0.00181724197274693" calcext:value-type="float">
            <text:p>0.001817242</text:p>
          </table:table-cell>
          <table:table-cell table:style-name="ce336" table:formula="of:=[.J60]*(1/[.K45])" office:value-type="float" office:value="1.81724197274693" calcext:value-type="float">
            <text:p>1.817241973</text:p>
          </table:table-cell>
          <table:table-cell table:number-columns-repeated="2"/>
          <table:table-cell table:style-name="ce291" table:formula="of:=[.K60]/[.$O$45]" office:value-type="float" office:value="0.454310493186732" calcext:value-type="float">
            <text:p>0.45431049</text:p>
          </table:table-cell>
          <table:table-cell table:style-name="ce291" table:formula="of:=[.N60]*[.$M$39]" office:value-type="float" office:value="3.25765083460499" calcext:value-type="float">
            <text:p>3.25765083</text:p>
          </table:table-cell>
          <table:table-cell table:style-name="ce291" table:formula="of:=([.$M$32]*[.$J$24])/[.O60]" office:value-type="float" office:value="33.0170670168401" calcext:value-type="float">
            <text:p>33.01706702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7" table:formula="of:=[.$M$46]*[.$N$39]" office:value-type="float" office:value="18.1724197274693" calcext:value-type="float">
            <text:p>18.172419727</text:p>
          </table:table-cell>
          <table:table-cell table:style-name="ce329" table:formula="of:=[.I61]/1000" office:value-type="float" office:value="0.0181724197274693" calcext:value-type="float">
            <text:p>0.018172420</text:p>
          </table:table-cell>
          <table:table-cell table:style-name="ce336" table:formula="of:=[.J61]*(1/[.K46])" office:value-type="float" office:value="18.1724197274693" calcext:value-type="float">
            <text:p>18.172419727</text:p>
          </table:table-cell>
          <table:table-cell table:number-columns-repeated="2"/>
          <table:table-cell table:style-name="ce291" table:formula="of:=[.K61]/[.$O$46]" office:value-type="float" office:value="1.27974786813164" calcext:value-type="float">
            <text:p>1.27974787</text:p>
          </table:table-cell>
          <table:table-cell table:style-name="ce291" table:formula="of:=[.N61]*[.$M$39]" office:value-type="float" office:value="9.17648122423942" calcext:value-type="float">
            <text:p>9.17648122</text:p>
          </table:table-cell>
          <table:table-cell table:style-name="ce291" table:formula="of:=([.$M$32]*[.$J$24])/[.O61]" office:value-type="float" office:value="11.7210587909782" calcext:value-type="float">
            <text:p>11.7210587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8" table:formula="of:=[.$M$47]*[.$N$39]" office:value-type="float" office:value="18.1724197274693" calcext:value-type="float">
            <text:p>18.172419727</text:p>
          </table:table-cell>
          <table:table-cell table:style-name="ce330" table:formula="of:=[.I62]/1000" office:value-type="float" office:value="0.0181724197274693" calcext:value-type="float">
            <text:p>0.018172420</text:p>
          </table:table-cell>
          <table:table-cell table:style-name="ce337" table:formula="of:=[.J62]*(1/[.K47])" office:value-type="float" office:value="4.54310493186732" calcext:value-type="float">
            <text:p>4.543104932</text:p>
          </table:table-cell>
          <table:table-cell table:number-columns-repeated="2"/>
          <table:table-cell table:style-name="ce292" table:formula="of:=[.K62]/[.$O$47]" office:value-type="float" office:value="1.7473480507182" calcext:value-type="float">
            <text:p>1.74734805</text:p>
          </table:table-cell>
          <table:table-cell table:style-name="ce292" table:formula="of:=[.N62]*[.$M$39]" office:value-type="float" office:value="12.5294262869423" calcext:value-type="float">
            <text:p>12.52942629</text:p>
          </table:table-cell>
          <table:table-cell table:style-name="ce292" table:formula="of:=([.$M$32]*[.$J$24])/[.O62]" office:value-type="float" office:value="8.58443742437841" calcext:value-type="float">
            <text:p>8.58443742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5" table:number-rows-spanned="1">
            <text:p>Calculo para montar a solucao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5" table:number-rows-spanned="1">
            <text:p>Diluicao 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>
            <text:p>Volume (mL)</text:p>
          </table:table-cell>
          <table:table-cell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8" office:value-type="float" office:value="500" calcext:value-type="float">
            <text:p>500</text:p>
          </table:table-cell>
          <table:table-cell/>
          <table:table-cell table:style-name="ce404" office:value-type="float" office:value="10" calcext:value-type="float">
            <text:p>10</text:p>
          </table:table-cell>
          <table:table-cell table:style-name="ce140" table:formula="of:=([.I68]/1000)*[.K68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87" office:value-type="string" calcext:value-type="string">
            <text:p>Volume (mL)</text:p>
          </table:table-cell>
          <table:table-cell table:style-name="ce187" office:value-type="string" calcext:value-type="string">
            <text:p>Proporcao Sub</text:p>
          </table:table-cell>
          <table:table-cell table:style-name="ce187" office:value-type="string" calcext:value-type="string">
            <text:p>Volume Sub (mL)</text:p>
          </table:table-cell>
          <table:table-cell table:style-name="ce9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401" table:formula="of:=([.$J$21]/[.M36])*[.$I$68]" office:value-type="float" office:value="147.699905584592" calcext:value-type="float" table:number-columns-spanned="1" table:number-rows-spanned="2">
            <text:p>147.699906</text:p>
          </table:table-cell>
          <table:table-cell table:style-name="ce401" table:formula="of:=[.$L$19]/[.$L$21]" office:value-type="float" office:value="0.424202791305994" calcext:value-type="float">
            <text:p>0.424203</text:p>
          </table:table-cell>
          <table:table-cell table:style-name="ce401" table:formula="of:=[.J70]*[.K70]" office:value-type="float" office:value="62.6547122246155" calcext:value-type="float">
            <text:p>62.654712</text:p>
          </table:table-cell>
          <table:table-cell table:style-name="ce306" table:formula="of:=[.L70]*([.$O$3]/1000)" office:value-type="float" office:value="55.9552966997588" calcext:value-type="float">
            <text:p>55.955297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covered-table-cell table:style-name="ce401"/>
          <table:table-cell table:style-name="ce401" table:formula="of:=[.$L$20]/[.$L$21]" office:value-type="float" office:value="0.575797208694006" calcext:value-type="float">
            <text:p>0.575797</text:p>
          </table:table-cell>
          <table:table-cell table:style-name="ce401" table:formula="of:=[.J70]*[.K71]" office:value-type="float" office:value="85.045193359976" calcext:value-type="float">
            <text:p>85.045193</text:p>
          </table:table-cell>
          <table:table-cell table:style-name="ce306" table:formula="of:=[.L71]*([.$P$3]/1000)" office:value-type="float" office:value="107.15694363357" calcext:value-type="float">
            <text:p>107.156944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408" table:formula="of:=([.$J$21]/[.M37])*[.$I$68]" office:value-type="float" office:value="221.549858376887" calcext:value-type="float" table:number-columns-spanned="1" table:number-rows-spanned="2">
            <text:p>221.549858</text:p>
          </table:table-cell>
          <table:table-cell table:style-name="ce408" table:formula="of:=[.$L$19]/[.$L$21]" office:value-type="float" office:value="0.424202791305994" calcext:value-type="float">
            <text:p>0.424203</text:p>
          </table:table-cell>
          <table:table-cell table:style-name="ce408" table:formula="of:=[.J72]*[.K72]" office:value-type="float" office:value="93.9820683369232" calcext:value-type="float">
            <text:p>93.982068</text:p>
          </table:table-cell>
          <table:table-cell table:style-name="ce307" table:formula="of:=[.L72]*([.$O$3]/1000)" office:value-type="float" office:value="83.9329450496383" calcext:value-type="float">
            <text:p>83.932945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covered-table-cell table:style-name="ce275"/>
          <table:table-cell table:style-name="ce408" table:formula="of:=[.$L$20]/[.$L$21]" office:value-type="float" office:value="0.575797208694006" calcext:value-type="float">
            <text:p>0.575797</text:p>
          </table:table-cell>
          <table:table-cell table:style-name="ce408" table:formula="of:=[.J72]*[.K73]" office:value-type="float" office:value="127.567790039964" calcext:value-type="float">
            <text:p>127.567790</text:p>
          </table:table-cell>
          <table:table-cell table:style-name="ce307" table:formula="of:=[.L73]*([.$P$3]/1000)" office:value-type="float" office:value="160.735415450355" calcext:value-type="float">
            <text:p>160.735415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360" table:formula="of:=([.$J$24]/[.M38])*[.$I$68]" office:value-type="float" office:value="109.585591919587" calcext:value-type="float" table:number-columns-spanned="1" table:number-rows-spanned="2">
            <text:p>109.585592</text:p>
          </table:table-cell>
          <table:table-cell table:style-name="ce360" table:formula="of:=[.$L$22]/[.$L$24]" office:value-type="float" office:value="0.424202791305994" calcext:value-type="float">
            <text:p>0.424203</text:p>
          </table:table-cell>
          <table:table-cell table:style-name="ce360" table:formula="of:=[.J74]*[.K74]" office:value-type="float" office:value="46.4865139792082" calcext:value-type="float">
            <text:p>46.486514</text:p>
          </table:table-cell>
          <table:table-cell table:style-name="ce308" table:formula="of:=[.L74]*([.$O$3]/1000)" office:value-type="float" office:value="41.515898643329" calcext:value-type="float">
            <text:p>41.515899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covered-table-cell table:style-name="ce360"/>
          <table:table-cell table:style-name="ce360" table:formula="of:=[.$L$23]/[.$L$24]" office:value-type="float" office:value="0.575797208694006" calcext:value-type="float">
            <text:p>0.575797</text:p>
          </table:table-cell>
          <table:table-cell table:style-name="ce360" table:formula="of:=[.J74]*[.K75]" office:value-type="float" office:value="63.0990779403783" calcext:value-type="float">
            <text:p>63.099078</text:p>
          </table:table-cell>
          <table:table-cell table:style-name="ce308" table:formula="of:=[.L75]*([.$P$3]/1000)" office:value-type="float" office:value="79.5048382048767" calcext:value-type="float">
            <text:p>79.504838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414" table:formula="of:=([.$J$24]/[.M39])*[.$I$68]" office:value-type="float" office:value="164.37838787938" calcext:value-type="float" table:number-columns-spanned="1" table:number-rows-spanned="2">
            <text:p>164.378388</text:p>
          </table:table-cell>
          <table:table-cell table:style-name="ce293" table:formula="of:=[.$L$22]/[.$L$24]" office:value-type="float" office:value="0.424202791305994" calcext:value-type="float">
            <text:p>0.424203</text:p>
          </table:table-cell>
          <table:table-cell table:style-name="ce293" table:formula="of:=[.J76]*[.K76]" office:value-type="float" office:value="69.7297709688123" calcext:value-type="float">
            <text:p>69.729771</text:p>
          </table:table-cell>
          <table:table-cell table:style-name="ce309" table:formula="of:=[.L76]*([.$O$3]/1000)" office:value-type="float" office:value="62.2738479649934" calcext:value-type="float">
            <text:p>62.273848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2" office:value-type="string" calcext:value-type="string">
            <text:p>Sub 2</text:p>
          </table:table-cell>
          <table:covered-table-cell table:style-name="ce276"/>
          <table:table-cell table:style-name="ce414" table:formula="of:=[.$L$23]/[.$L$24]" office:value-type="float" office:value="0.575797208694006" calcext:value-type="float">
            <text:p>0.575797</text:p>
          </table:table-cell>
          <table:table-cell table:style-name="ce414" table:formula="of:=[.J76]*[.K77]" office:value-type="float" office:value="94.6486169105675" calcext:value-type="float">
            <text:p>94.648617</text:p>
          </table:table-cell>
          <table:table-cell table:style-name="ce310" table:formula="of:=[.L77]*([.$P$3]/1000)" office:value-type="float" office:value="119.257257307315" calcext:value-type="float">
            <text:p>119.257257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5" table:number-rows-spanned="1">
            <text:p>Diluicao COV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>
            <text:p>Volume (mL)</text:p>
          </table:table-cell>
          <table:table-cell table:style-name="ce187" office:value-type="string" calcext:value-type="string">
            <text:p>COV</text:p>
          </table:table-cell>
          <table:table-cell table:style-name="ce51" office:value-type="string" calcext:value-type="string">
            <text:p>Volumes (L)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8" office:value-type="float" office:value="500" calcext:value-type="float">
            <text:p>500</text:p>
          </table:table-cell>
          <table:table-cell table:style-name="ce277" table:content-validation-name="val2" office:value-type="float" office:value="4" calcext:value-type="float">
            <text:p>4</text:p>
          </table:table-cell>
          <table:table-cell table:style-name="ce288" table:number-matrix-columns-spanned="1" table:number-matrix-rows-spanned="4" table:formula="of:=INDEX([.$O51:.$O$62];COM.MICROSOFT.SEQUENCE(4;;MATCH([.$J$81];[.$O$45:.$O$47];0);3))" office:value-type="float" office:value="1.59997792699892" calcext:value-type="float">
            <text:p>1.59997793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89" office:value-type="float" office:value="2.39996689049838" calcext:value-type="float">
            <text:p>2.39996689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290" office:value-type="float" office:value="2.17176722306999" calcext:value-type="float">
            <text:p>2.17176722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04" office:value-type="float" office:value="10" calcext:value-type="float">
            <text:p>10</text:p>
          </table:table-cell>
          <table:table-cell table:style-name="ce140" table:formula="of:=([.I81]/1000)*[.I84]" office:value-type="float" office:value="5" calcext:value-type="float">
            <text:p>5</text:p>
          </table:table-cell>
          <table:table-cell table:style-name="ce292" office:value-type="float" office:value="3.25765083460499" calcext:value-type="float">
            <text:p>3.25765083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87" office:value-type="string" calcext:value-type="string">
            <text:p>Volume (mL)</text:p>
          </table:table-cell>
          <table:table-cell table:style-name="ce187" office:value-type="string" calcext:value-type="string">
            <text:p>Proporcao Sub</text:p>
          </table:table-cell>
          <table:table-cell table:style-name="ce187" office:value-type="string" calcext:value-type="string">
            <text:p>Volume Sub (mL)</text:p>
          </table:table-cell>
          <table:table-cell table:style-name="ce9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401" table:formula="of:=([.$J$21]/[.K81])*[.$I$81]" office:value-type="float" office:value="542.733286084012" calcext:value-type="float" table:number-columns-spanned="1" table:number-rows-spanned="2">
            <text:p>542.733286</text:p>
          </table:table-cell>
          <table:table-cell table:style-name="ce401" table:formula="of:=[.$L$19]/[.$L$21]" office:value-type="float" office:value="0.424202791305994" calcext:value-type="float">
            <text:p>0.424203</text:p>
          </table:table-cell>
          <table:table-cell table:style-name="ce401" table:formula="of:=[.J87]*[.K87]" office:value-type="float" office:value="230.228974891513" calcext:value-type="float">
            <text:p>230.228975</text:p>
          </table:table-cell>
          <table:table-cell table:style-name="ce306" table:formula="of:=[.L87]*([.$O$3]/1000)" office:value-type="float" office:value="205.611519732983" calcext:value-type="float">
            <text:p>205.611520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covered-table-cell table:style-name="ce401"/>
          <table:table-cell table:style-name="ce401" table:formula="of:=[.$L$20]/[.$L$21]" office:value-type="float" office:value="0.575797208694006" calcext:value-type="float">
            <text:p>0.575797</text:p>
          </table:table-cell>
          <table:table-cell table:style-name="ce401" table:formula="of:=[.J87]*[.K88]" office:value-type="float" office:value="312.5043111925" calcext:value-type="float">
            <text:p>312.504311</text:p>
          </table:table-cell>
          <table:table-cell table:style-name="ce306" table:formula="of:=[.L88]*([.$P$3]/1000)" office:value-type="float" office:value="393.75543210255" calcext:value-type="float">
            <text:p>393.755432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408" table:formula="of:=([.$J$21]/[.K82])*[.$I$81]" office:value-type="float" office:value="361.822190722675" calcext:value-type="float" table:number-columns-spanned="1" table:number-rows-spanned="2">
            <text:p>361.822191</text:p>
          </table:table-cell>
          <table:table-cell table:style-name="ce408" table:formula="of:=[.$L$19]/[.$L$21]" office:value-type="float" office:value="0.424202791305994" calcext:value-type="float">
            <text:p>0.424203</text:p>
          </table:table-cell>
          <table:table-cell table:style-name="ce408" table:formula="of:=[.J89]*[.K89]" office:value-type="float" office:value="153.485983261008" calcext:value-type="float">
            <text:p>153.485983</text:p>
          </table:table-cell>
          <table:table-cell table:style-name="ce307" table:formula="of:=[.L89]*([.$O$3]/1000)" office:value-type="float" office:value="137.074346488656" calcext:value-type="float">
            <text:p>137.074346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covered-table-cell table:style-name="ce275"/>
          <table:table-cell table:style-name="ce408" table:formula="of:=[.$L$20]/[.$L$21]" office:value-type="float" office:value="0.575797208694006" calcext:value-type="float">
            <text:p>0.575797</text:p>
          </table:table-cell>
          <table:table-cell table:style-name="ce408" table:formula="of:=[.J89]*[.K90]" office:value-type="float" office:value="208.336207461667" calcext:value-type="float">
            <text:p>208.336207</text:p>
          </table:table-cell>
          <table:table-cell table:style-name="ce307" table:formula="of:=[.L90]*([.$P$3]/1000)" office:value-type="float" office:value="262.5036214017" calcext:value-type="float">
            <text:p>262.50362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360" table:formula="of:=([.$J$24]/[.K83])*[.$I$81]" office:value-type="float" office:value="542.729224873362" calcext:value-type="float" table:number-columns-spanned="1" table:number-rows-spanned="2">
            <text:p>542.729225</text:p>
          </table:table-cell>
          <table:table-cell table:style-name="ce360" table:formula="of:=[.$L$22]/[.$L$24]" office:value-type="float" office:value="0.424202791305994" calcext:value-type="float">
            <text:p>0.424203</text:p>
          </table:table-cell>
          <table:table-cell table:style-name="ce360" table:formula="of:=[.J91]*[.K91]" office:value-type="float" office:value="230.227252114619" calcext:value-type="float">
            <text:p>230.227252</text:p>
          </table:table-cell>
          <table:table-cell table:style-name="ce308" table:formula="of:=[.L91]*([.$O$3]/1000)" office:value-type="float" office:value="205.60998116567" calcext:value-type="float">
            <text:p>205.60998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covered-table-cell table:style-name="ce360"/>
          <table:table-cell table:style-name="ce360" table:formula="of:=[.$L$23]/[.$L$24]" office:value-type="float" office:value="0.575797208694006" calcext:value-type="float">
            <text:p>0.575797</text:p>
          </table:table-cell>
          <table:table-cell table:style-name="ce360" table:formula="of:=[.J91]*[.K92]" office:value-type="float" office:value="312.501972758743" calcext:value-type="float">
            <text:p>312.501973</text:p>
          </table:table-cell>
          <table:table-cell table:style-name="ce308" table:formula="of:=[.L92]*([.$P$3]/1000)" office:value-type="float" office:value="393.752485676017" calcext:value-type="float">
            <text:p>393.752486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414" table:formula="of:=([.$J$24]/[.K84])*[.$I$81]" office:value-type="float" office:value="361.819483248908" calcext:value-type="float" table:number-columns-spanned="1" table:number-rows-spanned="2">
            <text:p>361.819483</text:p>
          </table:table-cell>
          <table:table-cell table:style-name="ce293" table:formula="of:=[.$L$22]/[.$L$24]" office:value-type="float" office:value="0.424202791305994" calcext:value-type="float">
            <text:p>0.424203</text:p>
          </table:table-cell>
          <table:table-cell table:style-name="ce293" table:formula="of:=[.J93]*[.K93]" office:value-type="float" office:value="153.484834743079" calcext:value-type="float">
            <text:p>153.484835</text:p>
          </table:table-cell>
          <table:table-cell table:style-name="ce309" table:formula="of:=[.L93]*([.$O$3]/1000)" office:value-type="float" office:value="137.073320777113" calcext:value-type="float">
            <text:p>137.07332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2" office:value-type="string" calcext:value-type="string">
            <text:p>Sub 2</text:p>
          </table:table-cell>
          <table:covered-table-cell table:style-name="ce276"/>
          <table:table-cell table:style-name="ce414" table:formula="of:=[.$L$23]/[.$L$24]" office:value-type="float" office:value="0.575797208694006" calcext:value-type="float">
            <text:p>0.575797</text:p>
          </table:table-cell>
          <table:table-cell table:style-name="ce414" table:formula="of:=[.J93]*[.K94]" office:value-type="float" office:value="208.334648505829" calcext:value-type="float">
            <text:p>208.334649</text:p>
          </table:table-cell>
          <table:table-cell table:style-name="ce310" table:formula="of:=[.L94]*([.$P$3]/1000)" office:value-type="float" office:value="262.501657117344" calcext:value-type="float">
            <text:p>262.501657</text:p>
          </table:table-cell>
          <table:table-cell table:number-columns-repeated="4"/>
        </table:table-row>
        <table:table-row table:style-name="ro1" table:number-rows-repeated="5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6" table:number-columns-repeated="6"/>
          <table:table-cell table:number-columns-repeated="11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V_3" table:style-name="ta1">
        <table:table-column table:style-name="co1" table:default-cell-style-name="ce147"/>
        <table:table-column table:style-name="co9" table:default-cell-style-name="ce147"/>
        <table:table-column table:style-name="co1" table:number-columns-repeated="3" table:default-cell-style-name="ce147"/>
        <table:table-column table:style-name="co10" table:default-cell-style-name="ce147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42" office:value-type="string" calcext:value-type="string">
            <text:p>Substrato</text:p>
          </table:table-cell>
          <table:table-cell table:style-name="ce142" office:value-type="string" calcext:value-type="string">
            <text:p>Densidade (g/L)</text:p>
          </table:table-cell>
          <table:table-cell table:style-name="ce142" office:value-type="string" calcext:value-type="string">
            <text:p>TC (g/L)</text:p>
          </table:table-cell>
          <table:table-cell table:style-name="ce142" office:value-type="string" calcext:value-type="string">
            <text:p>TN (g/L)</text:p>
          </table:table-cell>
          <table:table-cell table:style-name="ce142" office:value-type="string" calcext:value-type="string">
            <text:p>TS (g/L)</text:p>
          </table:table-cell>
          <table:table-cell table:style-name="ce142" office:value-type="string" calcext:value-type="string">
            <text:p>VS (g/L)</text:p>
          </table:table-cell>
          <table:table-cell table:number-columns-repeated="2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 table:style-name="ce6" office:value-type="string" calcext:value-type="string">
            <text:p>Sub 3</text:p>
          </table:table-cell>
          <table:table-cell table:style-name="ce60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 table:style-name="ce6" office:value-type="string" calcext:value-type="string">
            <text:p>Sub 2</text:p>
          </table:table-cell>
          <table:table-cell>
            <draw:custom-shape draw:z-index="0" draw:name="CaixaDeTexto 5" draw:style-name="gr2" draw:text-style-name="P3" svg:width="7.5146in" svg:height="20.6953in" svg:x="0.5035in" svg:y="0in">
              <text:p text:style-name="P1"><text:span text:style-name="T1">Equação C/N Modificada</text:span></text:p>
              <text:p text:style-name="P1"><text:span text:style-name="T1">Ref: Response Surface Methodology to Optimize Methane </text:span><text:span text:style-name="T1">Production from Mesophilic Anaerobic Co-Digestion of Oily-</text:span><text:span text:style-name="T1">Biological Sludge and Sugarcane Bagasse; <text:s/>Aiban Abdulhakim Saeed </text:span><text:span text:style-name="T1">Ghaleb et. al.; Sustainability 2020, 12, 2116; </text:span><text:span text:style-name="T1">doi:10.3390/su12052116</text:span></text:p>
              <text:p text:style-name="P1"><text:span text:style-name="T1"/></text:p>
              <text:p text:style-name="P1"><text:span text:style-name="T1">R = [𝑄1(𝐶1*(100−𝑀1)+𝑄2(𝐶2*(100−𝑀2)] / </text:span><text:span text:style-name="T1">[𝑄1(𝑁1*(100−𝑀1)+𝑄2(𝑁2*(100−𝑀2)]</text:span></text:p>
              <text:p text:style-name="P1"><text:span text:style-name="T1">R= C/N ratio;</text:span></text:p>
              <text:p text:style-name="P1"><text:span text:style-name="T1">Q1, Q2= mass of materials “as is” or wet weight;</text:span></text:p>
              <text:p text:style-name="P1"><text:span text:style-name="T1">C1, C2= carbon content of materials (%);</text:span></text:p>
              <text:p text:style-name="P1"><text:span text:style-name="T1">N1, N2= nitrogen content of materials (%);</text:span></text:p>
              <text:p text:style-name="P1"><text:span text:style-name="T1">M1, M2= moisture content of materials.</text:span></text:p>
              <text:p text:style-name="P1"><text:span text:style-name="T1"/></text:p>
              <text:p text:style-name="P2"><text:span text:style-name="T1">C×(100−M) = TC</text:span></text:p>
              <text:p text:style-name="P2"><text:span text:style-name="T1">N×(100−M) = TN</text:span></text:p>
              <text:p text:style-name="P2"><text:span text:style-name="T1"/></text:p>
              <text:p text:style-name="P2"><text:span text:style-name="T1">R​ = [TC1*​V1​+TC2*​V2​+TC3*V3+...] / [TN1​*V1​+TN2*​V2​+TN3*V3+...]</text:span></text:p>
              <text:p text:style-name="P2"><text:span text:style-name="T1">TC1*​V1​+TC2*​V2​+TC3*V3=R(TN1*​V1​+TN2*​V2​+TN3*V3)</text:span></text:p>
              <text:p text:style-name="P2"><text:span text:style-name="T1">TC1*V1+TC2*V2+TC3*V3=R*TN1*V1+R*TN2*V2+R*TN3*V3</text:span></text:p>
              <text:p text:style-name="P2"><text:span text:style-name="T1">TC1*V1+TC2*V2+TC3*V3 – R*TN1*V1-R*TN2*V2-R*TN3*V3 = 0</text:span></text:p>
              <text:p text:style-name="P2"><text:span text:style-name="T1">V1(TC1-R*TN1)+V2(TC2-R*TN2)+V3(TC3-R*TN3)=0</text:span></text:p>
              <text:p text:style-name="P2"><text:span text:style-name="T1"/></text:p>
              <text:p text:style-name="P2"><text:span text:style-name="T1">L=TC-R*TN</text:span></text:p>
              <text:p text:style-name="P2"><text:span text:style-name="T1"/></text:p>
              <text:p text:style-name="P2"><text:span text:style-name="T1">V1*L1+V2*L2+V3*L3=0</text:span></text:p>
              <text:p text:style-name="P2"><text:span text:style-name="T1">Vt = V1 + V2 + V3</text:span></text:p>
              <text:p text:style-name="P2"><text:span text:style-name="T1"/></text:p>
              <text:p text:style-name="P2"><text:span text:style-name="T1">Know 2 V</text:span></text:p>
              <text:p text:style-name="P2"><text:span text:style-name="T1">X=V1*L1</text:span></text:p>
              <text:p text:style-name="P2"><text:span text:style-name="T1">Y=V2*L2</text:span></text:p>
              <text:p text:style-name="P2"><text:span text:style-name="T1">X+Y=-V3*L3</text:span></text:p>
              <text:p text:style-name="P2"><text:span text:style-name="T1">V3=(X-Y)/L3</text:span></text:p>
              <text:p text:style-name="P2"><text:span text:style-name="T1"/></text:p>
              <text:p text:style-name="P2"><text:span text:style-name="T1">Know Vt</text:span></text:p>
              <text:p text:style-name="P2"><text:span text:style-name="T1">V1*L1+V2*L2+V3*L3=0</text:span></text:p>
              <text:p text:style-name="P2"><text:span text:style-name="T1">V3=Vt-V1-V2</text:span></text:p>
              <text:p text:style-name="P2"><text:span text:style-name="T1">V1*L1+V2*L2+(Vt-V1-V2)*L3=0</text:span></text:p>
              <text:p text:style-name="P2"><text:span text:style-name="T1">V1*L1+V2*L2=-(Vt-V1-V2)*L3</text:span></text:p>
              <text:p text:style-name="P2"><text:span text:style-name="T1">V1*L1+V2*L2=-Vt*L3+V1*L3+V2*L3</text:span></text:p>
              <text:p text:style-name="P2"><text:span text:style-name="T1">V1*L1=-Vt*L3+V1*L3+V2*L3-V2*L2</text:span></text:p>
              <text:p text:style-name="P2"><text:span text:style-name="T1">V1*L1=-Vt*L3+V1*L3+V2(L3-L2)</text:span></text:p>
              <text:p text:style-name="P2"><text:span text:style-name="T1">V1*L1+Vt*L3-V1*L3=V2(L3-L2)</text:span></text:p>
              <text:p text:style-name="P2"><text:span text:style-name="T1">V2=(V1*L1+Vt*L3-V1*L3)/(L3-L2)</text:span></text:p>
              <text:p text:style-name="P2"><text:span text:style-name="T1"/></text:p>
              <text:p text:style-name="P2"><text:span text:style-name="T1">V1=(-Vt*L3+V1*L3+V2(L3-L2))/L1</text:span></text:p>
              <text:p text:style-name="P2"><text:span text:style-name="T1"/></text:p>
              <text:p text:style-name="P2"><text:span text:style-name="T1">V2=([(-Vt*L3+V1*L3+V2(L3-L2))/L1]*L1+Vt*L3-[(-</text:span><text:span text:style-name="T1">Vt*L3+V1*L3+V2(L3-L2))/L1]*L3)/(L3-L2)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43" office:value-type="string" calcext:value-type="string">
            <text:p>RA</text:p>
          </table:table-cell>
          <table:table-cell table:style-name="ce148" table:formula="of:=[$Caracterizacao.J3]" office:value-type="float" office:value="1068.43760252525" calcext:value-type="float">
            <text:p>1068.4376</text:p>
          </table:table-cell>
          <table:table-cell table:style-name="ce143" table:formula="of:=[$Caracterizacao.I28]/1000" office:value-type="float" office:value="1.7786" calcext:value-type="float">
            <text:p>1.7786</text:p>
          </table:table-cell>
          <table:table-cell table:style-name="ce150" table:formula="of:=[$Caracterizacao.M28]/1000" office:value-type="float" office:value="0.28176" calcext:value-type="float">
            <text:p>0.28176</text:p>
          </table:table-cell>
          <table:table-cell table:style-name="ce195" table:formula="of:=[$Caracterizacao.I14]" office:value-type="float" office:value="536.39975270356" calcext:value-type="float">
            <text:p>536.3998</text:p>
          </table:table-cell>
          <table:table-cell table:style-name="ce148" table:formula="of:=[$Caracterizacao.N14]" office:value-type="float" office:value="520.806779510477" calcext:value-type="float">
            <text:p>520.8068</text:p>
          </table:table-cell>
          <table:table-cell table:number-columns-repeated="2"/>
          <table:table-cell table:style-name="ce51" office:value-type="string" calcext:value-type="string">
            <text:p>Substrato</text:p>
          </table:table-cell>
          <table:table-cell table:style-name="ce196" table:content-validation-name="val1" office:value-type="string" calcext:value-type="string">
            <text:p>RA</text:p>
          </table:table-cell>
          <table:table-cell table:style-name="ce202" table:content-validation-name="val1" office:value-type="string" calcext:value-type="string">
            <text:p>GL – BIO</text:p>
          </table:table-cell>
          <table:table-cell table:style-name="ce434" table:content-validation-name="val1" office:value-type="string" calcext:value-type="string">
            <text:p>GL – PURO</text:p>
          </table:table-cell>
          <table:table-cell table:style-name="ce61"/>
          <table:table-cell table:style-name="ce51" office:value-type="string" calcext:value-type="string">
            <text:p>Diluicao</text:p>
          </table:table-cell>
          <table:table-cell table:style-name="ce196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style-name="ce434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44" office:value-type="string" calcext:value-type="string">
            <text:p>GL – BIO</text:p>
          </table:table-cell>
          <table:table-cell table:style-name="ce149" table:formula="of:=[$Caracterizacao.J5]" office:value-type="float" office:value="893.074035663281" calcext:value-type="float">
            <text:p>893.0740</text:p>
          </table:table-cell>
          <table:table-cell table:style-name="ce144" table:formula="of:=[$Caracterizacao.I30]/1000" office:value-type="float" office:value="5.5232" calcext:value-type="float">
            <text:p>5.5232</text:p>
          </table:table-cell>
          <table:table-cell table:style-name="ce144" table:formula="of:=[$Caracterizacao.M30]/1000" office:value-type="float" office:value="0.4886" calcext:value-type="float">
            <text:p>0.4886</text:p>
          </table:table-cell>
          <table:table-cell table:style-name="ce149" table:formula="of:=[$Caracterizacao.I17]" office:value-type="float" office:value="867.723994290837" calcext:value-type="float">
            <text:p>867.7240</text:p>
          </table:table-cell>
          <table:table-cell table:style-name="ce149" table:formula="of:=[$Caracterizacao.N17]" office:value-type="float" office:value="868.654816122481" calcext:value-type="float">
            <text:p>868.6548</text:p>
          </table:table-cell>
          <table:table-cell table:number-columns-repeated="2"/>
          <table:table-cell table:style-name="ce48" office:value-type="string" calcext:value-type="string">
            <text:p>Densidade (g/L)</text:p>
          </table:table-cell>
          <table:table-cell table:style-name="ce54" table:formula="of:=INDEX([.$B$2:.$B$100];MATCH([.$J$2];[.$A$2:.$A$100];0))" office:value-type="float" office:value="1068.43760252525" calcext:value-type="float">
            <text:p>1068.437603</text:p>
          </table:table-cell>
          <table:table-cell table:style-name="ce58" table:formula="of:=INDEX([.$B$2:.$B$100];MATCH([.$K$2];[.$A$2:.$A$100];0))" office:value-type="float" office:value="893.074035663281" calcext:value-type="float">
            <text:p>893.074036</text:p>
          </table:table-cell>
          <table:table-cell table:style-name="ce435" table:formula="of:=INDEX([.$B$2:.$B$100];MATCH([.$L$2];[.$A$2:.$A$100];0))" office:value-type="float" office:value="1260" calcext:value-type="float">
            <text:p>1260.000000</text:p>
          </table:table-cell>
          <table:table-cell table:style-name="ce61"/>
          <table:table-cell table:style-name="ce48" office:value-type="string" calcext:value-type="string">
            <text:p>Densidade ajustada (g/L)</text:p>
          </table:table-cell>
          <table:table-cell table:style-name="ce54" table:formula="of:=[.J3]" office:value-type="float" office:value="1068.43760252525" calcext:value-type="float">
            <text:p>1068.437603</text:p>
          </table:table-cell>
          <table:table-cell table:style-name="ce58" table:formula="of:=[.K3]" office:value-type="float" office:value="893.074035663281" calcext:value-type="float">
            <text:p>893.074036</text:p>
          </table:table-cell>
          <table:table-cell table:style-name="ce435" table:formula="of:=[.L3]" office:value-type="float" office:value="1260" calcext:value-type="float">
            <text:p>1260.00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 – PURO</text:p>
          </table:table-cell>
          <table:table-cell table:style-name="ce145" office:value-type="float" office:value="1260" calcext:value-type="float">
            <text:p>1260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00" calcext:value-type="float">
            <text:p>1000</text:p>
          </table:table-cell>
          <table:table-cell table:number-columns-repeated="2"/>
          <table:table-cell table:style-name="ce48" office:value-type="string" calcext:value-type="string">
            <text:p>TC (g/L)</text:p>
          </table:table-cell>
          <table:table-cell table:style-name="ce54" table:formula="of:=INDEX([.$C$2:.$C$100];MATCH([.$J$2];[.$A$2:.$A$100];0))" office:value-type="float" office:value="1.7786" calcext:value-type="float">
            <text:p>1.778600</text:p>
          </table:table-cell>
          <table:table-cell table:style-name="ce58" table:formula="of:=INDEX([.$C$2:.$C$100];MATCH([.$K$2];[.$A$2:.$A$100];0))" office:value-type="float" office:value="5.5232" calcext:value-type="float">
            <text:p>5.523200</text:p>
          </table:table-cell>
          <table:table-cell table:style-name="ce435" table:formula="of:=INDEX([.$C$2:.$C$100];MATCH([.$L$2];[.$A$2:.$A$100];0))" office:value-type="float" office:value="493" calcext:value-type="float">
            <text:p>493.000000</text:p>
          </table:table-cell>
          <table:table-cell table:style-name="ce61"/>
          <table:table-cell table:style-name="ce48" office:value-type="string" calcext:value-type="string">
            <text:p>TC ajustado (g/L)</text:p>
          </table:table-cell>
          <table:table-cell table:style-name="ce54" table:formula="of:=[.J4]/[.$O$2]" office:value-type="float" office:value="1.7786" calcext:value-type="float">
            <text:p>1.778600</text:p>
          </table:table-cell>
          <table:table-cell table:style-name="ce58" table:formula="of:=[.K4]/[.$P$2]" office:value-type="float" office:value="5.5232" calcext:value-type="float">
            <text:p>5.523200</text:p>
          </table:table-cell>
          <table:table-cell table:style-name="ce435" table:formula="of:=[.L4]/[.$Q$2]" office:value-type="float" office:value="4.93" calcext:value-type="float">
            <text:p>4.93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ucose</text:p>
          </table:table-cell>
          <table:table-cell table:style-name="ce145" office:value-type="float" office:value="1540" calcext:value-type="float">
            <text:p>1540</text:p>
          </table:table-cell>
          <table:table-cell table:style-name="ce145" office:value-type="float" office:value="616" calcext:value-type="float">
            <text:p>61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540" calcext:value-type="float">
            <text:p>1540</text:p>
          </table:table-cell>
          <table:table-cell table:number-columns-repeated="2"/>
          <table:table-cell table:style-name="ce48" office:value-type="string" calcext:value-type="string">
            <text:p>TN (g/L)</text:p>
          </table:table-cell>
          <table:table-cell table:style-name="ce54" table:formula="of:=INDEX([.$D$2:.$D$100];MATCH([.$J$2];[.$A$2:.$A$100];0))" office:value-type="float" office:value="0.28176" calcext:value-type="float">
            <text:p>0.281760</text:p>
          </table:table-cell>
          <table:table-cell table:style-name="ce58" table:formula="of:=INDEX([.$D$2:.$D$100];MATCH([.$K$2];[.$A$2:.$A$100];0))" office:value-type="float" office:value="0.4886" calcext:value-type="float">
            <text:p>0.488600</text:p>
          </table:table-cell>
          <table:table-cell table:style-name="ce435" table:formula="of:=INDEX([.$D$2:.$D$100];MATCH([.$L$2];[.$A$2:.$A$100];0))" office:value-type="float" office:value="0" calcext:value-type="float">
            <text:p>0.000000</text:p>
          </table:table-cell>
          <table:table-cell/>
          <table:table-cell table:style-name="ce48" office:value-type="string" calcext:value-type="string">
            <text:p>TN ajustado (g/L)</text:p>
          </table:table-cell>
          <table:table-cell table:style-name="ce54" table:formula="of:=[.J5]/[.$O$2]" office:value-type="float" office:value="0.28176" calcext:value-type="float">
            <text:p>0.281760</text:p>
          </table:table-cell>
          <table:table-cell table:style-name="ce58" table:formula="of:=[.K5]/[.$P$2]" office:value-type="float" office:value="0.4886" calcext:value-type="float">
            <text:p>0.488600</text:p>
          </table:table-cell>
          <table:table-cell table:style-name="ce435" table:formula="of:=[.L5]/[.$Q$2]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8" office:value-type="string" calcext:value-type="string">
            <text:p>TS (g/L)</text:p>
          </table:table-cell>
          <table:table-cell table:style-name="ce54" table:formula="of:=INDEX([.$E$2:.$E$100];MATCH([.$J$2];[.$A$2:.$A$100];0))" office:value-type="float" office:value="536.39975270356" calcext:value-type="float">
            <text:p>536.399753</text:p>
          </table:table-cell>
          <table:table-cell table:style-name="ce58" table:formula="of:=INDEX([.$E$2:.$E$100];MATCH([.$K$2];[.$A$2:.$A$100];0))" office:value-type="float" office:value="867.723994290837" calcext:value-type="float">
            <text:p>867.723994</text:p>
          </table:table-cell>
          <table:table-cell table:style-name="ce435" table:formula="of:=INDEX([.$E$2:.$E$100];MATCH([.$L$2];[.$A$2:.$A$100];0))" office:value-type="float" office:value="1000" calcext:value-type="float">
            <text:p>1000.000000</text:p>
          </table:table-cell>
          <table:table-cell/>
          <table:table-cell table:style-name="ce48" office:value-type="string" calcext:value-type="string">
            <text:p>TS ajustado (g/L)</text:p>
          </table:table-cell>
          <table:table-cell table:style-name="ce54" table:formula="of:=[.J6]/[.$O$2]" office:value-type="float" office:value="536.39975270356" calcext:value-type="float">
            <text:p>536.399753</text:p>
          </table:table-cell>
          <table:table-cell table:style-name="ce58" table:formula="of:=[.K6]/[.$P$2]" office:value-type="float" office:value="867.723994290837" calcext:value-type="float">
            <text:p>867.723994</text:p>
          </table:table-cell>
          <table:table-cell table:style-name="ce435" table:formula="of:=[.L6]/[.$Q$2]" office:value-type="float" office:value="10" calcext:value-type="float">
            <text:p>1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9" office:value-type="string" calcext:value-type="string">
            <text:p>VS (g/L)</text:p>
          </table:table-cell>
          <table:table-cell table:style-name="ce55" table:formula="of:=INDEX([.$F$2:.$F$100];MATCH([.$J$2];[.$A$2:.$A$100];0))" office:value-type="float" office:value="520.806779510477" calcext:value-type="float">
            <text:p>520.806780</text:p>
          </table:table-cell>
          <table:table-cell table:style-name="ce59" table:formula="of:=INDEX([.$F$2:.$F$100];MATCH([.$K$2];[.$A$2:.$A$100];0))" office:value-type="float" office:value="868.654816122481" calcext:value-type="float">
            <text:p>868.654816</text:p>
          </table:table-cell>
          <table:table-cell table:style-name="ce436" table:formula="of:=INDEX([.$F$2:.$F$100];MATCH([.$L$2];[.$A$2:.$A$100];0))" office:value-type="float" office:value="1000" calcext:value-type="float">
            <text:p>1000.000000</text:p>
          </table:table-cell>
          <table:table-cell/>
          <table:table-cell table:style-name="ce49" office:value-type="string" calcext:value-type="string">
            <text:p>VS ajustado (g/L)</text:p>
          </table:table-cell>
          <table:table-cell table:style-name="ce55" table:formula="of:=[.J7]/[.$O$2]" office:value-type="float" office:value="520.806779510477" calcext:value-type="float">
            <text:p>520.806780</text:p>
          </table:table-cell>
          <table:table-cell table:style-name="ce59" table:formula="of:=[.K7]/[.$P$2]" office:value-type="float" office:value="868.654816122481" calcext:value-type="float">
            <text:p>868.654816</text:p>
          </table:table-cell>
          <table:table-cell table:style-name="ce435" table:formula="of:=[.L7]/[.$Q$2]" office:value-type="float" office:value="10" calcext:value-type="float">
            <text:p>10.000000</text:p>
          </table:table-cell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87" office:value-type="string" calcext:value-type="string" table:number-columns-spanned="7" table:number-rows-spanned="1">
            <text:p>C/N Calculation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 table:number-columns-spanned="2" table:number-rows-spanned="1">
            <text:p>Proporcao</text:p>
          </table:table-cell>
          <table:covered-table-cell table:style-name="ce174"/>
          <table:table-cell/>
          <table:table-cell table:style-name="ce161" office:value-type="string" calcext:value-type="string">
            <text:p>-</text:p>
          </table:table-cell>
          <table:table-cell table:style-name="ce187" office:value-type="string" calcext:value-type="string">
            <text:p>Volume (L)</text:p>
          </table:table-cell>
          <table:table-cell table:style-name="ce187" office:value-type="string" calcext:value-type="string">
            <text:p>Multiplicador (g/L)</text:p>
          </table:table-cell>
          <table:table-cell table:style-name="ce99" office:value-type="string" calcext:value-type="string">
            <text:p>Value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4" office:value-type="string" calcext:value-type="string">
            <text:p>C</text:p>
          </table:table-cell>
          <table:table-cell table:style-name="ce175" office:value-type="float" office:value="25" calcext:value-type="float">
            <text:p>25</text:p>
          </table:table-cell>
          <table:table-cell/>
          <table:table-cell table:style-name="ce155" office:value-type="string" calcext:value-type="string">
            <text:p>Sub 1</text:p>
          </table:table-cell>
          <table:table-cell table:style-name="ce439" office:value-type="float" office:value="1" calcext:value-type="float">
            <text:p>1</text:p>
          </table:table-cell>
          <table:table-cell table:style-name="ce86" table:formula="of:=[.O$4]-([.$J$15]*[.O$5])" office:value-type="float" office:value="-5.2654" calcext:value-type="float">
            <text:p>-5.265400</text:p>
          </table:table-cell>
          <table:table-cell table:style-name="ce82" table:formula="of:=[.N13]*[.M13]" office:value-type="float" office:value="-5.2654" calcext:value-type="float">
            <text:p>-5.265400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N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155" office:value-type="string" calcext:value-type="string">
            <text:p>Sub 2</text:p>
          </table:table-cell>
          <table:table-cell table:style-name="ce439" office:value-type="float" office:value="1" calcext:value-type="float">
            <text:p>1</text:p>
          </table:table-cell>
          <table:table-cell table:style-name="ce86" table:formula="of:=[.P$4]-([.$J$15]*[.P$5])" office:value-type="float" office:value="-6.6918" calcext:value-type="float">
            <text:p>-6.691800</text:p>
          </table:table-cell>
          <table:table-cell table:style-name="ce82" table:formula="of:=[.N14]*[.M14]" office:value-type="float" office:value="-6.6918" calcext:value-type="float">
            <text:p>-6.691800</text:p>
          </table:table-cell>
          <table:table-cell table:number-columns-repeated="3"/>
        </table:table-row>
        <table:table-row table:style-name="ro2">
          <table:table-cell table:style-name="ce145" table:number-columns-repeated="6"/>
          <table:table-cell table:number-columns-repeated="2"/>
          <table:table-cell table:style-name="ce226" office:value-type="string" calcext:value-type="string">
            <text:p>C/N</text:p>
          </table:table-cell>
          <table:table-cell table:style-name="ce178" table:formula="of:=[.J13]/[.J14]" office:value-type="float" office:value="25" calcext:value-type="float">
            <text:p>25.0000</text:p>
          </table:table-cell>
          <table:table-cell/>
          <table:table-cell table:style-name="ce226" office:value-type="string" calcext:value-type="string">
            <text:p>Sub 3</text:p>
          </table:table-cell>
          <table:table-cell table:style-name="ce440" office:value-type="float" office:value="1" calcext:value-type="float">
            <text:p>1</text:p>
          </table:table-cell>
          <table:table-cell table:style-name="ce459" table:formula="of:=[.Q$4]-([.$J$15]*[.Q$5])" office:value-type="float" office:value="4.93" calcext:value-type="float">
            <text:p>4.930000</text:p>
          </table:table-cell>
          <table:table-cell table:style-name="ce464" table:formula="of:=[.N15]*[.M15]" office:value-type="float" office:value="4.93" calcext:value-type="float">
            <text:p>4.930000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87" office:value-type="string" calcext:value-type="string">
            <text:p>Volume (L)</text:p>
          </table:table-cell>
          <table:table-cell table:style-name="ce187" office:value-type="string" calcext:value-type="string">
            <text:p>Volume (mL)</text:p>
          </table:table-cell>
          <table:table-cell table:style-name="ce522" office:value-type="string" calcext:value-type="string" table:number-columns-spanned="2" table:number-rows-spanned="1">
            <text:p>Quantidade Carbono (g)</text:p>
          </table:table-cell>
          <table:covered-table-cell table:style-name="ce522"/>
          <table:table-cell table:style-name="ce600" office:value-type="string" calcext:value-type="string" table:number-columns-spanned="2" table:number-rows-spanned="1">
            <text:p>Concentracao Carbono (g/L)</text:p>
          </table:table-cell>
          <table:covered-table-cell table:style-name="ce600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1</text:p>
          </table:table-cell>
          <table:table-cell table:style-name="ce546" table:formula="of:=[.$M$13]" office:value-type="float" office:value="1" calcext:value-type="float">
            <text:p>1.000000</text:p>
          </table:table-cell>
          <table:table-cell table:style-name="ce546" table:formula="of:=[.$J19]*1000" office:value-type="float" office:value="1000" calcext:value-type="float">
            <text:p>1000.000000</text:p>
          </table:table-cell>
          <table:table-cell table:style-name="ce546" table:formula="of:=[.$J19]*[.$O$4]" office:value-type="float" office:value="1.7786" calcext:value-type="float" table:number-columns-spanned="2" table:number-rows-spanned="1">
            <text:p>1.778600</text:p>
          </table:table-cell>
          <table:covered-table-cell table:style-name="ce546"/>
          <table:table-cell table:style-name="ce586" table:formula="of:=[.$L19]/[.$J19]" office:value-type="float" office:value="1.7786" calcext:value-type="float" table:number-columns-spanned="2" table:number-rows-spanned="1">
            <text:p>1.778600</text:p>
          </table:table-cell>
          <table:covered-table-cell table:style-name="ce58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2</text:p>
          </table:table-cell>
          <table:table-cell table:style-name="ce546" table:formula="of:=[.$M$14]" office:value-type="float" office:value="1" calcext:value-type="float">
            <text:p>1.000000</text:p>
          </table:table-cell>
          <table:table-cell table:style-name="ce546" table:formula="of:=[.$J20]*1000" office:value-type="float" office:value="1000" calcext:value-type="float">
            <text:p>1000.000000</text:p>
          </table:table-cell>
          <table:table-cell table:style-name="ce546" table:formula="of:=[.$J20]*[.$P$4]" office:value-type="float" office:value="5.5232" calcext:value-type="float" table:number-columns-spanned="2" table:number-rows-spanned="1">
            <text:p>5.523200</text:p>
          </table:table-cell>
          <table:covered-table-cell table:style-name="ce546"/>
          <table:table-cell table:style-name="ce586" table:formula="of:=[.$L20]/[.$J20]" office:value-type="float" office:value="5.5232" calcext:value-type="float" table:number-columns-spanned="2" table:number-rows-spanned="1">
            <text:p>5.523200</text:p>
          </table:table-cell>
          <table:covered-table-cell table:style-name="ce58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3</text:p>
          </table:table-cell>
          <table:table-cell table:style-name="ce546" table:formula="of:=([.$O$13]-[.$O$14])/[.$N$15]" office:value-type="float" office:value="0.289330628803246" calcext:value-type="float">
            <text:p>0.289331</text:p>
          </table:table-cell>
          <table:table-cell table:style-name="ce546" table:formula="of:=[.$J21]*1000" office:value-type="float" office:value="289.330628803246" calcext:value-type="float">
            <text:p>289.330629</text:p>
          </table:table-cell>
          <table:table-cell table:style-name="ce546" table:formula="of:=[.$J21]*[.$Q$4]" office:value-type="float" office:value="1.4264" calcext:value-type="float" table:number-columns-spanned="2" table:number-rows-spanned="1">
            <text:p>1.426400</text:p>
          </table:table-cell>
          <table:covered-table-cell table:style-name="ce546"/>
          <table:table-cell table:style-name="ce586" table:formula="of:=[.$L21]/[.$J21]" office:value-type="float" office:value="4.93" calcext:value-type="float" table:number-columns-spanned="2" table:number-rows-spanned="1">
            <text:p>4.930000</text:p>
          </table:table-cell>
          <table:covered-table-cell table:style-name="ce58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Mistura</text:p>
          </table:table-cell>
          <table:table-cell table:style-name="ce546" table:formula="of:=SUM([.J19:.J21])" office:value-type="float" office:value="2.28933062880325" calcext:value-type="float">
            <text:p>2.289331</text:p>
          </table:table-cell>
          <table:table-cell table:style-name="ce546" table:formula="of:=SUM([.K19:.K21])" office:value-type="float" office:value="2289.33062880325" calcext:value-type="float">
            <text:p>2289.330629</text:p>
          </table:table-cell>
          <table:table-cell table:style-name="ce546" table:formula="of:=SUM([.$L19:.$L21])" office:value-type="float" office:value="8.7282" calcext:value-type="float" table:number-columns-spanned="2" table:number-rows-spanned="1">
            <text:p>8.728200</text:p>
          </table:table-cell>
          <table:covered-table-cell table:style-name="ce546"/>
          <table:table-cell table:style-name="ce586" table:formula="of:=[.$L22]/[.$J22]" office:value-type="float" office:value="3.81255546498441" calcext:value-type="float" table:number-columns-spanned="2" table:number-rows-spanned="1">
            <text:p>3.812555</text:p>
          </table:table-cell>
          <table:covered-table-cell table:style-name="ce58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360" table:formula="of:=[.$M$13]" office:value-type="float" office:value="1" calcext:value-type="float">
            <text:p>1.000000</text:p>
          </table:table-cell>
          <table:table-cell table:style-name="ce360" table:formula="of:=[.$J23]*1000" office:value-type="float" office:value="1000" calcext:value-type="float">
            <text:p>1000.000000</text:p>
          </table:table-cell>
          <table:table-cell table:style-name="ce360" table:formula="of:=[.$J23]*[.$O$4]" office:value-type="float" office:value="1.7786" calcext:value-type="float" table:number-columns-spanned="2" table:number-rows-spanned="1">
            <text:p>1.778600</text:p>
          </table:table-cell>
          <table:covered-table-cell table:style-name="ce360"/>
          <table:table-cell table:style-name="ce308" table:formula="of:=[.$L23]/[.$J23]" office:value-type="float" office:value="1.7786" calcext:value-type="float" table:number-columns-spanned="2" table:number-rows-spanned="1">
            <text:p>1.7786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table-cell table:style-name="ce360" table:formula="of:=[.$M$14]" office:value-type="float" office:value="1" calcext:value-type="float">
            <text:p>1.000000</text:p>
          </table:table-cell>
          <table:table-cell table:style-name="ce360" table:formula="of:=[.$J24]*1000" office:value-type="float" office:value="1000" calcext:value-type="float">
            <text:p>1000.000000</text:p>
          </table:table-cell>
          <table:table-cell table:style-name="ce360" table:formula="of:=[.$J24]*[.$P$4]" office:value-type="float" office:value="5.5232" calcext:value-type="float" table:number-columns-spanned="2" table:number-rows-spanned="1">
            <text:p>5.523200</text:p>
          </table:table-cell>
          <table:covered-table-cell table:style-name="ce360"/>
          <table:table-cell table:style-name="ce308" table:formula="of:=[.$L24]/[.$J24]" office:value-type="float" office:value="5.5232" calcext:value-type="float" table:number-columns-spanned="2" table:number-rows-spanned="1">
            <text:p>5.5232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3</text:p>
          </table:table-cell>
          <table:table-cell table:style-name="ce360" table:formula="of:=([.$O$14]-[.$O$13])/[.$N$15]" office:value-type="float" office:value="-0.289330628803246" calcext:value-type="float">
            <text:p>-0.289331</text:p>
          </table:table-cell>
          <table:table-cell table:style-name="ce360" table:formula="of:=[.$J25]*1000" office:value-type="float" office:value="-289.330628803246" calcext:value-type="float">
            <text:p>-289.330629</text:p>
          </table:table-cell>
          <table:table-cell table:style-name="ce360" table:formula="of:=[.$J25]*[.$Q$4]" office:value-type="float" office:value="-1.4264" calcext:value-type="float" table:number-columns-spanned="2" table:number-rows-spanned="1">
            <text:p>-1.426400</text:p>
          </table:table-cell>
          <table:covered-table-cell table:style-name="ce360"/>
          <table:table-cell table:style-name="ce308" table:formula="of:=[.$L25]/[.$J25]" office:value-type="float" office:value="4.93" calcext:value-type="float" table:number-columns-spanned="2" table:number-rows-spanned="1">
            <text:p>4.9300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Mistura</text:p>
          </table:table-cell>
          <table:table-cell table:style-name="ce360" table:formula="of:=SUM([.J23:.J25])" office:value-type="float" office:value="1.71066937119675" calcext:value-type="float">
            <text:p>1.710669</text:p>
          </table:table-cell>
          <table:table-cell table:style-name="ce360" table:formula="of:=SUM([.K23:.K25])" office:value-type="float" office:value="1710.66937119675" calcext:value-type="float">
            <text:p>1710.669371</text:p>
          </table:table-cell>
          <table:table-cell table:style-name="ce360" table:formula="of:=SUM([.$L23:.$L25])" office:value-type="float" office:value="5.8754" calcext:value-type="float" table:number-columns-spanned="2" table:number-rows-spanned="1">
            <text:p>5.875400</text:p>
          </table:table-cell>
          <table:covered-table-cell table:style-name="ce360"/>
          <table:table-cell table:style-name="ce308" table:formula="of:=[.$L26]/[.$J26]" office:value-type="float" office:value="3.4345619901347" calcext:value-type="float" table:number-columns-spanned="2" table:number-rows-spanned="1">
            <text:p>3.434562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3" table:formula="of:=[.$M$13]" office:value-type="float" office:value="1" calcext:value-type="float">
            <text:p>1.000000</text:p>
          </table:table-cell>
          <table:table-cell table:style-name="ce293" table:formula="of:=[.$J27]*1000" office:value-type="float" office:value="1000" calcext:value-type="float">
            <text:p>1000.000000</text:p>
          </table:table-cell>
          <table:table-cell table:style-name="ce293" table:formula="of:=[.$J27]*[.$O$4]" office:value-type="float" office:value="1.7786" calcext:value-type="float" table:number-columns-spanned="2" table:number-rows-spanned="1">
            <text:p>1.778600</text:p>
          </table:table-cell>
          <table:covered-table-cell table:style-name="ce293"/>
          <table:table-cell table:style-name="ce309" table:formula="of:=[.$L27]/[.$J27]" office:value-type="float" office:value="1.7786" calcext:value-type="float" table:number-columns-spanned="2" table:number-rows-spanned="1">
            <text:p>1.7786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2</text:p>
          </table:table-cell>
          <table:table-cell table:style-name="ce293" table:formula="of:=([.$O$13]-[.$O$15])/[.$N$14]" office:value-type="float" office:value="1.52356615559341" calcext:value-type="float">
            <text:p>1.523566</text:p>
          </table:table-cell>
          <table:table-cell table:style-name="ce293" table:formula="of:=[.$J28]*1000" office:value-type="float" office:value="1523.56615559341" calcext:value-type="float">
            <text:p>1523.566156</text:p>
          </table:table-cell>
          <table:table-cell table:style-name="ce293" table:formula="of:=[.$J28]*[.$P$4]" office:value-type="float" office:value="8.41496059057354" calcext:value-type="float" table:number-columns-spanned="2" table:number-rows-spanned="1">
            <text:p>8.414961</text:p>
          </table:table-cell>
          <table:covered-table-cell table:style-name="ce293"/>
          <table:table-cell table:style-name="ce309" table:formula="of:=[.$L28]/[.$J28]" office:value-type="float" office:value="5.5232" calcext:value-type="float" table:number-columns-spanned="2" table:number-rows-spanned="1">
            <text:p>5.5232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3</text:p>
          </table:table-cell>
          <table:table-cell table:style-name="ce293" table:formula="of:=[.$M$15]" office:value-type="float" office:value="1" calcext:value-type="float">
            <text:p>1.000000</text:p>
          </table:table-cell>
          <table:table-cell table:style-name="ce293" table:formula="of:=[.$J29]*1000" office:value-type="float" office:value="1000" calcext:value-type="float">
            <text:p>1000.000000</text:p>
          </table:table-cell>
          <table:table-cell table:style-name="ce293" table:formula="of:=[.$J29]*[.$Q$4]" office:value-type="float" office:value="4.93" calcext:value-type="float" table:number-columns-spanned="2" table:number-rows-spanned="1">
            <text:p>4.930000</text:p>
          </table:table-cell>
          <table:covered-table-cell table:style-name="ce293"/>
          <table:table-cell table:style-name="ce309" table:formula="of:=[.$L29]/[.$J29]" office:value-type="float" office:value="4.93" calcext:value-type="float" table:number-columns-spanned="2" table:number-rows-spanned="1">
            <text:p>4.9300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Mistura</text:p>
          </table:table-cell>
          <table:table-cell table:style-name="ce293" table:formula="of:=SUM([.J27:.J29])" office:value-type="float" office:value="3.52356615559341" calcext:value-type="float">
            <text:p>3.523566</text:p>
          </table:table-cell>
          <table:table-cell table:style-name="ce293" table:formula="of:=SUM([.K27:.K29])" office:value-type="float" office:value="3523.56615559341" calcext:value-type="float">
            <text:p>3523.566156</text:p>
          </table:table-cell>
          <table:table-cell table:style-name="ce293" table:formula="of:=SUM([.$L27:.$L29])" office:value-type="float" office:value="15.1235605905735" calcext:value-type="float" table:number-columns-spanned="2" table:number-rows-spanned="1">
            <text:p>15.123561</text:p>
          </table:table-cell>
          <table:covered-table-cell table:style-name="ce293"/>
          <table:table-cell table:style-name="ce309" table:formula="of:=[.$L30]/[.$J30]" office:value-type="float" office:value="4.29211767929089" calcext:value-type="float" table:number-columns-spanned="2" table:number-rows-spanned="1">
            <text:p>4.292118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401" table:formula="of:=[.$M$13]" office:value-type="float" office:value="1" calcext:value-type="float">
            <text:p>1.000000</text:p>
          </table:table-cell>
          <table:table-cell table:style-name="ce401" table:formula="of:=[.$J31]*1000" office:value-type="float" office:value="1000" calcext:value-type="float">
            <text:p>1000.000000</text:p>
          </table:table-cell>
          <table:table-cell table:style-name="ce401" table:formula="of:=[.$J31]*[.$O$4]" office:value-type="float" office:value="1.7786" calcext:value-type="float" table:number-columns-spanned="2" table:number-rows-spanned="1">
            <text:p>1.778600</text:p>
          </table:table-cell>
          <table:covered-table-cell table:style-name="ce401"/>
          <table:table-cell table:style-name="ce306" table:formula="of:=[.$L31]/[.$J31]" office:value-type="float" office:value="1.7786" calcext:value-type="float" table:number-columns-spanned="2" table:number-rows-spanned="1">
            <text:p>1.7786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table-cell table:style-name="ce401" table:formula="of:=([.$O$15]-[.$O$13])/[.$N$14]" office:value-type="float" office:value="-1.52356615559341" calcext:value-type="float">
            <text:p>-1.523566</text:p>
          </table:table-cell>
          <table:table-cell table:style-name="ce401" table:formula="of:=[.$J32]*1000" office:value-type="float" office:value="-1523.56615559341" calcext:value-type="float">
            <text:p>-1523.566156</text:p>
          </table:table-cell>
          <table:table-cell table:style-name="ce401" table:formula="of:=[.$J32]*[.$P$4]" office:value-type="float" office:value="-8.41496059057354" calcext:value-type="float" table:number-columns-spanned="2" table:number-rows-spanned="1">
            <text:p>-8.414961</text:p>
          </table:table-cell>
          <table:covered-table-cell table:style-name="ce401"/>
          <table:table-cell table:style-name="ce306" table:formula="of:=[.$L32]/[.$J32]" office:value-type="float" office:value="5.5232" calcext:value-type="float" table:number-columns-spanned="2" table:number-rows-spanned="1">
            <text:p>5.5232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3</text:p>
          </table:table-cell>
          <table:table-cell table:style-name="ce401" table:formula="of:=[.$M$15]" office:value-type="float" office:value="1" calcext:value-type="float">
            <text:p>1.000000</text:p>
          </table:table-cell>
          <table:table-cell table:style-name="ce401" table:formula="of:=[.$J33]*1000" office:value-type="float" office:value="1000" calcext:value-type="float">
            <text:p>1000.000000</text:p>
          </table:table-cell>
          <table:table-cell table:style-name="ce401" table:formula="of:=[.$J33]*[.$Q$4]" office:value-type="float" office:value="4.93" calcext:value-type="float" table:number-columns-spanned="2" table:number-rows-spanned="1">
            <text:p>4.930000</text:p>
          </table:table-cell>
          <table:covered-table-cell table:style-name="ce401"/>
          <table:table-cell table:style-name="ce306" table:formula="of:=[.$L33]/[.$J33]" office:value-type="float" office:value="4.93" calcext:value-type="float" table:number-columns-spanned="2" table:number-rows-spanned="1">
            <text:p>4.9300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Mistura</text:p>
          </table:table-cell>
          <table:table-cell table:style-name="ce401" table:formula="of:=SUM([.J31:.J33])" office:value-type="float" office:value="0.476433844406588" calcext:value-type="float">
            <text:p>0.476434</text:p>
          </table:table-cell>
          <table:table-cell table:style-name="ce401" table:formula="of:=SUM([.K31:.K33])" office:value-type="float" office:value="476.433844406588" calcext:value-type="float">
            <text:p>476.433844</text:p>
          </table:table-cell>
          <table:table-cell table:style-name="ce401" table:formula="of:=SUM([.$L31:.$L33])" office:value-type="float" office:value="-1.70636059057354" calcext:value-type="float" table:number-columns-spanned="2" table:number-rows-spanned="1">
            <text:p>-1.706361</text:p>
          </table:table-cell>
          <table:covered-table-cell table:style-name="ce401"/>
          <table:table-cell table:style-name="ce306" table:formula="of:=[.$L34]/[.$J34]" office:value-type="float" office:value="-3.58152681764004" calcext:value-type="float" table:number-columns-spanned="2" table:number-rows-spanned="1">
            <text:p>-3.581527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408" table:formula="of:=([.$O$14]-[.$O$15])/[.$N$13]" office:value-type="float" office:value="2.20720173206214" calcext:value-type="float">
            <text:p>2.207202</text:p>
          </table:table-cell>
          <table:table-cell table:style-name="ce408" table:formula="of:=[.$J35]*1000" office:value-type="float" office:value="2207.20173206214" calcext:value-type="float">
            <text:p>2207.201732</text:p>
          </table:table-cell>
          <table:table-cell table:style-name="ce408" table:formula="of:=[.$J35]*[.$O$4]" office:value-type="float" office:value="3.92572900064573" calcext:value-type="float" table:number-columns-spanned="2" table:number-rows-spanned="1">
            <text:p>3.925729</text:p>
          </table:table-cell>
          <table:covered-table-cell table:style-name="ce408"/>
          <table:table-cell table:style-name="ce307" table:formula="of:=[.$L35]/[.$J35]" office:value-type="float" office:value="1.7786" calcext:value-type="float" table:number-columns-spanned="2" table:number-rows-spanned="1">
            <text:p>1.7786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table-cell table:style-name="ce408" table:formula="of:=[.$M$14]" office:value-type="float" office:value="1" calcext:value-type="float">
            <text:p>1.000000</text:p>
          </table:table-cell>
          <table:table-cell table:style-name="ce408" table:formula="of:=[.$J36]*1000" office:value-type="float" office:value="1000" calcext:value-type="float">
            <text:p>1000.000000</text:p>
          </table:table-cell>
          <table:table-cell table:style-name="ce408" table:formula="of:=[.$J36]*[.$P$4]" office:value-type="float" office:value="5.5232" calcext:value-type="float" table:number-columns-spanned="2" table:number-rows-spanned="1">
            <text:p>5.523200</text:p>
          </table:table-cell>
          <table:covered-table-cell table:style-name="ce408"/>
          <table:table-cell table:style-name="ce307" table:formula="of:=[.$L36]/[.$J36]" office:value-type="float" office:value="5.5232" calcext:value-type="float" table:number-columns-spanned="2" table:number-rows-spanned="1">
            <text:p>5.5232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3</text:p>
          </table:table-cell>
          <table:table-cell table:style-name="ce408" table:formula="of:=[.$M$15]" office:value-type="float" office:value="1" calcext:value-type="float">
            <text:p>1.000000</text:p>
          </table:table-cell>
          <table:table-cell table:style-name="ce408" table:formula="of:=[.$J37]*1000" office:value-type="float" office:value="1000" calcext:value-type="float">
            <text:p>1000.000000</text:p>
          </table:table-cell>
          <table:table-cell table:style-name="ce408" table:formula="of:=[.$J37]*[.$Q$4]" office:value-type="float" office:value="4.93" calcext:value-type="float" table:number-columns-spanned="2" table:number-rows-spanned="1">
            <text:p>4.930000</text:p>
          </table:table-cell>
          <table:covered-table-cell table:style-name="ce408"/>
          <table:table-cell table:style-name="ce307" table:formula="of:=[.$L37]/[.$J37]" office:value-type="float" office:value="4.93" calcext:value-type="float" table:number-columns-spanned="2" table:number-rows-spanned="1">
            <text:p>4.9300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Mistura</text:p>
          </table:table-cell>
          <table:table-cell table:style-name="ce408" table:formula="of:=SUM([.J35:.J37])" office:value-type="float" office:value="4.20720173206214" calcext:value-type="float">
            <text:p>4.207202</text:p>
          </table:table-cell>
          <table:table-cell table:style-name="ce408" table:formula="of:=SUM([.K35:.K37])" office:value-type="float" office:value="4207.20173206214" calcext:value-type="float">
            <text:p>4207.201732</text:p>
          </table:table-cell>
          <table:table-cell table:style-name="ce408" table:formula="of:=SUM([.$L35:.$L37])" office:value-type="float" office:value="14.3789290006457" calcext:value-type="float" table:number-columns-spanned="2" table:number-rows-spanned="1">
            <text:p>14.378929</text:p>
          </table:table-cell>
          <table:covered-table-cell table:style-name="ce408"/>
          <table:table-cell table:style-name="ce307" table:formula="of:=[.$L38]/[.$J38]" office:value-type="float" office:value="3.41769421016043" calcext:value-type="float" table:number-columns-spanned="2" table:number-rows-spanned="1">
            <text:p>3.417694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1</text:p>
          </table:table-cell>
          <table:table-cell table:style-name="ce547" table:formula="of:=([.$O$15]-[.$O$14])/[.$N$13]" office:value-type="float" office:value="-2.20720173206214" calcext:value-type="float">
            <text:p>-2.207202</text:p>
          </table:table-cell>
          <table:table-cell table:style-name="ce547" table:formula="of:=[.$J39]*1000" office:value-type="float" office:value="-2207.20173206214" calcext:value-type="float">
            <text:p>-2207.201732</text:p>
          </table:table-cell>
          <table:table-cell table:style-name="ce547" table:formula="of:=[.$J39]*[.$O$4]" office:value-type="float" office:value="-3.92572900064573" calcext:value-type="float" table:number-columns-spanned="2" table:number-rows-spanned="1">
            <text:p>-3.925729</text:p>
          </table:table-cell>
          <table:covered-table-cell table:style-name="ce547"/>
          <table:table-cell table:style-name="ce461" table:formula="of:=[.$L39]/[.$J39]" office:value-type="float" office:value="1.7786" calcext:value-type="float" table:number-columns-spanned="2" table:number-rows-spanned="1">
            <text:p>1.7786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2</text:p>
          </table:table-cell>
          <table:table-cell table:style-name="ce547" table:formula="of:=[.$M$14]" office:value-type="float" office:value="1" calcext:value-type="float">
            <text:p>1.000000</text:p>
          </table:table-cell>
          <table:table-cell table:style-name="ce547" table:formula="of:=[.$J40]*1000" office:value-type="float" office:value="1000" calcext:value-type="float">
            <text:p>1000.000000</text:p>
          </table:table-cell>
          <table:table-cell table:style-name="ce547" table:formula="of:=[.$J40]*[.$P$4]" office:value-type="float" office:value="5.5232" calcext:value-type="float" table:number-columns-spanned="2" table:number-rows-spanned="1">
            <text:p>5.523200</text:p>
          </table:table-cell>
          <table:covered-table-cell table:style-name="ce547"/>
          <table:table-cell table:style-name="ce461" table:formula="of:=[.$L40]/[.$J40]" office:value-type="float" office:value="5.5232" calcext:value-type="float" table:number-columns-spanned="2" table:number-rows-spanned="1">
            <text:p>5.5232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3</text:p>
          </table:table-cell>
          <table:table-cell table:style-name="ce547" table:formula="of:=[.$M$15]" office:value-type="float" office:value="1" calcext:value-type="float">
            <text:p>1.000000</text:p>
          </table:table-cell>
          <table:table-cell table:style-name="ce547" table:formula="of:=[.$J41]*1000" office:value-type="float" office:value="1000" calcext:value-type="float">
            <text:p>1000.000000</text:p>
          </table:table-cell>
          <table:table-cell table:style-name="ce547" table:formula="of:=[.$J41]*[.$Q$4]" office:value-type="float" office:value="4.93" calcext:value-type="float" table:number-columns-spanned="2" table:number-rows-spanned="1">
            <text:p>4.930000</text:p>
          </table:table-cell>
          <table:covered-table-cell table:style-name="ce547"/>
          <table:table-cell table:style-name="ce461" table:formula="of:=[.$L41]/[.$J41]" office:value-type="float" office:value="4.93" calcext:value-type="float" table:number-columns-spanned="2" table:number-rows-spanned="1">
            <text:p>4.9300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6" office:value-type="string" calcext:value-type="string">
            <text:p>Mistura</text:p>
          </table:table-cell>
          <table:table-cell table:style-name="ce548" table:formula="of:=SUM([.J39:.J41])" office:value-type="float" office:value="-0.207201732062142" calcext:value-type="float">
            <text:p>-0.207202</text:p>
          </table:table-cell>
          <table:table-cell table:style-name="ce548" table:formula="of:=SUM([.K39:.K41])" office:value-type="float" office:value="-207.201732062142" calcext:value-type="float">
            <text:p>-207.201732</text:p>
          </table:table-cell>
          <table:table-cell table:style-name="ce548" table:formula="of:=SUM([.$L39:.$L41])" office:value-type="float" office:value="6.52747099935428" calcext:value-type="float" table:number-columns-spanned="2" table:number-rows-spanned="1">
            <text:p>6.527471</text:p>
          </table:table-cell>
          <table:covered-table-cell table:style-name="ce548"/>
          <table:table-cell table:style-name="ce602" table:formula="of:=[.$L42]/[.$J42]" office:value-type="float" office:value="-31.5029750687443" calcext:value-type="float" table:number-columns-spanned="2" table:number-rows-spanned="1">
            <text:p>-31.502975</text:p>
          </table:table-cell>
          <table:covered-table-cell table:style-name="ce602"/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522" office:value-type="string" calcext:value-type="string" table:number-columns-spanned="8" table:number-rows-spanned="1">
            <text:p>Calculo ST e SV</text:p>
          </table:table-cell>
          <table:covered-table-cell table:number-columns-repeated="7" table:style-name="ce522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Mass (g)</text:p>
          </table:table-cell>
          <table:table-cell table:style-name="ce377" office:value-type="string" calcext:value-type="string">
            <text:p>Total Mass (g)</text:p>
          </table:table-cell>
          <table:table-cell table:style-name="ce377" office:value-type="string" calcext:value-type="string">
            <text:p>TS (g)</text:p>
          </table:table-cell>
          <table:table-cell table:style-name="ce377" office:value-type="string" calcext:value-type="string">
            <text:p>TS %</text:p>
          </table:table-cell>
          <table:table-cell table:style-name="ce377" office:value-type="string" calcext:value-type="string">
            <text:p>VS (g)</text:p>
          </table:table-cell>
          <table:table-cell table:style-name="ce377" office:value-type="string" calcext:value-type="string">
            <text:p>VS %</text:p>
          </table:table-cell>
          <table:table-cell table:style-name="ce442" office:value-type="string" calcext:value-type="string">
            <text:p>VS/TS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1</text:p>
          </table:table-cell>
          <table:table-cell table:style-name="ce546" table:formula="of:=[.$J19]*[.$O$3]" office:value-type="float" office:value="1068.43760252525" calcext:value-type="float">
            <text:p>1068.437603</text:p>
          </table:table-cell>
          <table:table-cell table:style-name="ce546" table:formula="of:=SUM([.J48:.J50])" office:value-type="float" office:value="2326.06823048062" calcext:value-type="float" table:number-columns-spanned="1" table:number-rows-spanned="3">
            <text:p>2326.068230</text:p>
          </table:table-cell>
          <table:table-cell table:style-name="ce546" table:formula="of:=([.$O$6]*[.$J19])+([.$P$6]*[.$J20])+([.$Q$6]*[.$J21])" office:value-type="float" office:value="1407.01705328243" calcext:value-type="float" table:number-columns-spanned="1" table:number-rows-spanned="3">
            <text:p>1407.017053</text:p>
          </table:table-cell>
          <table:table-cell table:style-name="ce546" table:formula="of:=([.$L48]/[.$K48])*100" office:value-type="float" office:value="60.4890705631496" calcext:value-type="float" table:number-columns-spanned="1" table:number-rows-spanned="3">
            <text:p>60.489071</text:p>
          </table:table-cell>
          <table:table-cell table:style-name="ce546" table:formula="of:=([.$O$7]*[.$J19])+([.$P$7]*[.$J20])+([.$Q$7]*[.$J21])" office:value-type="float" office:value="1392.35490192099" calcext:value-type="float" table:number-columns-spanned="1" table:number-rows-spanned="3">
            <text:p>1392.354902</text:p>
          </table:table-cell>
          <table:table-cell table:style-name="ce546" table:formula="of:=([.$N48]/[.$K48])*100" office:value-type="float" office:value="59.8587300095361" calcext:value-type="float" table:number-columns-spanned="1" table:number-rows-spanned="3">
            <text:p>59.858730</text:p>
          </table:table-cell>
          <table:table-cell table:style-name="ce586" table:formula="of:=[.$N48]/[.$L48]" office:value-type="float" office:value="0.989579265349177" calcext:value-type="float" table:number-columns-spanned="1" table:number-rows-spanned="3">
            <text:p>0.989579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2</text:p>
          </table:table-cell>
          <table:table-cell table:style-name="ce546" table:formula="of:=[.$J20]*[.$P$3]" office:value-type="float" office:value="893.074035663281" calcext:value-type="float">
            <text:p>893.074036</text:p>
          </table:table-cell>
          <table:covered-table-cell table:number-columns-repeated="5" table:style-name="ce546"/>
          <table:covered-table-cell table:style-name="ce58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3</text:p>
          </table:table-cell>
          <table:table-cell table:style-name="ce546" table:formula="of:=[.$J21]*[.$Q$3]" office:value-type="float" office:value="364.55659229209" calcext:value-type="float">
            <text:p>364.556592</text:p>
          </table:table-cell>
          <table:covered-table-cell table:number-columns-repeated="5" table:style-name="ce546"/>
          <table:covered-table-cell table:style-name="ce58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360" table:formula="of:=[.$J23]*[.$O$3]" office:value-type="float" office:value="1068.43760252525" calcext:value-type="float">
            <text:p>1068.437603</text:p>
          </table:table-cell>
          <table:table-cell table:style-name="ce360" table:formula="of:=SUM([.J51:.J53])" office:value-type="float" office:value="1596.95504589644" calcext:value-type="float" table:number-columns-spanned="1" table:number-rows-spanned="3">
            <text:p>1596.955046</text:p>
          </table:table-cell>
          <table:table-cell table:style-name="ce360" table:formula="of:=([.$O$6]*[.$J23])+([.$P$6]*[.$J24])+([.$Q$6]*[.$J25])" office:value-type="float" office:value="1401.23044070636" calcext:value-type="float" table:number-columns-spanned="1" table:number-rows-spanned="3">
            <text:p>1401.230441</text:p>
          </table:table-cell>
          <table:table-cell table:style-name="ce360" table:formula="of:=([.$L51]/[.$K51])*100" office:value-type="float" office:value="87.7438876133041" calcext:value-type="float" table:number-columns-spanned="1" table:number-rows-spanned="3">
            <text:p>87.743888</text:p>
          </table:table-cell>
          <table:table-cell table:style-name="ce360" table:formula="of:=([.$O$7]*[.$J23])+([.$P$7]*[.$J24])+([.$Q$7]*[.$J25])" office:value-type="float" office:value="1386.56828934493" calcext:value-type="float" table:number-columns-spanned="1" table:number-rows-spanned="3">
            <text:p>1386.568289</text:p>
          </table:table-cell>
          <table:table-cell table:style-name="ce360" table:formula="of:=([.$N51]/[.$K51])*100" office:value-type="float" office:value="86.8257558600581" calcext:value-type="float" table:number-columns-spanned="1" table:number-rows-spanned="3">
            <text:p>86.825756</text:p>
          </table:table-cell>
          <table:table-cell table:style-name="ce308" table:formula="of:=[.$N51]/[.$L51]" office:value-type="float" office:value="0.989536231204021" calcext:value-type="float" table:number-columns-spanned="1" table:number-rows-spanned="3">
            <text:p>0.989536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table-cell table:style-name="ce360" table:formula="of:=[.$J24]*[.$P$3]" office:value-type="float" office:value="893.074035663281" calcext:value-type="float">
            <text:p>893.074036</text:p>
          </table:table-cell>
          <table:covered-table-cell table:number-columns-repeated="5" table:style-name="ce360"/>
          <table:covered-table-cell table:style-name="ce308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3</text:p>
          </table:table-cell>
          <table:table-cell table:style-name="ce360" table:formula="of:=[.$J25]*[.$Q$3]" office:value-type="float" office:value="-364.55659229209" calcext:value-type="float">
            <text:p>-364.556592</text:p>
          </table:table-cell>
          <table:covered-table-cell table:number-columns-repeated="5" table:style-name="ce360"/>
          <table:covered-table-cell table:style-name="ce308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3" table:formula="of:=[.$J27]*[.$O$3]" office:value-type="float" office:value="1068.43760252525" calcext:value-type="float">
            <text:p>1068.437603</text:p>
          </table:table-cell>
          <table:table-cell table:style-name="ce293" table:formula="of:=SUM([.J54:.J56])" office:value-type="float" office:value="3689.09497770105" calcext:value-type="float" table:number-columns-spanned="1" table:number-rows-spanned="3">
            <text:p>3689.094978</text:p>
          </table:table-cell>
          <table:table-cell table:style-name="ce293" table:formula="of:=([.$O$6]*[.$J27])+([.$P$6]*[.$J28])+([.$Q$6]*[.$J29])" office:value-type="float" office:value="1868.43466280141" calcext:value-type="float" table:number-columns-spanned="1" table:number-rows-spanned="3">
            <text:p>1868.434663</text:p>
          </table:table-cell>
          <table:table-cell table:style-name="ce293" table:formula="of:=([.$L54]/[.$K54])*100" office:value-type="float" office:value="50.6475076975592" calcext:value-type="float" table:number-columns-spanned="1" table:number-rows-spanned="3">
            <text:p>50.647508</text:p>
          </table:table-cell>
          <table:table-cell table:style-name="ce293" table:formula="of:=([.$O$7]*[.$J27])+([.$P$7]*[.$J28])+([.$Q$7]*[.$J29])" office:value-type="float" office:value="1854.25985824791" calcext:value-type="float" table:number-columns-spanned="1" table:number-rows-spanned="3">
            <text:p>1854.259858</text:p>
          </table:table-cell>
          <table:table-cell table:style-name="ce293" table:formula="of:=([.$N54]/[.$K54])*100" office:value-type="float" office:value="50.26327241386" calcext:value-type="float" table:number-columns-spanned="1" table:number-rows-spanned="3">
            <text:p>50.263272</text:p>
          </table:table-cell>
          <table:table-cell table:style-name="ce309" table:formula="of:=[.$N54]/[.$L54]" office:value-type="float" office:value="0.992413540149031" calcext:value-type="float" table:number-columns-spanned="1" table:number-rows-spanned="3">
            <text:p>0.992414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2</text:p>
          </table:table-cell>
          <table:table-cell table:style-name="ce293" table:formula="of:=[.$J28]*[.$P$3]" office:value-type="float" office:value="1360.6573751758" calcext:value-type="float">
            <text:p>1360.657375</text:p>
          </table:table-cell>
          <table:covered-table-cell table:number-columns-repeated="5" table:style-name="ce293"/>
          <table:covered-table-cell table:style-name="ce309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3</text:p>
          </table:table-cell>
          <table:table-cell table:style-name="ce293" table:formula="of:=[.$J29]*[.$Q$3]" office:value-type="float" office:value="1260" calcext:value-type="float">
            <text:p>1260.000000</text:p>
          </table:table-cell>
          <table:covered-table-cell table:number-columns-repeated="5" table:style-name="ce293"/>
          <table:covered-table-cell table:style-name="ce309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401" table:formula="of:=[.$J31]*[.$O$3]" office:value-type="float" office:value="1068.43760252525" calcext:value-type="float">
            <text:p>1068.437603</text:p>
          </table:table-cell>
          <table:table-cell table:style-name="ce401" table:formula="of:=SUM([.J57:.J59])" office:value-type="float" office:value="967.780227349454" calcext:value-type="float" table:number-columns-spanned="1" table:number-rows-spanned="3">
            <text:p>967.780227</text:p>
          </table:table-cell>
          <table:table-cell table:style-name="ce401" table:formula="of:=([.$O$6]*[.$J31])+([.$P$6]*[.$J32])+([.$Q$6]*[.$J33])" office:value-type="float" office:value="-775.63515739429" calcext:value-type="float" table:number-columns-spanned="1" table:number-rows-spanned="3">
            <text:p>-775.635157</text:p>
          </table:table-cell>
          <table:table-cell table:style-name="ce401" table:formula="of:=([.$L57]/[.$K57])*100" office:value-type="float" office:value="-80.1457950343325" calcext:value-type="float" table:number-columns-spanned="1" table:number-rows-spanned="3">
            <text:p>-80.145795</text:p>
          </table:table-cell>
          <table:table-cell table:style-name="ce401" table:formula="of:=([.$O$7]*[.$J31])+([.$P$7]*[.$J32])+([.$Q$7]*[.$J33])" office:value-type="float" office:value="-792.646299226954" calcext:value-type="float" table:number-columns-spanned="1" table:number-rows-spanned="3">
            <text:p>-792.646299</text:p>
          </table:table-cell>
          <table:table-cell table:style-name="ce401" table:formula="of:=([.$N57]/[.$K57])*100" office:value-type="float" office:value="-81.9035434726586" calcext:value-type="float" table:number-columns-spanned="1" table:number-rows-spanned="3">
            <text:p>-81.903543</text:p>
          </table:table-cell>
          <table:table-cell table:style-name="ce306" table:formula="of:=[.$N57]/[.$L57]" office:value-type="float" office:value="1.02193188597821" calcext:value-type="float" table:number-columns-spanned="1" table:number-rows-spanned="3">
            <text:p>1.021932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table-cell table:style-name="ce401" table:formula="of:=[.$J32]*[.$P$3]" office:value-type="float" office:value="-1360.6573751758" calcext:value-type="float">
            <text:p>-1360.657375</text:p>
          </table:table-cell>
          <table:covered-table-cell table:number-columns-repeated="5" table:style-name="ce401"/>
          <table:covered-table-cell table:style-name="ce30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3</text:p>
          </table:table-cell>
          <table:table-cell table:style-name="ce401" table:formula="of:=[.$J33]*[.$Q$3]" office:value-type="float" office:value="1260" calcext:value-type="float">
            <text:p>1260.000000</text:p>
          </table:table-cell>
          <table:covered-table-cell table:number-columns-repeated="5" table:style-name="ce401"/>
          <table:covered-table-cell table:style-name="ce30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408" table:formula="of:=[.$J35]*[.$O$3]" office:value-type="float" office:value="2358.25732689406" calcext:value-type="float">
            <text:p>2358.257327</text:p>
          </table:table-cell>
          <table:table-cell table:style-name="ce408" table:formula="of:=SUM([.J60:.J62])" office:value-type="float" office:value="4511.33136255734" calcext:value-type="float" table:number-columns-spanned="1" table:number-rows-spanned="3">
            <text:p>4511.331363</text:p>
          </table:table-cell>
          <table:table-cell table:style-name="ce408" table:formula="of:=([.$O$6]*[.$J35])+([.$P$6]*[.$J36])+([.$Q$6]*[.$J37])" office:value-type="float" office:value="2061.66645753584" calcext:value-type="float" table:number-columns-spanned="1" table:number-rows-spanned="3">
            <text:p>2061.666458</text:p>
          </table:table-cell>
          <table:table-cell table:style-name="ce408" table:formula="of:=([.$L60]/[.$K60])*100" office:value-type="float" office:value="45.6997345539065" calcext:value-type="float" table:number-columns-spanned="1" table:number-rows-spanned="3">
            <text:p>45.699735</text:p>
          </table:table-cell>
          <table:table-cell table:style-name="ce408" table:formula="of:=([.$O$7]*[.$J35])+([.$P$7]*[.$J36])+([.$Q$7]*[.$J37])" office:value-type="float" office:value="2028.18044192771" calcext:value-type="float" table:number-columns-spanned="1" table:number-rows-spanned="3">
            <text:p>2028.180442</text:p>
          </table:table-cell>
          <table:table-cell table:style-name="ce408" table:formula="of:=([.$N60]/[.$K60])*100" office:value-type="float" office:value="44.957469955787" calcext:value-type="float" table:number-columns-spanned="1" table:number-rows-spanned="3">
            <text:p>44.957470</text:p>
          </table:table-cell>
          <table:table-cell table:style-name="ce307" table:formula="of:=[.$N60]/[.$L60]" office:value-type="float" office:value="0.983757791913562" calcext:value-type="float" table:number-columns-spanned="1" table:number-rows-spanned="3">
            <text:p>0.983758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table-cell table:style-name="ce408" table:formula="of:=[.$J36]*[.$P$3]" office:value-type="float" office:value="893.074035663281" calcext:value-type="float">
            <text:p>893.074036</text:p>
          </table:table-cell>
          <table:covered-table-cell table:number-columns-repeated="5" table:style-name="ce408"/>
          <table:covered-table-cell table:style-name="ce307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3</text:p>
          </table:table-cell>
          <table:table-cell table:style-name="ce408" table:formula="of:=[.$J37]*[.$Q$3]" office:value-type="float" office:value="1260" calcext:value-type="float">
            <text:p>1260.000000</text:p>
          </table:table-cell>
          <table:covered-table-cell table:number-columns-repeated="5" table:style-name="ce408"/>
          <table:covered-table-cell table:style-name="ce307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1</text:p>
          </table:table-cell>
          <table:table-cell table:style-name="ce547" table:formula="of:=[.$J39]*[.$O$3]" office:value-type="float" office:value="-2358.25732689406" calcext:value-type="float">
            <text:p>-2358.257327</text:p>
          </table:table-cell>
          <table:table-cell table:style-name="ce548" table:formula="of:=SUM([.J63:.J65])" office:value-type="float" office:value="-205.183291230779" calcext:value-type="float" table:number-columns-spanned="1" table:number-rows-spanned="3">
            <text:p>-205.183291</text:p>
          </table:table-cell>
          <table:table-cell table:style-name="ce548" table:formula="of:=([.$O$6]*[.$J39])+([.$P$6]*[.$J40])+([.$Q$6]*[.$J41])" office:value-type="float" office:value="-306.218468954165" calcext:value-type="float" table:number-columns-spanned="1" table:number-rows-spanned="3">
            <text:p>-306.218469</text:p>
          </table:table-cell>
          <table:table-cell table:style-name="ce548" table:formula="of:=([.$L63]/[.$K63])*100" office:value-type="float" office:value="149.241425613818" calcext:value-type="float" table:number-columns-spanned="1" table:number-rows-spanned="3">
            <text:p>149.241426</text:p>
          </table:table-cell>
          <table:table-cell table:style-name="ce548" table:formula="of:=([.$O$7]*[.$J39])+([.$P$7]*[.$J40])+([.$Q$7]*[.$J41])" office:value-type="float" office:value="-270.870809682749" calcext:value-type="float" table:number-columns-spanned="1" table:number-rows-spanned="3">
            <text:p>-270.870810</text:p>
          </table:table-cell>
          <table:table-cell table:style-name="ce548" table:formula="of:=([.$N63]/[.$K63])*100" office:value-type="float" office:value="132.014068035437" calcext:value-type="float" table:number-columns-spanned="1" table:number-rows-spanned="3">
            <text:p>132.014068</text:p>
          </table:table-cell>
          <table:table-cell table:style-name="ce602" table:formula="of:=[.$N63]/[.$L63]" office:value-type="float" office:value="0.884567186975562" calcext:value-type="float" table:number-columns-spanned="1" table:number-rows-spanned="3">
            <text:p>0.884567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2</text:p>
          </table:table-cell>
          <table:table-cell table:style-name="ce547" table:formula="of:=[.$J40]*[.$P$3]" office:value-type="float" office:value="893.074035663281" calcext:value-type="float">
            <text:p>893.074036</text:p>
          </table:table-cell>
          <table:covered-table-cell table:number-columns-repeated="5" table:style-name="ce547"/>
          <table:covered-table-cell table:style-name="ce541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6" office:value-type="string" calcext:value-type="string">
            <text:p>Sub 3</text:p>
          </table:table-cell>
          <table:table-cell table:style-name="ce548" table:formula="of:=[.$J41]*[.$Q$3]" office:value-type="float" office:value="1260" calcext:value-type="float">
            <text:p>1260.000000</text:p>
          </table:table-cell>
          <table:covered-table-cell table:number-columns-repeated="5" table:style-name="ce548"/>
          <table:covered-table-cell table:style-name="ce602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2" office:value-type="string" calcext:value-type="string">
            <text:p>TS % Alvo</text:p>
          </table:table-cell>
          <table:table-cell/>
          <table:table-cell table:style-name="ce437" office:value-type="string" calcext:value-type="string">
            <text:p>TS % Ratio</text:p>
          </table:table-cell>
          <table:table-cell table:style-name="ce441" office:value-type="string" calcext:value-type="string">
            <text:p>VS diluido (g)</text:p>
          </table:table-cell>
          <table:table-cell table:style-name="ce441" office:value-type="string" calcext:value-type="string">
            <text:p>Volume (L)</text:p>
          </table:table-cell>
          <table:table-cell table:style-name="ce465" office:value-type="string" calcext:value-type="string">
            <text:p>VS diluido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5" office:value-type="float" office:value="2" calcext:value-type="float">
            <text:p>2</text:p>
          </table:table-cell>
          <table:table-cell/>
          <table:table-cell table:style-name="ce379" table:formula="of:=[.$M48]/[.$J$68]" office:value-type="float" office:value="30.2445352815748" calcext:value-type="float">
            <text:p>30.244535</text:p>
          </table:table-cell>
          <table:table-cell table:style-name="ce552" table:formula="of:=[.$N48]/[.$L68]" office:value-type="float" office:value="46.0365778134215" calcext:value-type="float">
            <text:p>46.036578</text:p>
          </table:table-cell>
          <table:table-cell table:style-name="ce552" table:formula="of:=[.$L68]*[.$J22]" office:value-type="float" office:value="69.2397409740296" calcext:value-type="float">
            <text:p>69.239741</text:p>
          </table:table-cell>
          <table:table-cell table:style-name="ce446" table:formula="of:=[.$M68]/[.$N68]" office:value-type="float" office:value="0.664886626752242" calcext:value-type="float">
            <text:p>0.66488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6" office:value-type="float" office:value="5" calcext:value-type="float">
            <text:p>5</text:p>
          </table:table-cell>
          <table:table-cell/>
          <table:table-cell table:style-name="ce380" table:formula="of:=[.$M48]/[.$J$69]" office:value-type="float" office:value="12.0978141126299" calcext:value-type="float">
            <text:p>12.097814</text:p>
          </table:table-cell>
          <table:table-cell table:style-name="ce409" table:formula="of:=[.$N48]/[.$L69]" office:value-type="float" office:value="115.091444533554" calcext:value-type="float">
            <text:p>115.091445</text:p>
          </table:table-cell>
          <table:table-cell table:style-name="ce409" table:formula="of:=[.$L69]*[.$J22]" office:value-type="float" office:value="27.6958963896118" calcext:value-type="float">
            <text:p>27.695896</text:p>
          </table:table-cell>
          <table:table-cell table:style-name="ce466" table:formula="of:=[.$M69]/[.$N69]" office:value-type="float" office:value="4.15554141720151" calcext:value-type="float">
            <text:p>4.155541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233" table:formula="of:=[.$M51]/[.$J$68]" office:value-type="float" office:value="43.871943806652" calcext:value-type="float">
            <text:p>43.871944</text:p>
          </table:table-cell>
          <table:table-cell table:style-name="ce171" table:formula="of:=[.$N51]/[.$L70]" office:value-type="float" office:value="31.6048975503722" calcext:value-type="float">
            <text:p>31.604898</text:p>
          </table:table-cell>
          <table:table-cell table:style-name="ce171" table:formula="of:=[.$L70]*[.$J26]" office:value-type="float" office:value="75.0503905249048" calcext:value-type="float">
            <text:p>75.050391</text:p>
          </table:table-cell>
          <table:table-cell table:style-name="ce313" table:formula="of:=[.$M70]/[.$N70]" office:value-type="float" office:value="0.421115697457756" calcext:value-type="float">
            <text:p>0.42111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1" table:formula="of:=[.$M51]/[.$J$69]" office:value-type="float" office:value="17.5487775226608" calcext:value-type="float">
            <text:p>17.548778</text:p>
          </table:table-cell>
          <table:table-cell table:style-name="ce410" table:formula="of:=[.$N51]/[.$L71]" office:value-type="float" office:value="79.0122438759306" calcext:value-type="float">
            <text:p>79.012244</text:p>
          </table:table-cell>
          <table:table-cell table:style-name="ce410" table:formula="of:=[.$L71]*[.$J26]" office:value-type="float" office:value="30.0201562099619" calcext:value-type="float">
            <text:p>30.020156</text:p>
          </table:table-cell>
          <table:table-cell table:style-name="ce467" table:formula="of:=[.$M71]/[.$N71]" office:value-type="float" office:value="2.63197310911098" calcext:value-type="float">
            <text:p>2.63197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2" table:formula="of:=[.$M54]/[.$J$68]" office:value-type="float" office:value="25.3237538487796" calcext:value-type="float">
            <text:p>25.323754</text:p>
          </table:table-cell>
          <table:table-cell table:style-name="ce411" table:formula="of:=[.$N54]/[.$L72]" office:value-type="float" office:value="73.2221561353262" calcext:value-type="float">
            <text:p>73.222156</text:p>
          </table:table-cell>
          <table:table-cell table:style-name="ce411" table:formula="of:=[.$L72]*[.$J26]" office:value-type="float" office:value="43.3205700728332" calcext:value-type="float">
            <text:p>43.320570</text:p>
          </table:table-cell>
          <table:table-cell table:style-name="ce468" table:formula="of:=[.$M72]/[.$N72]" office:value-type="float" office:value="1.69023990248098" calcext:value-type="float">
            <text:p>1.690240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3" table:formula="of:=[.$M54]/[.$J$69]" office:value-type="float" office:value="10.1295015395118" calcext:value-type="float">
            <text:p>10.129502</text:p>
          </table:table-cell>
          <table:table-cell table:style-name="ce415" table:formula="of:=[.$N54]/[.$L73]" office:value-type="float" office:value="183.055390338316" calcext:value-type="float">
            <text:p>183.055390</text:p>
          </table:table-cell>
          <table:table-cell table:style-name="ce415" table:formula="of:=[.$L73]*[.$J26]" office:value-type="float" office:value="17.3282280291333" calcext:value-type="float">
            <text:p>17.328228</text:p>
          </table:table-cell>
          <table:table-cell table:style-name="ce469" table:formula="of:=[.$M73]/[.$N73]" office:value-type="float" office:value="10.5639993905062" calcext:value-type="float">
            <text:p>10.56399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230" table:formula="of:=[.$M57]/[.$J$68]" office:value-type="float" office:value="-40.0728975171662" calcext:value-type="float">
            <text:p>-40.072898</text:p>
          </table:table-cell>
          <table:table-cell table:style-name="ce159" table:formula="of:=[.$N57]/[.$L74]" office:value-type="float" office:value="19.780109458953" calcext:value-type="float">
            <text:p>19.780109</text:p>
          </table:table-cell>
          <table:table-cell table:style-name="ce159" table:formula="of:=[.$L74]*[.$J34]" office:value-type="float" office:value="-19.0920846206147" calcext:value-type="float">
            <text:p>-19.092085</text:p>
          </table:table-cell>
          <table:table-cell table:style-name="ce312" table:formula="of:=[.$M74]/[.$N74]" office:value-type="float" office:value="-1.03603717729155" calcext:value-type="float">
            <text:p>-1.03603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4" table:formula="of:=[.$M57]/[.$J$69]" office:value-type="float" office:value="-16.0291590068665" calcext:value-type="float">
            <text:p>-16.029159</text:p>
          </table:table-cell>
          <table:table-cell table:style-name="ce417" table:formula="of:=[.$N57]/[.$L75]" office:value-type="float" office:value="49.4502736473825" calcext:value-type="float">
            <text:p>49.450274</text:p>
          </table:table-cell>
          <table:table-cell table:style-name="ce417" table:formula="of:=[.$L75]*[.$J34]" office:value-type="float" office:value="-7.63683384824588" calcext:value-type="float">
            <text:p>-7.636834</text:p>
          </table:table-cell>
          <table:table-cell table:style-name="ce470" table:formula="of:=[.$M75]/[.$N75]" office:value-type="float" office:value="-6.47523235807217" calcext:value-type="float">
            <text:p>-6.475232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5" table:formula="of:=[.$M60]/[.$J$68]" office:value-type="float" office:value="22.8498672769533" calcext:value-type="float">
            <text:p>22.849867</text:p>
          </table:table-cell>
          <table:table-cell table:style-name="ce418" table:formula="of:=[.$N60]/[.$L76]" office:value-type="float" office:value="88.7611475963962" calcext:value-type="float">
            <text:p>88.761148</text:p>
          </table:table-cell>
          <table:table-cell table:style-name="ce418" table:formula="of:=[.$L76]*[.$J38]" office:value-type="float" office:value="96.1340011849878" calcext:value-type="float">
            <text:p>96.134001</text:p>
          </table:table-cell>
          <table:table-cell table:style-name="ce471" table:formula="of:=[.$M76]/[.$N76]" office:value-type="float" office:value="0.923306494084188" calcext:value-type="float">
            <text:p>0.92330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6" table:formula="of:=[.$M60]/[.$J$69]" office:value-type="float" office:value="9.1399469107813" calcext:value-type="float">
            <text:p>9.139947</text:p>
          </table:table-cell>
          <table:table-cell table:style-name="ce420" table:formula="of:=[.$N60]/[.$L77]" office:value-type="float" office:value="221.90286899099" calcext:value-type="float">
            <text:p>221.902869</text:p>
          </table:table-cell>
          <table:table-cell table:style-name="ce420" table:formula="of:=[.$L77]*[.$J38]" office:value-type="float" office:value="38.4536004739951" calcext:value-type="float">
            <text:p>38.453600</text:p>
          </table:table-cell>
          <table:table-cell table:style-name="ce472" table:formula="of:=[.$M77]/[.$N77]" office:value-type="float" office:value="5.77066558802617" calcext:value-type="float">
            <text:p>5.77066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7" table:formula="of:=[.$M63]/[.$J$68]" office:value-type="float" office:value="74.6207128069088" calcext:value-type="float">
            <text:p>74.620713</text:p>
          </table:table-cell>
          <table:table-cell table:style-name="ce421" table:formula="of:=[.$N63]/[.$L78]" office:value-type="float" office:value="-3.62996813476795" calcext:value-type="float">
            <text:p>-3.629968</text:p>
          </table:table-cell>
          <table:table-cell table:style-name="ce421" table:formula="of:=[.$L78]*[.$J42]" office:value-type="float" office:value="-15.4615409413031" calcext:value-type="float">
            <text:p>-15.461541</text:p>
          </table:table-cell>
          <table:table-cell table:style-name="ce475" table:formula="of:=[.$M78]/[.$N78]" office:value-type="float" office:value="0.234774020813866" calcext:value-type="float">
            <text:p>0.23477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8" table:formula="of:=[.$M63]/[.$J$69]" office:value-type="float" office:value="29.8482851227635" calcext:value-type="float">
            <text:p>29.848285</text:p>
          </table:table-cell>
          <table:table-cell table:style-name="ce561" table:formula="of:=[.$N63]/[.$L79]" office:value-type="float" office:value="-9.07492033691986" calcext:value-type="float">
            <text:p>-9.074920</text:p>
          </table:table-cell>
          <table:table-cell table:style-name="ce561" table:formula="of:=[.$L79]*[.$J42]" office:value-type="float" office:value="-6.18461637652125" calcext:value-type="float">
            <text:p>-6.184616</text:p>
          </table:table-cell>
          <table:table-cell table:style-name="ce457" table:formula="of:=[.$M79]/[.$N79]" office:value-type="float" office:value="1.46733763008666" calcext:value-type="float">
            <text:p>1.467338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522" office:value-type="string" calcext:value-type="string" table:number-columns-spanned="7" table:number-rows-spanned="1">
            <text:p>Calculo COV</text:p>
          </table:table-cell>
          <table:covered-table-cell table:number-columns-repeated="6" table:style-name="ce522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string" calcext:value-type="string">
            <text:p>Volume (L)</text:p>
          </table:table-cell>
          <table:table-cell table:style-name="ce377" office:value-type="string" calcext:value-type="string">
            <text:p>Volume (m^3)</text:p>
          </table:table-cell>
          <table:table-cell table:style-name="ce188" office:value-type="string" calcext:value-type="string">
            <text:p>Tempo Retencao (d)</text:p>
          </table:table-cell>
          <table:table-cell table:style-name="ce218" office:value-type="string" calcext:value-type="string">
            <text:p>Fluxo (L/d)</text:p>
          </table:table-cell>
          <table:table-cell/>
          <table:table-cell table:style-name="ce402" office:value-type="string" calcext:value-type="string">
            <text:p>COV Alvo</text:p>
          </table:table-cell>
          <table:table-cell table:number-columns-repeated="4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float" office:value="1" calcext:value-type="float">
            <text:p>1</text:p>
          </table:table-cell>
          <table:table-cell table:style-name="ce377" table:formula="of:=[.I85]/1000" office:value-type="float" office:value="0.001" calcext:value-type="float">
            <text:p>0.001</text:p>
          </table:table-cell>
          <table:table-cell table:style-name="ce433" office:value-type="float" office:value="30" calcext:value-type="float">
            <text:p>30</text:p>
          </table:table-cell>
          <table:table-cell table:style-name="ce438" table:formula="of:=[.I85]/[.K85]" office:value-type="float" office:value="0.0333333333333333" calcext:value-type="float">
            <text:p>0.033333333</text:p>
          </table:table-cell>
          <table:table-cell/>
          <table:table-cell table:style-name="ce40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378" office:value-type="string" calcext:value-type="string">
            <text:p>VS (g/d)</text:p>
          </table:table-cell>
          <table:table-cell table:style-name="ce377" office:value-type="string" calcext:value-type="string">
            <text:p>VS (Kg/d)</text:p>
          </table:table-cell>
          <table:table-cell table:style-name="ce218" office:value-type="string" calcext:value-type="string">
            <text:p>COV (Kg SV/m³ d)</text:p>
          </table:table-cell>
          <table:table-cell/>
          <table:table-cell table:style-name="ce402" office:value-type="string" calcext:value-type="string">
            <text:p>COV Ratio</text:p>
          </table:table-cell>
          <table:table-cell table:style-name="ce402" office:value-type="string" calcext:value-type="string">
            <text:p>Volume (L)</text:p>
          </table:table-cell>
          <table:table-cell table:style-name="ce402" office:value-type="string" calcext:value-type="string">
            <text:p>TS % diluido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9" table:formula="of:=[.$O68]*[.$L$85]" office:value-type="float" office:value="0.0221628875584081" calcext:value-type="float">
            <text:p>0.022163</text:p>
          </table:table-cell>
          <table:table-cell table:style-name="ce552" table:formula="of:=[.$I88]/1000" office:value-type="float" office:value="0.0000221628875584081" calcext:value-type="float">
            <text:p>0.000022</text:p>
          </table:table-cell>
          <table:table-cell table:style-name="ce552" table:formula="of:=[.$J88]*(1/[.$J$85])" office:value-type="float" office:value="0.0221628875584081" calcext:value-type="float">
            <text:p>0.022163</text:p>
          </table:table-cell>
          <table:table-cell/>
          <table:table-cell table:style-name="ce379" table:formula="of:=[.$K88]/[.$N$85]" office:value-type="float" office:value="0.011081443779204" calcext:value-type="float">
            <text:p>0.011081</text:p>
          </table:table-cell>
          <table:table-cell table:style-name="ce552" table:formula="of:=[.$M88]*[.$N68]" office:value-type="float" office:value="0.767276296890359" calcext:value-type="float">
            <text:p>0.767276</text:p>
          </table:table-cell>
          <table:table-cell table:style-name="ce552" table:formula="of:=([.$M48]*[.$J22])/[.$N88]" office:value-type="float" office:value="180.481897471997" calcext:value-type="float">
            <text:p>180.48189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0" table:formula="of:=[.$O69]*[.$L$85]" office:value-type="float" office:value="0.13851804724005" calcext:value-type="float">
            <text:p>0.138518</text:p>
          </table:table-cell>
          <table:table-cell table:style-name="ce409" table:formula="of:=[.$I89]/1000" office:value-type="float" office:value="0.00013851804724005" calcext:value-type="float">
            <text:p>0.000139</text:p>
          </table:table-cell>
          <table:table-cell table:style-name="ce409" table:formula="of:=[.$J89]*(1/[.$J$85])" office:value-type="float" office:value="0.13851804724005" calcext:value-type="float">
            <text:p>0.138518</text:p>
          </table:table-cell>
          <table:table-cell/>
          <table:table-cell table:style-name="ce380" table:formula="of:=[.$K89]/[.$N$85]" office:value-type="float" office:value="0.0692590236200252" calcext:value-type="float">
            <text:p>0.069259</text:p>
          </table:table-cell>
          <table:table-cell table:style-name="ce409" table:formula="of:=[.$M89]*[.$N69]" office:value-type="float" office:value="1.9181907422259" calcext:value-type="float">
            <text:p>1.918191</text:p>
          </table:table-cell>
          <table:table-cell table:style-name="ce409" table:formula="of:=([.$M48]*[.$J22])/[.$N89]" office:value-type="float" office:value="72.1927589887988" calcext:value-type="float">
            <text:p>72.19275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3" table:formula="of:=[.$O70]*[.$L$85]" office:value-type="float" office:value="0.0140371899152585" calcext:value-type="float">
            <text:p>0.014037</text:p>
          </table:table-cell>
          <table:table-cell table:style-name="ce171" table:formula="of:=[.$I90]/1000" office:value-type="float" office:value="0.0000140371899152585" calcext:value-type="float">
            <text:p>0.000014</text:p>
          </table:table-cell>
          <table:table-cell table:style-name="ce171" table:formula="of:=[.$J90]*(1/[.$J$85])" office:value-type="float" office:value="0.0140371899152585" calcext:value-type="float">
            <text:p>0.014037</text:p>
          </table:table-cell>
          <table:table-cell/>
          <table:table-cell table:style-name="ce233" table:formula="of:=[.$K90]/[.$N$85]" office:value-type="float" office:value="0.00701859495762927" calcext:value-type="float">
            <text:p>0.007019</text:p>
          </table:table-cell>
          <table:table-cell table:style-name="ce171" table:formula="of:=[.$M90]*[.$N70]" office:value-type="float" office:value="0.526748292506204" calcext:value-type="float">
            <text:p>0.526748</text:p>
          </table:table-cell>
          <table:table-cell table:style-name="ce171" table:formula="of:=([.$M51]*[.$J26])/[.$N90]" office:value-type="float" office:value="284.957318676153" calcext:value-type="float">
            <text:p>284.95731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1" table:formula="of:=[.$O71]*[.$L$85]" office:value-type="float" office:value="0.0877324369703658" calcext:value-type="float">
            <text:p>0.087732</text:p>
          </table:table-cell>
          <table:table-cell table:style-name="ce410" table:formula="of:=[.$I91]/1000" office:value-type="float" office:value="0.0000877324369703658" calcext:value-type="float">
            <text:p>0.000088</text:p>
          </table:table-cell>
          <table:table-cell table:style-name="ce410" table:formula="of:=[.$J91]*(1/[.$J$85])" office:value-type="float" office:value="0.0877324369703658" calcext:value-type="float">
            <text:p>0.087732</text:p>
          </table:table-cell>
          <table:table-cell/>
          <table:table-cell table:style-name="ce381" table:formula="of:=[.$K91]/[.$N$85]" office:value-type="float" office:value="0.0438662184851829" calcext:value-type="float">
            <text:p>0.043866</text:p>
          </table:table-cell>
          <table:table-cell table:style-name="ce410" table:formula="of:=[.$M91]*[.$N71]" office:value-type="float" office:value="1.31687073126551" calcext:value-type="float">
            <text:p>1.316871</text:p>
          </table:table-cell>
          <table:table-cell table:style-name="ce410" table:formula="of:=([.$M51]*[.$J26])/[.$N91]" office:value-type="float" office:value="113.982927470461" calcext:value-type="float">
            <text:p>113.98292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2" table:formula="of:=[.$O72]*[.$L$85]" office:value-type="float" office:value="0.0563413300826995" calcext:value-type="float">
            <text:p>0.056341</text:p>
          </table:table-cell>
          <table:table-cell table:style-name="ce411" table:formula="of:=[.$I92]/1000" office:value-type="float" office:value="0.0000563413300826995" calcext:value-type="float">
            <text:p>0.000056</text:p>
          </table:table-cell>
          <table:table-cell table:style-name="ce411" table:formula="of:=[.$J92]*(1/[.$J$85])" office:value-type="float" office:value="0.0563413300826995" calcext:value-type="float">
            <text:p>0.056341</text:p>
          </table:table-cell>
          <table:table-cell/>
          <table:table-cell table:style-name="ce382" table:formula="of:=[.$K92]/[.$N$85]" office:value-type="float" office:value="0.0281706650413497" calcext:value-type="float">
            <text:p>0.028171</text:p>
          </table:table-cell>
          <table:table-cell table:style-name="ce411" table:formula="of:=[.$M92]*[.$N72]" office:value-type="float" office:value="1.2203692689221" calcext:value-type="float">
            <text:p>1.220369</text:p>
          </table:table-cell>
          <table:table-cell table:style-name="ce411" table:formula="of:=([.$M54]*[.$J30])/[.$N92]" office:value-type="float" office:value="146.234298529905" calcext:value-type="float">
            <text:p>146.23429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3" table:formula="of:=[.$O73]*[.$L$85]" office:value-type="float" office:value="0.352133313016872" calcext:value-type="float">
            <text:p>0.352133</text:p>
          </table:table-cell>
          <table:table-cell table:style-name="ce415" table:formula="of:=[.$I93]/1000" office:value-type="float" office:value="0.000352133313016872" calcext:value-type="float">
            <text:p>0.000352</text:p>
          </table:table-cell>
          <table:table-cell table:style-name="ce415" table:formula="of:=[.$J93]*(1/[.$J$85])" office:value-type="float" office:value="0.352133313016872" calcext:value-type="float">
            <text:p>0.352133</text:p>
          </table:table-cell>
          <table:table-cell/>
          <table:table-cell table:style-name="ce383" table:formula="of:=[.$K93]/[.$N$85]" office:value-type="float" office:value="0.176066656508436" calcext:value-type="float">
            <text:p>0.176067</text:p>
          </table:table-cell>
          <table:table-cell table:style-name="ce415" table:formula="of:=[.$M93]*[.$N73]" office:value-type="float" office:value="3.05092317230526" calcext:value-type="float">
            <text:p>3.050923</text:p>
          </table:table-cell>
          <table:table-cell table:style-name="ce415" table:formula="of:=([.$M54]*[.$J30])/[.$N93]" office:value-type="float" office:value="58.4937194119619" calcext:value-type="float">
            <text:p>58.49371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0" table:formula="of:=[.$O74]*[.$L$85]" office:value-type="float" office:value="-0.0345345725763849" calcext:value-type="float">
            <text:p>-0.034535</text:p>
          </table:table-cell>
          <table:table-cell table:style-name="ce159" table:formula="of:=[.$I94]/1000" office:value-type="float" office:value="-0.0000345345725763849" calcext:value-type="float">
            <text:p>-0.000035</text:p>
          </table:table-cell>
          <table:table-cell table:style-name="ce159" table:formula="of:=[.$J94]*(1/[.$J$85])" office:value-type="float" office:value="-0.0345345725763849" calcext:value-type="float">
            <text:p>-0.034535</text:p>
          </table:table-cell>
          <table:table-cell/>
          <table:table-cell table:style-name="ce230" table:formula="of:=[.$K94]/[.$N$85]" office:value-type="float" office:value="-0.0172672862881924" calcext:value-type="float">
            <text:p>-0.017267</text:p>
          </table:table-cell>
          <table:table-cell table:style-name="ce159" table:formula="of:=[.$M94]*[.$N74]" office:value-type="float" office:value="0.32966849098255" calcext:value-type="float">
            <text:p>0.329668</text:p>
          </table:table-cell>
          <table:table-cell table:style-name="ce159" table:formula="of:=([.$M57]*[.$J34])/[.$N94]" office:value-type="float" office:value="-115.825959367317" calcext:value-type="float">
            <text:p>-115.82595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4" table:formula="of:=[.$O75]*[.$L$85]" office:value-type="float" office:value="-0.215841078602406" calcext:value-type="float">
            <text:p>-0.215841</text:p>
          </table:table-cell>
          <table:table-cell table:style-name="ce417" table:formula="of:=[.$I95]/1000" office:value-type="float" office:value="-0.000215841078602406" calcext:value-type="float">
            <text:p>-0.000216</text:p>
          </table:table-cell>
          <table:table-cell table:style-name="ce417" table:formula="of:=[.$J95]*(1/[.$J$85])" office:value-type="float" office:value="-0.215841078602406" calcext:value-type="float">
            <text:p>-0.215841</text:p>
          </table:table-cell>
          <table:table-cell/>
          <table:table-cell table:style-name="ce384" table:formula="of:=[.$K95]/[.$N$85]" office:value-type="float" office:value="-0.107920539301203" calcext:value-type="float">
            <text:p>-0.107921</text:p>
          </table:table-cell>
          <table:table-cell table:style-name="ce417" table:formula="of:=[.$M95]*[.$N75]" office:value-type="float" office:value="0.824171227456375" calcext:value-type="float">
            <text:p>0.824171</text:p>
          </table:table-cell>
          <table:table-cell table:style-name="ce417" table:formula="of:=([.$M57]*[.$J34])/[.$N95]" office:value-type="float" office:value="-46.3303837469266" calcext:value-type="float">
            <text:p>-46.33038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5" table:formula="of:=[.$O76]*[.$L$85]" office:value-type="float" office:value="0.0307768831361396" calcext:value-type="float">
            <text:p>0.030777</text:p>
          </table:table-cell>
          <table:table-cell table:style-name="ce418" table:formula="of:=[.$I96]/1000" office:value-type="float" office:value="0.0000307768831361396" calcext:value-type="float">
            <text:p>0.000031</text:p>
          </table:table-cell>
          <table:table-cell table:style-name="ce418" table:formula="of:=[.$J96]*(1/[.$J$85])" office:value-type="float" office:value="0.0307768831361396" calcext:value-type="float">
            <text:p>0.030777</text:p>
          </table:table-cell>
          <table:table-cell/>
          <table:table-cell table:style-name="ce385" table:formula="of:=[.$K96]/[.$N$85]" office:value-type="float" office:value="0.0153884415680698" calcext:value-type="float">
            <text:p>0.015388</text:p>
          </table:table-cell>
          <table:table-cell table:style-name="ce418" table:formula="of:=[.$M96]*[.$N76]" office:value-type="float" office:value="1.47935245993994" calcext:value-type="float">
            <text:p>1.479352</text:p>
          </table:table-cell>
          <table:table-cell table:style-name="ce418" table:formula="of:=([.$M60]*[.$J38])/[.$N96]" office:value-type="float" office:value="129.967676788655" calcext:value-type="float">
            <text:p>129.96767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6" table:formula="of:=[.$O77]*[.$L$85]" office:value-type="float" office:value="0.192355519600872" calcext:value-type="float">
            <text:p>0.192356</text:p>
          </table:table-cell>
          <table:table-cell table:style-name="ce420" table:formula="of:=[.$I97]/1000" office:value-type="float" office:value="0.000192355519600872" calcext:value-type="float">
            <text:p>0.000192</text:p>
          </table:table-cell>
          <table:table-cell table:style-name="ce420" table:formula="of:=[.$J97]*(1/[.$J$85])" office:value-type="float" office:value="0.192355519600872" calcext:value-type="float">
            <text:p>0.192356</text:p>
          </table:table-cell>
          <table:table-cell/>
          <table:table-cell table:style-name="ce386" table:formula="of:=[.$K97]/[.$N$85]" office:value-type="float" office:value="0.0961777598004362" calcext:value-type="float">
            <text:p>0.096178</text:p>
          </table:table-cell>
          <table:table-cell table:style-name="ce420" table:formula="of:=[.$M97]*[.$N77]" office:value-type="float" office:value="3.69838114984984" calcext:value-type="float">
            <text:p>3.698381</text:p>
          </table:table-cell>
          <table:table-cell table:style-name="ce420" table:formula="of:=([.$M60]*[.$J38])/[.$N97]" office:value-type="float" office:value="51.9870707154621" calcext:value-type="float">
            <text:p>51.987071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7" table:formula="of:=[.$O78]*[.$L$85]" office:value-type="float" office:value="0.00782580069379554" calcext:value-type="float">
            <text:p>0.007826</text:p>
          </table:table-cell>
          <table:table-cell table:style-name="ce421" table:formula="of:=[.$I98]/1000" office:value-type="float" office:value="0.00000782580069379554" calcext:value-type="float">
            <text:p>0.000008</text:p>
          </table:table-cell>
          <table:table-cell table:style-name="ce421" table:formula="of:=[.$J98]*(1/[.$J$85])" office:value-type="float" office:value="0.00782580069379554" calcext:value-type="float">
            <text:p>0.007826</text:p>
          </table:table-cell>
          <table:table-cell/>
          <table:table-cell table:style-name="ce387" table:formula="of:=[.$K98]/[.$N$85]" office:value-type="float" office:value="0.00391290034689777" calcext:value-type="float">
            <text:p>0.003913</text:p>
          </table:table-cell>
          <table:table-cell table:style-name="ce421" table:formula="of:=[.$M98]*[.$N78]" office:value-type="float" office:value="-0.0604994689127991" calcext:value-type="float">
            <text:p>-0.060499</text:p>
          </table:table-cell>
          <table:table-cell table:style-name="ce421" table:formula="of:=([.$M63]*[.$J42])/[.$N98]" office:value-type="float" office:value="511.129807224874" calcext:value-type="float">
            <text:p>511.12980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8" table:formula="of:=[.$O79]*[.$L$85]" office:value-type="float" office:value="0.0489112543362221" calcext:value-type="float">
            <text:p>0.048911</text:p>
          </table:table-cell>
          <table:table-cell table:style-name="ce561" table:formula="of:=[.$I99]/1000" office:value-type="float" office:value="0.0000489112543362221" calcext:value-type="float">
            <text:p>0.000049</text:p>
          </table:table-cell>
          <table:table-cell table:style-name="ce561" table:formula="of:=[.$J99]*(1/[.$J$85])" office:value-type="float" office:value="0.0489112543362221" calcext:value-type="float">
            <text:p>0.048911</text:p>
          </table:table-cell>
          <table:table-cell/>
          <table:table-cell table:style-name="ce388" table:formula="of:=[.$K99]/[.$N$85]" office:value-type="float" office:value="0.0244556271681111" calcext:value-type="float">
            <text:p>0.024456</text:p>
          </table:table-cell>
          <table:table-cell table:style-name="ce561" table:formula="of:=[.$M99]*[.$N79]" office:value-type="float" office:value="-0.151248672281998" calcext:value-type="float">
            <text:p>-0.151249</text:p>
          </table:table-cell>
          <table:table-cell table:style-name="ce561" table:formula="of:=([.$M63]*[.$J42])/[.$N99]" office:value-type="float" office:value="204.45192288995" calcext:value-type="float">
            <text:p>204.451923</text:p>
          </table:table-cell>
          <table:table-cell table:number-columns-repeated="3"/>
        </table:table-row>
        <table:table-row table:style-name="ro1">
          <table:table-cell table:style-name="ce146" table:number-columns-repeated="6"/>
          <table:table-cell table:number-columns-repeated="12"/>
        </table:table-row>
        <table:table-row table:style-name="ro1">
          <table:table-cell table:number-columns-repeated="8"/>
          <table:table-cell table:style-name="ce522" office:value-type="string" calcext:value-type="string" table:number-columns-spanned="5" table:number-rows-spanned="1">
            <text:p>Calculo para montar a solucao</text:p>
          </table:table-cell>
          <table:covered-table-cell table:number-columns-repeated="4" table:style-name="ce522"/>
          <table:table-cell table:number-columns-repeated="5"/>
        </table:table-row>
        <table:table-row table:style-name="ro1">
          <table:table-cell table:number-columns-repeated="8"/>
          <table:table-cell table:style-name="ce443" table:number-columns-repeated="5"/>
          <table:table-cell table:number-columns-repeated="5"/>
        </table:table-row>
        <table:table-row table:style-name="ro1">
          <table:table-cell table:number-columns-repeated="8"/>
          <table:table-cell table:style-name="ce522" office:value-type="string" calcext:value-type="string" table:number-columns-spanned="5" table:number-rows-spanned="1">
            <text:p>Diluicao TS</text:p>
          </table:table-cell>
          <table:covered-table-cell table:number-columns-repeated="4" table:style-name="ce522"/>
          <table:table-cell table:number-columns-repeated="5"/>
        </table:table-row>
        <table:table-row table:style-name="ro1">
          <table:table-cell table:number-columns-repeated="8"/>
          <table:table-cell table:style-name="ce402" office:value-type="string" calcext:value-type="string">
            <text:p>Volume (mL)</text:p>
          </table:table-cell>
          <table:table-cell table:style-name="ce443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489" office:value-type="float" office:value="250" calcext:value-type="float">
            <text:p>250</text:p>
          </table:table-cell>
          <table:table-cell table:style-name="ce443"/>
          <table:table-cell table:style-name="ce404" office:value-type="float" office:value="5" calcext:value-type="float">
            <text:p>5</text:p>
          </table:table-cell>
          <table:table-cell table:style-name="ce140" table:formula="of:=([.I105]/1000)*[.K105]" office:value-type="float" office:value="1.25" calcext:value-type="float">
            <text:p>1.25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Volume (mL)</text:p>
          </table:table-cell>
          <table:table-cell table:style-name="ce377" office:value-type="string" calcext:value-type="string">
            <text:p>Proporcao Sub</text:p>
          </table:table-cell>
          <table:table-cell table:style-name="ce377" office:value-type="string" calcext:value-type="string">
            <text:p>Volume Sub (mL)</text:p>
          </table:table-cell>
          <table:table-cell table:style-name="ce442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1" office:value-type="string" calcext:value-type="string">
            <text:p>Sub 1</text:p>
          </table:table-cell>
          <table:table-cell table:style-name="ce552" table:formula="of:=([.$J$22]/[.$N68])*[.$I$105]" office:value-type="float" office:value="8.26595607016326" calcext:value-type="float" table:number-columns-spanned="1" table:number-rows-spanned="3">
            <text:p>8.265956</text:p>
          </table:table-cell>
          <table:table-cell table:style-name="ce552" table:formula="of:=[.$J$19]/[.$J$22]" office:value-type="float" office:value="0.436808902750213" calcext:value-type="float">
            <text:p>0.436809</text:p>
          </table:table-cell>
          <table:table-cell table:style-name="ce552" table:formula="of:=[.K107]*[.$J107]" office:value-type="float" office:value="3.61064320118947" calcext:value-type="float">
            <text:p>3.610643</text:p>
          </table:table-cell>
          <table:table-cell table:style-name="ce446" table:formula="of:=[.L107]*([.$O$3]/1000)" office:value-type="float" office:value="3.85774696545299" calcext:value-type="float">
            <text:p>3.85774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2</text:p>
          </table:table-cell>
          <table:covered-table-cell table:style-name="ce546"/>
          <table:table-cell table:style-name="ce546" table:formula="of:=[.$J$20]/[.$J$22]" office:value-type="float" office:value="0.436808902750213" calcext:value-type="float">
            <text:p>0.436809</text:p>
          </table:table-cell>
          <table:table-cell table:style-name="ce546" table:formula="of:=[.K108]*[.$J107]" office:value-type="float" office:value="3.61064320118947" calcext:value-type="float">
            <text:p>3.610643</text:p>
          </table:table-cell>
          <table:table-cell table:style-name="ce586" table:formula="of:=[.L108]*([.$P$3]/1000)" office:value-type="float" office:value="3.22457169502647" calcext:value-type="float">
            <text:p>3.22457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3</text:p>
          </table:table-cell>
          <table:covered-table-cell table:style-name="ce546"/>
          <table:table-cell table:style-name="ce546" table:formula="of:=[.$J$21]/[.$J$22]" office:value-type="float" office:value="0.126382194499575" calcext:value-type="float">
            <text:p>0.126382</text:p>
          </table:table-cell>
          <table:table-cell table:style-name="ce546" table:formula="of:=[.K109]*[.$J107]" office:value-type="float" office:value="1.04466966778431" calcext:value-type="float">
            <text:p>1.044670</text:p>
          </table:table-cell>
          <table:table-cell table:style-name="ce586" table:formula="of:=[.L109]*([.$Q$3]/1000)" office:value-type="float" office:value="1.31628378140824" calcext:value-type="float">
            <text:p>1.31628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1</text:p>
          </table:table-cell>
          <table:table-cell table:style-name="ce562" table:formula="of:=([.$J$22]/[.$N69])*[.$I$105]" office:value-type="float" office:value="20.6648901754082" calcext:value-type="float" table:number-columns-spanned="1" table:number-rows-spanned="3">
            <text:p>20.664890</text:p>
          </table:table-cell>
          <table:table-cell table:style-name="ce562" table:formula="of:=[.$J$19]/[.$J$22]" office:value-type="float" office:value="0.436808902750213" calcext:value-type="float">
            <text:p>0.436809</text:p>
          </table:table-cell>
          <table:table-cell table:style-name="ce562" table:formula="of:=[.K110]*[.$J110]" office:value-type="float" office:value="9.02660800297368" calcext:value-type="float">
            <text:p>9.026608</text:p>
          </table:table-cell>
          <table:table-cell table:style-name="ce450" table:formula="of:=[.L110]*([.$O$3]/1000)" office:value-type="float" office:value="9.64436741363246" calcext:value-type="float">
            <text:p>9.64436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2</text:p>
          </table:table-cell>
          <table:covered-table-cell table:style-name="ce425"/>
          <table:table-cell table:style-name="ce562" table:formula="of:=[.$J$20]/[.$J$22]" office:value-type="float" office:value="0.436808902750213" calcext:value-type="float">
            <text:p>0.436809</text:p>
          </table:table-cell>
          <table:table-cell table:style-name="ce562" table:formula="of:=[.K111]*[.$J110]" office:value-type="float" office:value="9.02660800297368" calcext:value-type="float">
            <text:p>9.026608</text:p>
          </table:table-cell>
          <table:table-cell table:style-name="ce450" table:formula="of:=[.L111]*([.$P$3]/1000)" office:value-type="float" office:value="8.06142923756618" calcext:value-type="float">
            <text:p>8.06142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3</text:p>
          </table:table-cell>
          <table:covered-table-cell table:style-name="ce425"/>
          <table:table-cell table:style-name="ce562" table:formula="of:=[.$J$21]/[.$J$22]" office:value-type="float" office:value="0.126382194499575" calcext:value-type="float">
            <text:p>0.126382</text:p>
          </table:table-cell>
          <table:table-cell table:style-name="ce562" table:formula="of:=[.K112]*[.$J110]" office:value-type="float" office:value="2.61167416946079" calcext:value-type="float">
            <text:p>2.611674</text:p>
          </table:table-cell>
          <table:table-cell table:style-name="ce450" table:formula="of:=[.L112]*([.$Q$3]/1000)" office:value-type="float" office:value="3.29070945352059" calcext:value-type="float">
            <text:p>3.2907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1</text:p>
          </table:table-cell>
          <table:table-cell table:style-name="ce360" table:formula="of:=([.$J$26]/[.$N70])*[.$I$105]" office:value-type="float" office:value="5.69840263066015" calcext:value-type="float" table:number-columns-spanned="1" table:number-rows-spanned="3">
            <text:p>5.698403</text:p>
          </table:table-cell>
          <table:table-cell table:style-name="ce360" table:formula="of:=[.$J$23]/[.$J$26]" office:value-type="float" office:value="0.584566495921078" calcext:value-type="float">
            <text:p>0.584566</text:p>
          </table:table-cell>
          <table:table-cell table:style-name="ce360" table:formula="of:=[.K113]*[.$J113]" office:value-type="float" office:value="3.33109525815245" calcext:value-type="float">
            <text:p>3.331095</text:p>
          </table:table-cell>
          <table:table-cell table:style-name="ce308" table:formula="of:=[.L113]*([.$O$3]/1000)" office:value-type="float" office:value="3.55906743140364" calcext:value-type="float">
            <text:p>3.55906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2</text:p>
          </table:table-cell>
          <table:covered-table-cell table:style-name="ce360"/>
          <table:table-cell table:style-name="ce360" table:formula="of:=[.$J$24]/[.$J$26]" office:value-type="float" office:value="0.584566495921078" calcext:value-type="float">
            <text:p>0.584566</text:p>
          </table:table-cell>
          <table:table-cell table:style-name="ce360" table:formula="of:=[.K114]*[.$J113]" office:value-type="float" office:value="3.33109525815245" calcext:value-type="float">
            <text:p>3.331095</text:p>
          </table:table-cell>
          <table:table-cell table:style-name="ce308" table:formula="of:=[.L114]*([.$P$3]/1000)" office:value-type="float" office:value="2.97491468537703" calcext:value-type="float">
            <text:p>2.9749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3</text:p>
          </table:table-cell>
          <table:covered-table-cell table:style-name="ce360"/>
          <table:table-cell table:style-name="ce360" table:formula="of:=[.$J$25]/[.$J$26]" office:value-type="float" office:value="-0.169132991842155" calcext:value-type="float">
            <text:p>-0.169133</text:p>
          </table:table-cell>
          <table:table-cell table:style-name="ce360" table:formula="of:=[.K115]*[.$J113]" office:value-type="float" office:value="-0.963787885644759" calcext:value-type="float">
            <text:p>-0.963788</text:p>
          </table:table-cell>
          <table:table-cell table:style-name="ce308" table:formula="of:=[.L115]*([.$Q$3]/1000)" office:value-type="float" office:value="-1.2143727359124" calcext:value-type="float">
            <text:p>-1.21437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1</text:p>
          </table:table-cell>
          <table:table-cell table:style-name="ce564" table:formula="of:=([.$J$26]/[.$N71])*[.$I$105]" office:value-type="float" office:value="14.2460065766504" calcext:value-type="float" table:number-columns-spanned="1" table:number-rows-spanned="3">
            <text:p>14.246007</text:p>
          </table:table-cell>
          <table:table-cell table:style-name="ce564" table:formula="of:=[.$J$23]/[.$J$26]" office:value-type="float" office:value="0.584566495921078" calcext:value-type="float">
            <text:p>0.584566</text:p>
          </table:table-cell>
          <table:table-cell table:style-name="ce564" table:formula="of:=[.K116]*[.$J116]" office:value-type="float" office:value="8.32773814538113" calcext:value-type="float">
            <text:p>8.327738</text:p>
          </table:table-cell>
          <table:table-cell table:style-name="ce452" table:formula="of:=[.L116]*([.$O$3]/1000)" office:value-type="float" office:value="8.89766857850911" calcext:value-type="float">
            <text:p>8.89766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2</text:p>
          </table:table-cell>
          <table:covered-table-cell table:style-name="ce427"/>
          <table:table-cell table:style-name="ce564" table:formula="of:=[.$J$24]/[.$J$26]" office:value-type="float" office:value="0.584566495921078" calcext:value-type="float">
            <text:p>0.584566</text:p>
          </table:table-cell>
          <table:table-cell table:style-name="ce564" table:formula="of:=[.K117]*[.$J116]" office:value-type="float" office:value="8.32773814538113" calcext:value-type="float">
            <text:p>8.327738</text:p>
          </table:table-cell>
          <table:table-cell table:style-name="ce452" table:formula="of:=[.L117]*([.$P$3]/1000)" office:value-type="float" office:value="7.43728671344257" calcext:value-type="float">
            <text:p>7.43728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3</text:p>
          </table:table-cell>
          <table:covered-table-cell table:style-name="ce427"/>
          <table:table-cell table:style-name="ce564" table:formula="of:=[.$J$25]/[.$J$26]" office:value-type="float" office:value="-0.169132991842155" calcext:value-type="float">
            <text:p>-0.169133</text:p>
          </table:table-cell>
          <table:table-cell table:style-name="ce564" table:formula="of:=[.K118]*[.$J116]" office:value-type="float" office:value="-2.4094697141119" calcext:value-type="float">
            <text:p>-2.409470</text:p>
          </table:table-cell>
          <table:table-cell table:style-name="ce452" table:formula="of:=[.L118]*([.$Q$3]/1000)" office:value-type="float" office:value="-3.03593183978099" calcext:value-type="float">
            <text:p>-3.03593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1</text:p>
          </table:table-cell>
          <table:table-cell table:style-name="ce293" table:formula="of:=([.$J$30]/[.$N72])*[.$I$105]" office:value-type="float" office:value="20.3342554684148" calcext:value-type="float" table:number-columns-spanned="1" table:number-rows-spanned="3">
            <text:p>20.334255</text:p>
          </table:table-cell>
          <table:table-cell table:style-name="ce293" table:formula="of:=[.$J$27]/[.$J$30]" office:value-type="float" office:value="0.283803384367446" calcext:value-type="float">
            <text:p>0.283803</text:p>
          </table:table-cell>
          <table:table-cell table:style-name="ce293" table:formula="of:=[.K119]*[.$J119]" office:value-type="float" office:value="5.77093052052835" calcext:value-type="float">
            <text:p>5.770931</text:p>
          </table:table-cell>
          <table:table-cell table:style-name="ce309" table:formula="of:=[.L119]*([.$O$3]/1000)" office:value-type="float" office:value="6.16587916969312" calcext:value-type="float">
            <text:p>6.16587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2</text:p>
          </table:table-cell>
          <table:covered-table-cell table:style-name="ce293"/>
          <table:table-cell table:style-name="ce293" table:formula="of:=[.$J$28]/[.$J$30]" office:value-type="float" office:value="0.432393231265109" calcext:value-type="float">
            <text:p>0.432393</text:p>
          </table:table-cell>
          <table:table-cell table:style-name="ce293" table:formula="of:=[.K120]*[.$J119]" office:value-type="float" office:value="8.79239442735807" calcext:value-type="float">
            <text:p>8.792394</text:p>
          </table:table-cell>
          <table:table-cell table:style-name="ce309" table:formula="of:=[.L120]*([.$P$3]/1000)" office:value-type="float" office:value="7.85225917438401" calcext:value-type="float">
            <text:p>7.85225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3</text:p>
          </table:table-cell>
          <table:covered-table-cell table:style-name="ce293"/>
          <table:table-cell table:style-name="ce293" table:formula="of:=[.$J$29]/[.$J$30]" office:value-type="float" office:value="0.283803384367446" calcext:value-type="float">
            <text:p>0.283803</text:p>
          </table:table-cell>
          <table:table-cell table:style-name="ce293" table:formula="of:=[.K121]*[.$J119]" office:value-type="float" office:value="5.77093052052835" calcext:value-type="float">
            <text:p>5.770931</text:p>
          </table:table-cell>
          <table:table-cell table:style-name="ce309" table:formula="of:=[.L121]*([.$Q$3]/1000)" office:value-type="float" office:value="7.27137245586572" calcext:value-type="float">
            <text:p>7.27137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1</text:p>
          </table:table-cell>
          <table:table-cell table:style-name="ce566" table:formula="of:=([.$J$30]/[.$N73])*[.$I$105]" office:value-type="float" office:value="50.8356386710369" calcext:value-type="float" table:number-columns-spanned="1" table:number-rows-spanned="3">
            <text:p>50.835639</text:p>
          </table:table-cell>
          <table:table-cell table:style-name="ce566" table:formula="of:=[.$J$27]/[.$J$30]" office:value-type="float" office:value="0.283803384367446" calcext:value-type="float">
            <text:p>0.283803</text:p>
          </table:table-cell>
          <table:table-cell table:style-name="ce566" table:formula="of:=[.K122]*[.$J122]" office:value-type="float" office:value="14.4273263013209" calcext:value-type="float">
            <text:p>14.427326</text:p>
          </table:table-cell>
          <table:table-cell table:style-name="ce453" table:formula="of:=[.L122]*([.$O$3]/1000)" office:value-type="float" office:value="15.4146979242328" calcext:value-type="float">
            <text:p>15.41469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2</text:p>
          </table:table-cell>
          <table:covered-table-cell table:style-name="ce428"/>
          <table:table-cell table:style-name="ce566" table:formula="of:=[.$J$28]/[.$J$30]" office:value-type="float" office:value="0.432393231265109" calcext:value-type="float">
            <text:p>0.432393</text:p>
          </table:table-cell>
          <table:table-cell table:style-name="ce566" table:formula="of:=[.K123]*[.$J122]" office:value-type="float" office:value="21.9809860683952" calcext:value-type="float">
            <text:p>21.980986</text:p>
          </table:table-cell>
          <table:table-cell table:style-name="ce453" table:formula="of:=[.L123]*([.$P$3]/1000)" office:value-type="float" office:value="19.63064793596" calcext:value-type="float">
            <text:p>19.63064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3</text:p>
          </table:table-cell>
          <table:covered-table-cell table:style-name="ce428"/>
          <table:table-cell table:style-name="ce566" table:formula="of:=[.$J$29]/[.$J$30]" office:value-type="float" office:value="0.283803384367446" calcext:value-type="float">
            <text:p>0.283803</text:p>
          </table:table-cell>
          <table:table-cell table:style-name="ce566" table:formula="of:=[.K124]*[.$J122]" office:value-type="float" office:value="14.4273263013209" calcext:value-type="float">
            <text:p>14.427326</text:p>
          </table:table-cell>
          <table:table-cell table:style-name="ce453" table:formula="of:=[.L124]*([.$Q$3]/1000)" office:value-type="float" office:value="18.1784311396643" calcext:value-type="float">
            <text:p>18.17843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1</text:p>
          </table:table-cell>
          <table:table-cell table:style-name="ce401" table:formula="of:=([.$J$34]/[.$N74])*[.$I$105]" office:value-type="float" office:value="-6.23863048318146" calcext:value-type="float" table:number-columns-spanned="1" table:number-rows-spanned="3">
            <text:p>-6.238630</text:p>
          </table:table-cell>
          <table:table-cell table:style-name="ce401" table:formula="of:=[.$J$31]/[.$J$34]" office:value-type="float" office:value="2.09892729439809" calcext:value-type="float">
            <text:p>2.098927</text:p>
          </table:table-cell>
          <table:table-cell table:style-name="ce401" table:formula="of:=[.K125]*[.$J125]" office:value-type="float" office:value="-13.0944318008135" calcext:value-type="float">
            <text:p>-13.094432</text:p>
          </table:table-cell>
          <table:table-cell table:style-name="ce306" table:formula="of:=[.L125]*([.$O$3]/1000)" office:value-type="float" office:value="-13.9905833196916" calcext:value-type="float">
            <text:p>-13.99058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2</text:p>
          </table:table-cell>
          <table:covered-table-cell table:style-name="ce401"/>
          <table:table-cell table:style-name="ce401" table:formula="of:=[.$J$32]/[.$J$34]" office:value-type="float" office:value="-3.19785458879618" calcext:value-type="float">
            <text:p>-3.197855</text:p>
          </table:table-cell>
          <table:table-cell table:style-name="ce401" table:formula="of:=[.K126]*[.$J125]" office:value-type="float" office:value="19.9502331184456" calcext:value-type="float">
            <text:p>19.950233</text:p>
          </table:table-cell>
          <table:table-cell table:style-name="ce306" table:formula="of:=[.L126]*([.$P$3]/1000)" office:value-type="float" office:value="17.8170352035134" calcext:value-type="float">
            <text:p>17.8170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3</text:p>
          </table:table-cell>
          <table:covered-table-cell table:style-name="ce401"/>
          <table:table-cell table:style-name="ce401" table:formula="of:=[.$J$33]/[.$J$34]" office:value-type="float" office:value="2.09892729439809" calcext:value-type="float">
            <text:p>2.098927</text:p>
          </table:table-cell>
          <table:table-cell table:style-name="ce401" table:formula="of:=[.K127]*[.$J125]" office:value-type="float" office:value="-13.0944318008135" calcext:value-type="float">
            <text:p>-13.094432</text:p>
          </table:table-cell>
          <table:table-cell table:style-name="ce306" table:formula="of:=[.L127]*([.$Q$3]/1000)" office:value-type="float" office:value="-16.498984069025" calcext:value-type="float">
            <text:p>-16.49898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1</text:p>
          </table:table-cell>
          <table:table-cell table:style-name="ce568" table:formula="of:=([.$J$34]/[.$N75])*[.$I$105]" office:value-type="float" office:value="-15.5965762079537" calcext:value-type="float" table:number-columns-spanned="1" table:number-rows-spanned="3">
            <text:p>-15.596576</text:p>
          </table:table-cell>
          <table:table-cell table:style-name="ce568" table:formula="of:=[.$J$31]/[.$J$34]" office:value-type="float" office:value="2.09892729439809" calcext:value-type="float">
            <text:p>2.098927</text:p>
          </table:table-cell>
          <table:table-cell table:style-name="ce568" table:formula="of:=[.K128]*[.$J128]" office:value-type="float" office:value="-32.7360795020338" calcext:value-type="float">
            <text:p>-32.736080</text:p>
          </table:table-cell>
          <table:table-cell table:style-name="ce454" table:formula="of:=[.L128]*([.$O$3]/1000)" office:value-type="float" office:value="-34.9764582992291" calcext:value-type="float">
            <text:p>-34.9764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2</text:p>
          </table:table-cell>
          <table:covered-table-cell table:style-name="ce430"/>
          <table:table-cell table:style-name="ce568" table:formula="of:=[.$J$32]/[.$J$34]" office:value-type="float" office:value="-3.19785458879618" calcext:value-type="float">
            <text:p>-3.197855</text:p>
          </table:table-cell>
          <table:table-cell table:style-name="ce568" table:formula="of:=[.K129]*[.$J128]" office:value-type="float" office:value="49.875582796114" calcext:value-type="float">
            <text:p>49.875583</text:p>
          </table:table-cell>
          <table:table-cell table:style-name="ce454" table:formula="of:=[.L129]*([.$P$3]/1000)" office:value-type="float" office:value="44.5425880087836" calcext:value-type="float">
            <text:p>44.54258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3</text:p>
          </table:table-cell>
          <table:covered-table-cell table:style-name="ce430"/>
          <table:table-cell table:style-name="ce568" table:formula="of:=[.$J$33]/[.$J$34]" office:value-type="float" office:value="2.09892729439809" calcext:value-type="float">
            <text:p>2.098927</text:p>
          </table:table-cell>
          <table:table-cell table:style-name="ce568" table:formula="of:=[.K130]*[.$J128]" office:value-type="float" office:value="-32.7360795020338" calcext:value-type="float">
            <text:p>-32.736080</text:p>
          </table:table-cell>
          <table:table-cell table:style-name="ce454" table:formula="of:=[.L130]*([.$Q$3]/1000)" office:value-type="float" office:value="-41.2474601725626" calcext:value-type="float">
            <text:p>-41.24746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1</text:p>
          </table:table-cell>
          <table:table-cell table:style-name="ce408" table:formula="of:=([.$J$38]/[.$N76])*[.$I$105]" office:value-type="float" office:value="10.9409825873323" calcext:value-type="float" table:number-columns-spanned="1" table:number-rows-spanned="3">
            <text:p>10.940983</text:p>
          </table:table-cell>
          <table:table-cell table:style-name="ce408" table:formula="of:=[.$J$35]/[.$J$38]" office:value-type="float" office:value="0.524624649025397" calcext:value-type="float">
            <text:p>0.524625</text:p>
          </table:table-cell>
          <table:table-cell table:style-name="ce408" table:formula="of:=[.K131]*[.$J131]" office:value-type="float" office:value="5.73990914987219" calcext:value-type="float">
            <text:p>5.739909</text:p>
          </table:table-cell>
          <table:table-cell table:style-name="ce307" table:formula="of:=[.L131]*([.$O$3]/1000)" office:value-type="float" office:value="6.1327347708022" calcext:value-type="float">
            <text:p>6.1327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2</text:p>
          </table:table-cell>
          <table:covered-table-cell table:style-name="ce408"/>
          <table:table-cell table:style-name="ce408" table:formula="of:=[.$J$36]/[.$J$38]" office:value-type="float" office:value="0.237687675487302" calcext:value-type="float">
            <text:p>0.237688</text:p>
          </table:table-cell>
          <table:table-cell table:style-name="ce408" table:formula="of:=[.K132]*[.$J131]" office:value-type="float" office:value="2.60053671873006" calcext:value-type="float">
            <text:p>2.600537</text:p>
          </table:table-cell>
          <table:table-cell table:style-name="ce307" table:formula="of:=[.L132]*([.$P$3]/1000)" office:value-type="float" office:value="2.3224718222868" calcext:value-type="float">
            <text:p>2.32247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3</text:p>
          </table:table-cell>
          <table:covered-table-cell table:style-name="ce408"/>
          <table:table-cell table:style-name="ce408" table:formula="of:=[.$J$37]/[.$J$38]" office:value-type="float" office:value="0.237687675487302" calcext:value-type="float">
            <text:p>0.237688</text:p>
          </table:table-cell>
          <table:table-cell table:style-name="ce408" table:formula="of:=[.K133]*[.$J131]" office:value-type="float" office:value="2.60053671873006" calcext:value-type="float">
            <text:p>2.600537</text:p>
          </table:table-cell>
          <table:table-cell table:style-name="ce307" table:formula="of:=[.L133]*([.$Q$3]/1000)" office:value-type="float" office:value="3.27667626559988" calcext:value-type="float">
            <text:p>3.27667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1</text:p>
          </table:table-cell>
          <table:table-cell table:style-name="ce570" table:formula="of:=([.$J$38]/[.$N77])*[.$I$105]" office:value-type="float" office:value="27.3524564683308" calcext:value-type="float" table:number-columns-spanned="1" table:number-rows-spanned="3">
            <text:p>27.352456</text:p>
          </table:table-cell>
          <table:table-cell table:style-name="ce570" table:formula="of:=[.$J$35]/[.$J$38]" office:value-type="float" office:value="0.524624649025397" calcext:value-type="float">
            <text:p>0.524625</text:p>
          </table:table-cell>
          <table:table-cell table:style-name="ce570" table:formula="of:=[.K134]*[.$J134]" office:value-type="float" office:value="14.3497728746805" calcext:value-type="float">
            <text:p>14.349773</text:p>
          </table:table-cell>
          <table:table-cell table:style-name="ce455" table:formula="of:=[.L134]*([.$O$3]/1000)" office:value-type="float" office:value="15.3318369270055" calcext:value-type="float">
            <text:p>15.33183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2</text:p>
          </table:table-cell>
          <table:covered-table-cell table:style-name="ce431"/>
          <table:table-cell table:style-name="ce570" table:formula="of:=[.$J$36]/[.$J$38]" office:value-type="float" office:value="0.237687675487302" calcext:value-type="float">
            <text:p>0.237688</text:p>
          </table:table-cell>
          <table:table-cell table:style-name="ce570" table:formula="of:=[.K135]*[.$J134]" office:value-type="float" office:value="6.50134179682515" calcext:value-type="float">
            <text:p>6.501342</text:p>
          </table:table-cell>
          <table:table-cell table:style-name="ce455" table:formula="of:=[.L135]*([.$P$3]/1000)" office:value-type="float" office:value="5.80617955571701" calcext:value-type="float">
            <text:p>5.80618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3</text:p>
          </table:table-cell>
          <table:covered-table-cell table:style-name="ce431"/>
          <table:table-cell table:style-name="ce570" table:formula="of:=[.$J$37]/[.$J$38]" office:value-type="float" office:value="0.237687675487302" calcext:value-type="float">
            <text:p>0.237688</text:p>
          </table:table-cell>
          <table:table-cell table:style-name="ce570" table:formula="of:=[.K136]*[.$J134]" office:value-type="float" office:value="6.50134179682515" calcext:value-type="float">
            <text:p>6.501342</text:p>
          </table:table-cell>
          <table:table-cell table:style-name="ce455" table:formula="of:=[.L136]*([.$Q$3]/1000)" office:value-type="float" office:value="8.19169066399969" calcext:value-type="float">
            <text:p>8.19169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1</text:p>
          </table:table-cell>
          <table:table-cell table:style-name="ce547" table:formula="of:=([.$J$42]/[.$N79])*[.$I$105]" office:value-type="float" office:value="8.3756905621804" calcext:value-type="float" table:number-columns-spanned="1" table:number-rows-spanned="3">
            <text:p>8.375691</text:p>
          </table:table-cell>
          <table:table-cell table:style-name="ce547" table:formula="of:=[.$J$39]/[.$J$42]" office:value-type="float" office:value="10.652428964253" calcext:value-type="float">
            <text:p>10.652429</text:p>
          </table:table-cell>
          <table:table-cell table:style-name="ce547" table:formula="of:=[.K137]*[.$J137]" office:value-type="float" office:value="89.2214487401908" calcext:value-type="float">
            <text:p>89.221449</text:p>
          </table:table-cell>
          <table:table-cell table:style-name="ce541" table:formula="of:=[.L137]*([.$O$3]/1000)" office:value-type="float" office:value="95.3275507857992" calcext:value-type="float">
            <text:p>95.32755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2</text:p>
          </table:table-cell>
          <table:covered-table-cell table:style-name="ce547"/>
          <table:table-cell table:style-name="ce547" table:formula="of:=[.$J$40]/[.$J$42]" office:value-type="float" office:value="-4.82621448212649" calcext:value-type="float">
            <text:p>-4.826214</text:p>
          </table:table-cell>
          <table:table-cell table:style-name="ce547" table:formula="of:=[.K138]*[.$J137]" office:value-type="float" office:value="-40.4228790890052" calcext:value-type="float">
            <text:p>-40.422879</text:p>
          </table:table-cell>
          <table:table-cell table:style-name="ce541" table:formula="of:=[.L138]*([.$P$3]/1000)" office:value-type="float" office:value="-36.1006237611467" calcext:value-type="float">
            <text:p>-36.10062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3</text:p>
          </table:table-cell>
          <table:covered-table-cell table:style-name="ce547"/>
          <table:table-cell table:style-name="ce547" table:formula="of:=[.$J$41]/[.$J$42]" office:value-type="float" office:value="-4.82621448212649" calcext:value-type="float">
            <text:p>-4.826214</text:p>
          </table:table-cell>
          <table:table-cell table:style-name="ce547" table:formula="of:=[.K139]*[.$J137]" office:value-type="float" office:value="-40.4228790890052" calcext:value-type="float">
            <text:p>-40.422879</text:p>
          </table:table-cell>
          <table:table-cell table:style-name="ce541" table:formula="of:=[.L139]*([.$Q$3]/1000)" office:value-type="float" office:value="-50.9328276521465" calcext:value-type="float">
            <text:p>-50.93282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1</text:p>
          </table:table-cell>
          <table:table-cell table:style-name="ce561" table:formula="of:=([.$J$42]/[.$N79])*[.$I$105]" office:value-type="float" office:value="8.3756905621804" calcext:value-type="float" table:number-columns-spanned="1" table:number-rows-spanned="3">
            <text:p>8.375691</text:p>
          </table:table-cell>
          <table:table-cell table:style-name="ce432" table:formula="of:=[.$J$39]/[.$J$42]" office:value-type="float" office:value="10.652428964253" calcext:value-type="float">
            <text:p>10.652429</text:p>
          </table:table-cell>
          <table:table-cell table:style-name="ce432" table:formula="of:=[.K140]*[.$J140]" office:value-type="float" office:value="89.2214487401908" calcext:value-type="float">
            <text:p>89.221449</text:p>
          </table:table-cell>
          <table:table-cell table:style-name="ce456" table:formula="of:=[.L140]*([.$O$3]/1000)" office:value-type="float" office:value="95.3275507857992" calcext:value-type="float">
            <text:p>95.32755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2</text:p>
          </table:table-cell>
          <table:covered-table-cell table:style-name="ce432"/>
          <table:table-cell table:style-name="ce432" table:formula="of:=[.$J$40]/[.$J$42]" office:value-type="float" office:value="-4.82621448212649" calcext:value-type="float">
            <text:p>-4.826214</text:p>
          </table:table-cell>
          <table:table-cell table:style-name="ce432" table:formula="of:=[.K141]*[.$J140]" office:value-type="float" office:value="-40.4228790890052" calcext:value-type="float">
            <text:p>-40.422879</text:p>
          </table:table-cell>
          <table:table-cell table:style-name="ce456" table:formula="of:=[.L141]*([.$P$3]/1000)" office:value-type="float" office:value="-36.1006237611467" calcext:value-type="float">
            <text:p>-36.10062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8" office:value-type="string" calcext:value-type="string">
            <text:p>Sub 3</text:p>
          </table:table-cell>
          <table:covered-table-cell table:style-name="ce424"/>
          <table:table-cell table:style-name="ce561" table:formula="of:=[.$J$41]/[.$J$42]" office:value-type="float" office:value="-4.82621448212649" calcext:value-type="float">
            <text:p>-4.826214</text:p>
          </table:table-cell>
          <table:table-cell table:style-name="ce561" table:formula="of:=[.K142]*[.$J140]" office:value-type="float" office:value="-40.4228790890052" calcext:value-type="float">
            <text:p>-40.422879</text:p>
          </table:table-cell>
          <table:table-cell table:style-name="ce457" table:formula="of:=[.L142]*([.$Q$3]/1000)" office:value-type="float" office:value="-50.9328276521465" calcext:value-type="float">
            <text:p>-50.9328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522" office:value-type="string" calcext:value-type="string" table:number-columns-spanned="5" table:number-rows-spanned="1">
            <text:p>Diluicao COV</text:p>
          </table:table-cell>
          <table:covered-table-cell table:number-columns-repeated="4" table:style-name="ce522"/>
          <table:table-cell table:number-columns-repeated="5"/>
        </table:table-row>
        <table:table-row table:style-name="ro1">
          <table:table-cell table:number-columns-repeated="8"/>
          <table:table-cell table:style-name="ce402" office:value-type="string" calcext:value-type="string">
            <text:p>Volume (mL)</text:p>
          </table:table-cell>
          <table:table-cell table:style-name="ce443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489" office:value-type="float" office:value="500" calcext:value-type="float">
            <text:p>500</text:p>
          </table:table-cell>
          <table:table-cell table:style-name="ce443"/>
          <table:table-cell table:style-name="ce404" office:value-type="float" office:value="10" calcext:value-type="float">
            <text:p>10</text:p>
          </table:table-cell>
          <table:table-cell table:style-name="ce140" table:formula="of:=([.I146]/1000)*[.K146]" office:value-type="float" office:value="5" calcext:value-type="float">
            <text:p>5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Volume (mL)</text:p>
          </table:table-cell>
          <table:table-cell table:style-name="ce377" office:value-type="string" calcext:value-type="string">
            <text:p>Proporcao Sub</text:p>
          </table:table-cell>
          <table:table-cell table:style-name="ce377" office:value-type="string" calcext:value-type="string">
            <text:p>Volume Sub (mL)</text:p>
          </table:table-cell>
          <table:table-cell table:style-name="ce442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1" office:value-type="string" calcext:value-type="string">
            <text:p>Sub 1</text:p>
          </table:table-cell>
          <table:table-cell table:style-name="ce552" table:formula="of:=([.$J$22]/[.$N88])*[.$I$146]" office:value-type="float" office:value="1491.85543596324" calcext:value-type="float" table:number-columns-spanned="1" table:number-rows-spanned="3">
            <text:p>1491.855436</text:p>
          </table:table-cell>
          <table:table-cell table:style-name="ce552" table:formula="of:=[.$J$19]/[.$J$22]" office:value-type="float" office:value="0.436808902750213" calcext:value-type="float">
            <text:p>0.436809</text:p>
          </table:table-cell>
          <table:table-cell table:style-name="ce552" table:formula="of:=[.K148]*[.$J148]" office:value-type="float" office:value="651.655736045041" calcext:value-type="float">
            <text:p>651.655736</text:p>
          </table:table-cell>
          <table:table-cell table:style-name="ce446" table:formula="of:=[.L148]*([.$O$3]/1000)" office:value-type="float" office:value="696.253492291793" calcext:value-type="float">
            <text:p>696.25349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2</text:p>
          </table:table-cell>
          <table:covered-table-cell table:style-name="ce546"/>
          <table:table-cell table:style-name="ce546" table:formula="of:=[.$J$20]/[.$J$22]" office:value-type="float" office:value="0.436808902750213" calcext:value-type="float">
            <text:p>0.436809</text:p>
          </table:table-cell>
          <table:table-cell table:style-name="ce546" table:formula="of:=[.K149]*[.$J148]" office:value-type="float" office:value="651.655736045041" calcext:value-type="float">
            <text:p>651.655736</text:p>
          </table:table-cell>
          <table:table-cell table:style-name="ce586" table:formula="of:=[.L149]*([.$P$3]/1000)" office:value-type="float" office:value="581.976818052871" calcext:value-type="float">
            <text:p>581.97681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3</text:p>
          </table:table-cell>
          <table:covered-table-cell table:style-name="ce546"/>
          <table:table-cell table:style-name="ce546" table:formula="of:=[.$J$21]/[.$J$22]" office:value-type="float" office:value="0.126382194499575" calcext:value-type="float">
            <text:p>0.126382</text:p>
          </table:table-cell>
          <table:table-cell table:style-name="ce546" table:formula="of:=[.K150]*[.$J148]" office:value-type="float" office:value="188.543963873154" calcext:value-type="float">
            <text:p>188.543964</text:p>
          </table:table-cell>
          <table:table-cell table:style-name="ce586" table:formula="of:=[.L150]*([.$Q$3]/1000)" office:value-type="float" office:value="237.565394480174" calcext:value-type="float">
            <text:p>237.56539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1</text:p>
          </table:table-cell>
          <table:table-cell table:style-name="ce562" table:formula="of:=([.$J$22]/[.$N89])*[.$I$146]" office:value-type="float" office:value="596.742174385294" calcext:value-type="float" table:number-columns-spanned="1" table:number-rows-spanned="3">
            <text:p>596.742174</text:p>
          </table:table-cell>
          <table:table-cell table:style-name="ce562" table:formula="of:=[.$J$19]/[.$J$22]" office:value-type="float" office:value="0.436808902750213" calcext:value-type="float">
            <text:p>0.436809</text:p>
          </table:table-cell>
          <table:table-cell table:style-name="ce562" table:formula="of:=[.K151]*[.$J151]" office:value-type="float" office:value="260.662294418017" calcext:value-type="float">
            <text:p>260.662294</text:p>
          </table:table-cell>
          <table:table-cell table:style-name="ce450" table:formula="of:=[.L151]*([.$O$3]/1000)" office:value-type="float" office:value="278.501396916717" calcext:value-type="float">
            <text:p>278.50139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2</text:p>
          </table:table-cell>
          <table:covered-table-cell table:style-name="ce425"/>
          <table:table-cell table:style-name="ce562" table:formula="of:=[.$J$20]/[.$J$22]" office:value-type="float" office:value="0.436808902750213" calcext:value-type="float">
            <text:p>0.436809</text:p>
          </table:table-cell>
          <table:table-cell table:style-name="ce562" table:formula="of:=[.K152]*[.$J151]" office:value-type="float" office:value="260.662294418017" calcext:value-type="float">
            <text:p>260.662294</text:p>
          </table:table-cell>
          <table:table-cell table:style-name="ce450" table:formula="of:=[.L152]*([.$P$3]/1000)" office:value-type="float" office:value="232.790727221148" calcext:value-type="float">
            <text:p>232.7907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3</text:p>
          </table:table-cell>
          <table:covered-table-cell table:style-name="ce425"/>
          <table:table-cell table:style-name="ce562" table:formula="of:=[.$J$21]/[.$J$22]" office:value-type="float" office:value="0.126382194499575" calcext:value-type="float">
            <text:p>0.126382</text:p>
          </table:table-cell>
          <table:table-cell table:style-name="ce562" table:formula="of:=[.K153]*[.$J151]" office:value-type="float" office:value="75.4175855492615" calcext:value-type="float">
            <text:p>75.417586</text:p>
          </table:table-cell>
          <table:table-cell table:style-name="ce450" table:formula="of:=[.L153]*([.$Q$3]/1000)" office:value-type="float" office:value="95.0261577920694" calcext:value-type="float">
            <text:p>95.0261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1</text:p>
          </table:table-cell>
          <table:table-cell table:style-name="ce360" table:formula="of:=([.$J$26]/[.$N90])*[.$I$146]" office:value-type="float" office:value="1623.80153437005" calcext:value-type="float" table:number-columns-spanned="1" table:number-rows-spanned="3">
            <text:p>1623.801534</text:p>
          </table:table-cell>
          <table:table-cell table:style-name="ce360" table:formula="of:=[.$J$23]/[.$J$26]" office:value-type="float" office:value="0.584566495921078" calcext:value-type="float">
            <text:p>0.584566</text:p>
          </table:table-cell>
          <table:table-cell table:style-name="ce360" table:formula="of:=[.K154]*[.$J154]" office:value-type="float" office:value="949.219973017969" calcext:value-type="float">
            <text:p>949.219973</text:p>
          </table:table-cell>
          <table:table-cell table:style-name="ce308" table:formula="of:=[.L154]*([.$O$3]/1000)" office:value-type="float" office:value="1014.1823122404" calcext:value-type="float">
            <text:p>1014.1823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2</text:p>
          </table:table-cell>
          <table:covered-table-cell table:style-name="ce360"/>
          <table:table-cell table:style-name="ce360" table:formula="of:=[.$J$24]/[.$J$26]" office:value-type="float" office:value="0.584566495921078" calcext:value-type="float">
            <text:p>0.584566</text:p>
          </table:table-cell>
          <table:table-cell table:style-name="ce360" table:formula="of:=[.K155]*[.$J154]" office:value-type="float" office:value="949.219973017969" calcext:value-type="float">
            <text:p>949.219973</text:p>
          </table:table-cell>
          <table:table-cell table:style-name="ce308" table:formula="of:=[.L155]*([.$P$3]/1000)" office:value-type="float" office:value="847.723712035348" calcext:value-type="float">
            <text:p>847.7237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3</text:p>
          </table:table-cell>
          <table:covered-table-cell table:style-name="ce360"/>
          <table:table-cell table:style-name="ce360" table:formula="of:=[.$J$25]/[.$J$26]" office:value-type="float" office:value="-0.169132991842155" calcext:value-type="float">
            <text:p>-0.169133</text:p>
          </table:table-cell>
          <table:table-cell table:style-name="ce360" table:formula="of:=[.K156]*[.$J154]" office:value-type="float" office:value="-274.638411665889" calcext:value-type="float">
            <text:p>-274.638412</text:p>
          </table:table-cell>
          <table:table-cell table:style-name="ce308" table:formula="of:=[.L156]*([.$Q$3]/1000)" office:value-type="float" office:value="-346.04439869902" calcext:value-type="float">
            <text:p>-346.04439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1</text:p>
          </table:table-cell>
          <table:table-cell table:style-name="ce564" table:formula="of:=([.$J$26]/[.$N91])*[.$I$146]" office:value-type="float" office:value="649.52061374802" calcext:value-type="float" table:number-columns-spanned="1" table:number-rows-spanned="3">
            <text:p>649.520614</text:p>
          </table:table-cell>
          <table:table-cell table:style-name="ce564" table:formula="of:=[.$J$23]/[.$J$26]" office:value-type="float" office:value="0.584566495921078" calcext:value-type="float">
            <text:p>0.584566</text:p>
          </table:table-cell>
          <table:table-cell table:style-name="ce564" table:formula="of:=[.K157]*[.$J157]" office:value-type="float" office:value="379.687989207188" calcext:value-type="float">
            <text:p>379.687989</text:p>
          </table:table-cell>
          <table:table-cell table:style-name="ce452" table:formula="of:=[.L157]*([.$O$3]/1000)" office:value-type="float" office:value="405.672924896161" calcext:value-type="float">
            <text:p>405.67292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2</text:p>
          </table:table-cell>
          <table:covered-table-cell table:style-name="ce427"/>
          <table:table-cell table:style-name="ce564" table:formula="of:=[.$J$24]/[.$J$26]" office:value-type="float" office:value="0.584566495921078" calcext:value-type="float">
            <text:p>0.584566</text:p>
          </table:table-cell>
          <table:table-cell table:style-name="ce564" table:formula="of:=[.K158]*[.$J157]" office:value-type="float" office:value="379.687989207188" calcext:value-type="float">
            <text:p>379.687989</text:p>
          </table:table-cell>
          <table:table-cell table:style-name="ce452" table:formula="of:=[.L158]*([.$P$3]/1000)" office:value-type="float" office:value="339.089484814139" calcext:value-type="float">
            <text:p>339.08948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3</text:p>
          </table:table-cell>
          <table:covered-table-cell table:style-name="ce427"/>
          <table:table-cell table:style-name="ce564" table:formula="of:=[.$J$25]/[.$J$26]" office:value-type="float" office:value="-0.169132991842155" calcext:value-type="float">
            <text:p>-0.169133</text:p>
          </table:table-cell>
          <table:table-cell table:style-name="ce564" table:formula="of:=[.K159]*[.$J157]" office:value-type="float" office:value="-109.855364666356" calcext:value-type="float">
            <text:p>-109.855365</text:p>
          </table:table-cell>
          <table:table-cell table:style-name="ce452" table:formula="of:=[.L159]*([.$Q$3]/1000)" office:value-type="float" office:value="-138.417759479608" calcext:value-type="float">
            <text:p>-138.41775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1</text:p>
          </table:table-cell>
          <table:table-cell table:style-name="ce293" table:formula="of:=([.$J$30]/[.$N92])*[.$I$146]" office:value-type="float" office:value="1443.64752756582" calcext:value-type="float" table:number-columns-spanned="1" table:number-rows-spanned="3">
            <text:p>1443.647528</text:p>
          </table:table-cell>
          <table:table-cell table:style-name="ce293" table:formula="of:=[.$J$27]/[.$J$30]" office:value-type="float" office:value="0.283803384367446" calcext:value-type="float">
            <text:p>0.283803</text:p>
          </table:table-cell>
          <table:table-cell table:style-name="ce293" table:formula="of:=[.K160]*[.$J160]" office:value-type="float" office:value="409.712054156876" calcext:value-type="float">
            <text:p>409.712054</text:p>
          </table:table-cell>
          <table:table-cell table:style-name="ce309" table:formula="of:=[.L160]*([.$O$3]/1000)" office:value-type="float" office:value="437.751764869069" calcext:value-type="float">
            <text:p>437.75176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2</text:p>
          </table:table-cell>
          <table:covered-table-cell table:style-name="ce293"/>
          <table:table-cell table:style-name="ce293" table:formula="of:=[.$J$28]/[.$J$30]" office:value-type="float" office:value="0.432393231265109" calcext:value-type="float">
            <text:p>0.432393</text:p>
          </table:table-cell>
          <table:table-cell table:style-name="ce293" table:formula="of:=[.K161]*[.$J160]" office:value-type="float" office:value="624.223419252072" calcext:value-type="float">
            <text:p>624.223419</text:p>
          </table:table-cell>
          <table:table-cell table:style-name="ce309" table:formula="of:=[.L161]*([.$P$3]/1000)" office:value-type="float" office:value="557.47772818698" calcext:value-type="float">
            <text:p>557.47772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3</text:p>
          </table:table-cell>
          <table:covered-table-cell table:style-name="ce293"/>
          <table:table-cell table:style-name="ce293" table:formula="of:=[.$J$29]/[.$J$30]" office:value-type="float" office:value="0.283803384367446" calcext:value-type="float">
            <text:p>0.283803</text:p>
          </table:table-cell>
          <table:table-cell table:style-name="ce293" table:formula="of:=[.K162]*[.$J160]" office:value-type="float" office:value="409.712054156876" calcext:value-type="float">
            <text:p>409.712054</text:p>
          </table:table-cell>
          <table:table-cell table:style-name="ce309" table:formula="of:=[.L162]*([.$Q$3]/1000)" office:value-type="float" office:value="516.237188237664" calcext:value-type="float">
            <text:p>516.23718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1</text:p>
          </table:table-cell>
          <table:table-cell table:style-name="ce566" table:formula="of:=([.$J$30]/[.$N93])*[.$I$146]" office:value-type="float" office:value="577.459011026329" calcext:value-type="float" table:number-columns-spanned="1" table:number-rows-spanned="3">
            <text:p>577.459011</text:p>
          </table:table-cell>
          <table:table-cell table:style-name="ce566" table:formula="of:=[.$J$27]/[.$J$30]" office:value-type="float" office:value="0.283803384367446" calcext:value-type="float">
            <text:p>0.283803</text:p>
          </table:table-cell>
          <table:table-cell table:style-name="ce566" table:formula="of:=[.K163]*[.$J163]" office:value-type="float" office:value="163.88482166275" calcext:value-type="float">
            <text:p>163.884822</text:p>
          </table:table-cell>
          <table:table-cell table:style-name="ce453" table:formula="of:=[.L163]*([.$O$3]/1000)" office:value-type="float" office:value="175.100705947628" calcext:value-type="float">
            <text:p>175.10070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2</text:p>
          </table:table-cell>
          <table:covered-table-cell table:style-name="ce428"/>
          <table:table-cell table:style-name="ce566" table:formula="of:=[.$J$28]/[.$J$30]" office:value-type="float" office:value="0.432393231265109" calcext:value-type="float">
            <text:p>0.432393</text:p>
          </table:table-cell>
          <table:table-cell table:style-name="ce566" table:formula="of:=[.K164]*[.$J163]" office:value-type="float" office:value="249.689367700829" calcext:value-type="float">
            <text:p>249.689368</text:p>
          </table:table-cell>
          <table:table-cell table:style-name="ce453" table:formula="of:=[.L164]*([.$P$3]/1000)" office:value-type="float" office:value="222.991091274792" calcext:value-type="float">
            <text:p>222.99109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3</text:p>
          </table:table-cell>
          <table:covered-table-cell table:style-name="ce428"/>
          <table:table-cell table:style-name="ce566" table:formula="of:=[.$J$29]/[.$J$30]" office:value-type="float" office:value="0.283803384367446" calcext:value-type="float">
            <text:p>0.283803</text:p>
          </table:table-cell>
          <table:table-cell table:style-name="ce566" table:formula="of:=[.K165]*[.$J163]" office:value-type="float" office:value="163.88482166275" calcext:value-type="float">
            <text:p>163.884822</text:p>
          </table:table-cell>
          <table:table-cell table:style-name="ce453" table:formula="of:=[.L165]*([.$Q$3]/1000)" office:value-type="float" office:value="206.494875295065" calcext:value-type="float">
            <text:p>206.49487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1</text:p>
          </table:table-cell>
          <table:table-cell table:style-name="ce401" table:formula="of:=([.$J$34]/[.$N94])*[.$I$146]" office:value-type="float" office:value="722.595360852679" calcext:value-type="float" table:number-columns-spanned="1" table:number-rows-spanned="3">
            <text:p>722.595361</text:p>
          </table:table-cell>
          <table:table-cell table:style-name="ce401" table:formula="of:=[.$J$31]/[.$J$34]" office:value-type="float" office:value="2.09892729439809" calcext:value-type="float">
            <text:p>2.098927</text:p>
          </table:table-cell>
          <table:table-cell table:style-name="ce401" table:formula="of:=[.K166]*[.$J166]" office:value-type="float" office:value="1516.67512569913" calcext:value-type="float">
            <text:p>1516.675126</text:p>
          </table:table-cell>
          <table:table-cell table:style-name="ce306" table:formula="of:=[.L166]*([.$O$3]/1000)" office:value-type="float" office:value="1620.47273511166" calcext:value-type="float">
            <text:p>1620.4727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2</text:p>
          </table:table-cell>
          <table:covered-table-cell table:style-name="ce401"/>
          <table:table-cell table:style-name="ce401" table:formula="of:=[.$J$32]/[.$J$34]" office:value-type="float" office:value="-3.19785458879618" calcext:value-type="float">
            <text:p>-3.197855</text:p>
          </table:table-cell>
          <table:table-cell table:style-name="ce401" table:formula="of:=[.K167]*[.$J166]" office:value-type="float" office:value="-2310.75489054557" calcext:value-type="float">
            <text:p>-2310.754891</text:p>
          </table:table-cell>
          <table:table-cell table:style-name="ce306" table:formula="of:=[.L167]*([.$P$3]/1000)" office:value-type="float" office:value="-2063.6751955282" calcext:value-type="float">
            <text:p>-2063.67519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3</text:p>
          </table:table-cell>
          <table:covered-table-cell table:style-name="ce401"/>
          <table:table-cell table:style-name="ce401" table:formula="of:=[.$J$33]/[.$J$34]" office:value-type="float" office:value="2.09892729439809" calcext:value-type="float">
            <text:p>2.098927</text:p>
          </table:table-cell>
          <table:table-cell table:style-name="ce401" table:formula="of:=[.K168]*[.$J166]" office:value-type="float" office:value="1516.67512569913" calcext:value-type="float">
            <text:p>1516.675126</text:p>
          </table:table-cell>
          <table:table-cell table:style-name="ce306" table:formula="of:=[.L168]*([.$Q$3]/1000)" office:value-type="float" office:value="1911.0106583809" calcext:value-type="float">
            <text:p>1911.0106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1</text:p>
          </table:table-cell>
          <table:table-cell table:style-name="ce568" table:formula="of:=([.$J$34]/[.$N95])*[.$I$146]" office:value-type="float" office:value="289.038144341071" calcext:value-type="float" table:number-columns-spanned="1" table:number-rows-spanned="3">
            <text:p>289.038144</text:p>
          </table:table-cell>
          <table:table-cell table:style-name="ce568" table:formula="of:=[.$J$31]/[.$J$34]" office:value-type="float" office:value="2.09892729439809" calcext:value-type="float">
            <text:p>2.098927</text:p>
          </table:table-cell>
          <table:table-cell table:style-name="ce568" table:formula="of:=[.K169]*[.$J169]" office:value-type="float" office:value="606.67005027965" calcext:value-type="float">
            <text:p>606.670050</text:p>
          </table:table-cell>
          <table:table-cell table:style-name="ce454" table:formula="of:=[.L169]*([.$O$3]/1000)" office:value-type="float" office:value="648.189094044664" calcext:value-type="float">
            <text:p>648.18909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2</text:p>
          </table:table-cell>
          <table:covered-table-cell table:style-name="ce430"/>
          <table:table-cell table:style-name="ce568" table:formula="of:=[.$J$32]/[.$J$34]" office:value-type="float" office:value="-3.19785458879618" calcext:value-type="float">
            <text:p>-3.197855</text:p>
          </table:table-cell>
          <table:table-cell table:style-name="ce568" table:formula="of:=[.K170]*[.$J169]" office:value-type="float" office:value="-924.301956218228" calcext:value-type="float">
            <text:p>-924.301956</text:p>
          </table:table-cell>
          <table:table-cell table:style-name="ce454" table:formula="of:=[.L170]*([.$P$3]/1000)" office:value-type="float" office:value="-825.470078211278" calcext:value-type="float">
            <text:p>-825.47007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3</text:p>
          </table:table-cell>
          <table:covered-table-cell table:style-name="ce430"/>
          <table:table-cell table:style-name="ce568" table:formula="of:=[.$J$33]/[.$J$34]" office:value-type="float" office:value="2.09892729439809" calcext:value-type="float">
            <text:p>2.098927</text:p>
          </table:table-cell>
          <table:table-cell table:style-name="ce568" table:formula="of:=[.K171]*[.$J169]" office:value-type="float" office:value="606.67005027965" calcext:value-type="float">
            <text:p>606.670050</text:p>
          </table:table-cell>
          <table:table-cell table:style-name="ce454" table:formula="of:=[.L171]*([.$Q$3]/1000)" office:value-type="float" office:value="764.404263352359" calcext:value-type="float">
            <text:p>764.40426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1</text:p>
          </table:table-cell>
          <table:table-cell table:style-name="ce408" table:formula="of:=([.$J$38]/[.$N96])*[.$I$146]" office:value-type="float" office:value="1421.97408866071" calcext:value-type="float" table:number-columns-spanned="1" table:number-rows-spanned="3">
            <text:p>1421.974089</text:p>
          </table:table-cell>
          <table:table-cell table:style-name="ce408" table:formula="of:=[.$J$35]/[.$J$38]" office:value-type="float" office:value="0.524624649025397" calcext:value-type="float">
            <text:p>0.524625</text:p>
          </table:table-cell>
          <table:table-cell table:style-name="ce408" table:formula="of:=[.K172]*[.$J172]" office:value-type="float" office:value="746.002657186833" calcext:value-type="float">
            <text:p>746.002657</text:p>
          </table:table-cell>
          <table:table-cell table:style-name="ce307" table:formula="of:=[.L172]*([.$O$3]/1000)" office:value-type="float" office:value="797.057290522168" calcext:value-type="float">
            <text:p>797.05729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2</text:p>
          </table:table-cell>
          <table:covered-table-cell table:style-name="ce408"/>
          <table:table-cell table:style-name="ce408" table:formula="of:=[.$J$36]/[.$J$38]" office:value-type="float" office:value="0.237687675487302" calcext:value-type="float">
            <text:p>0.237688</text:p>
          </table:table-cell>
          <table:table-cell table:style-name="ce408" table:formula="of:=[.K173]*[.$J172]" office:value-type="float" office:value="337.985715736938" calcext:value-type="float">
            <text:p>337.985716</text:p>
          </table:table-cell>
          <table:table-cell table:style-name="ce307" table:formula="of:=[.L173]*([.$P$3]/1000)" office:value-type="float" office:value="301.84626714973" calcext:value-type="float">
            <text:p>301.84626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3</text:p>
          </table:table-cell>
          <table:covered-table-cell table:style-name="ce408"/>
          <table:table-cell table:style-name="ce408" table:formula="of:=[.$J$37]/[.$J$38]" office:value-type="float" office:value="0.237687675487302" calcext:value-type="float">
            <text:p>0.237688</text:p>
          </table:table-cell>
          <table:table-cell table:style-name="ce408" table:formula="of:=[.K174]*[.$J172]" office:value-type="float" office:value="337.985715736938" calcext:value-type="float">
            <text:p>337.985716</text:p>
          </table:table-cell>
          <table:table-cell table:style-name="ce307" table:formula="of:=[.L174]*([.$Q$3]/1000)" office:value-type="float" office:value="425.862001828543" calcext:value-type="float">
            <text:p>425.86200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1</text:p>
          </table:table-cell>
          <table:table-cell table:style-name="ce570" table:formula="of:=([.$J$38]/[.$N97])*[.$I$146]" office:value-type="float" office:value="568.789635464284" calcext:value-type="float" table:number-columns-spanned="1" table:number-rows-spanned="3">
            <text:p>568.789635</text:p>
          </table:table-cell>
          <table:table-cell table:style-name="ce570" table:formula="of:=[.$J$35]/[.$J$38]" office:value-type="float" office:value="0.524624649025397" calcext:value-type="float">
            <text:p>0.524625</text:p>
          </table:table-cell>
          <table:table-cell table:style-name="ce570" table:formula="of:=[.K175]*[.$J175]" office:value-type="float" office:value="298.401062874733" calcext:value-type="float">
            <text:p>298.401063</text:p>
          </table:table-cell>
          <table:table-cell table:style-name="ce455" table:formula="of:=[.L175]*([.$O$3]/1000)" office:value-type="float" office:value="318.822916208867" calcext:value-type="float">
            <text:p>318.82291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2</text:p>
          </table:table-cell>
          <table:covered-table-cell table:style-name="ce431"/>
          <table:table-cell table:style-name="ce570" table:formula="of:=[.$J$36]/[.$J$38]" office:value-type="float" office:value="0.237687675487302" calcext:value-type="float">
            <text:p>0.237688</text:p>
          </table:table-cell>
          <table:table-cell table:style-name="ce570" table:formula="of:=[.K176]*[.$J175]" office:value-type="float" office:value="135.194286294775" calcext:value-type="float">
            <text:p>135.194286</text:p>
          </table:table-cell>
          <table:table-cell table:style-name="ce455" table:formula="of:=[.L176]*([.$P$3]/1000)" office:value-type="float" office:value="120.738506859892" calcext:value-type="float">
            <text:p>120.73850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3</text:p>
          </table:table-cell>
          <table:covered-table-cell table:style-name="ce431"/>
          <table:table-cell table:style-name="ce570" table:formula="of:=[.$J$37]/[.$J$38]" office:value-type="float" office:value="0.237687675487302" calcext:value-type="float">
            <text:p>0.237688</text:p>
          </table:table-cell>
          <table:table-cell table:style-name="ce570" table:formula="of:=[.K177]*[.$J175]" office:value-type="float" office:value="135.194286294775" calcext:value-type="float">
            <text:p>135.194286</text:p>
          </table:table-cell>
          <table:table-cell table:style-name="ce455" table:formula="of:=[.L177]*([.$Q$3]/1000)" office:value-type="float" office:value="170.344800731417" calcext:value-type="float">
            <text:p>170.34480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1</text:p>
          </table:table-cell>
          <table:table-cell table:style-name="ce547" table:formula="of:=([.$J$42]/[.$N98])*[.$I$146]" office:value-type="float" office:value="1712.42604096899" calcext:value-type="float" table:number-columns-spanned="1" table:number-rows-spanned="3">
            <text:p>1712.426041</text:p>
          </table:table-cell>
          <table:table-cell table:style-name="ce547" table:formula="of:=[.$J$39]/[.$J$42]" office:value-type="float" office:value="10.652428964253" calcext:value-type="float">
            <text:p>10.652429</text:p>
          </table:table-cell>
          <table:table-cell table:style-name="ce547" table:formula="of:=[.K178]*[.$J178]" office:value-type="float" office:value="18241.4967579591" calcext:value-type="float">
            <text:p>18241.496758</text:p>
          </table:table-cell>
          <table:table-cell table:style-name="ce541" table:formula="of:=[.L178]*([.$O$3]/1000)" office:value-type="float" office:value="19489.901062546" calcext:value-type="float">
            <text:p>19489.90106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2</text:p>
          </table:table-cell>
          <table:covered-table-cell table:style-name="ce547"/>
          <table:table-cell table:style-name="ce547" table:formula="of:=[.$J$40]/[.$J$42]" office:value-type="float" office:value="-4.82621448212649" calcext:value-type="float">
            <text:p>-4.826214</text:p>
          </table:table-cell>
          <table:table-cell table:style-name="ce547" table:formula="of:=[.K179]*[.$J178]" office:value-type="float" office:value="-8264.53535849505" calcext:value-type="float">
            <text:p>-8264.535358</text:p>
          </table:table-cell>
          <table:table-cell table:style-name="ce541" table:formula="of:=[.L179]*([.$P$3]/1000)" office:value-type="float" office:value="-7380.84194549305" calcext:value-type="float">
            <text:p>-7380.84194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3</text:p>
          </table:table-cell>
          <table:covered-table-cell table:style-name="ce547"/>
          <table:table-cell table:style-name="ce547" table:formula="of:=[.$J$41]/[.$J$42]" office:value-type="float" office:value="-4.82621448212649" calcext:value-type="float">
            <text:p>-4.826214</text:p>
          </table:table-cell>
          <table:table-cell table:style-name="ce547" table:formula="of:=[.K180]*[.$J178]" office:value-type="float" office:value="-8264.53535849505" calcext:value-type="float">
            <text:p>-8264.535358</text:p>
          </table:table-cell>
          <table:table-cell table:style-name="ce541" table:formula="of:=[.L180]*([.$Q$3]/1000)" office:value-type="float" office:value="-10413.3145517038" calcext:value-type="float">
            <text:p>-10413.31455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1</text:p>
          </table:table-cell>
          <table:table-cell table:style-name="ce561" table:formula="of:=([.$J$42]/[.$N99])*[.$I$146]" office:value-type="float" office:value="684.970416387594" calcext:value-type="float" table:number-columns-spanned="1" table:number-rows-spanned="3">
            <text:p>684.970416</text:p>
          </table:table-cell>
          <table:table-cell table:style-name="ce432" table:formula="of:=[.$J$39]/[.$J$42]" office:value-type="float" office:value="10.652428964253" calcext:value-type="float">
            <text:p>10.652429</text:p>
          </table:table-cell>
          <table:table-cell table:style-name="ce432" table:formula="of:=[.K181]*[.$J181]" office:value-type="float" office:value="7296.59870318363" calcext:value-type="float">
            <text:p>7296.598703</text:p>
          </table:table-cell>
          <table:table-cell table:style-name="ce456" table:formula="of:=[.L181]*([.$O$3]/1000)" office:value-type="float" office:value="7795.96042501839" calcext:value-type="float">
            <text:p>7795.96042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2</text:p>
          </table:table-cell>
          <table:covered-table-cell table:style-name="ce432"/>
          <table:table-cell table:style-name="ce432" table:formula="of:=[.$J$40]/[.$J$42]" office:value-type="float" office:value="-4.82621448212649" calcext:value-type="float">
            <text:p>-4.826214</text:p>
          </table:table-cell>
          <table:table-cell table:style-name="ce432" table:formula="of:=[.K182]*[.$J181]" office:value-type="float" office:value="-3305.81414339802" calcext:value-type="float">
            <text:p>-3305.814143</text:p>
          </table:table-cell>
          <table:table-cell table:style-name="ce456" table:formula="of:=[.L182]*([.$P$3]/1000)" office:value-type="float" office:value="-2952.33677819722" calcext:value-type="float">
            <text:p>-2952.33677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8" office:value-type="string" calcext:value-type="string">
            <text:p>Sub 3</text:p>
          </table:table-cell>
          <table:covered-table-cell table:style-name="ce424"/>
          <table:table-cell table:style-name="ce561" table:formula="of:=[.$J$41]/[.$J$42]" office:value-type="float" office:value="-4.82621448212649" calcext:value-type="float">
            <text:p>-4.826214</text:p>
          </table:table-cell>
          <table:table-cell table:style-name="ce561" table:formula="of:=[.K183]*[.$J181]" office:value-type="float" office:value="-3305.81414339802" calcext:value-type="float">
            <text:p>-3305.814143</text:p>
          </table:table-cell>
          <table:table-cell table:style-name="ce457" table:formula="of:=[.L183]*([.$Q$3]/1000)" office:value-type="float" office:value="-4165.3258206815" calcext:value-type="float">
            <text:p>-4165.325821</text:p>
          </table:table-cell>
          <table:table-cell table:number-columns-repeated="5"/>
        </table:table-row>
        <table:table-row table:style-name="ro1" table:number-rows-repeated="10483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alibracao Bombas" table:style-name="ta1">
        <table:table-column table:style-name="co13" table:default-cell-style-name="ce375"/>
        <table:table-column table:style-name="co1" table:number-columns-repeated="2" table:default-cell-style-name="ce443"/>
        <table:table-column table:style-name="co20" table:default-cell-style-name="ce443"/>
        <table:table-column table:style-name="co21" table:default-cell-style-name="ce375"/>
        <table:table-column table:style-name="co22" table:default-cell-style-name="ce280"/>
        <table:table-column table:style-name="co1" table:default-cell-style-name="ce375"/>
        <table:table-column table:style-name="co21" table:default-cell-style-name="ce280"/>
        <table:table-column table:style-name="co23" table:default-cell-style-name="ce375"/>
        <table:table-column table:style-name="co24" table:default-cell-style-name="ce375"/>
        <table:table-column table:style-name="co21" table:default-cell-style-name="ce443"/>
        <table:table-column table:style-name="co23" table:default-cell-style-name="ce443"/>
        <table:table-column table:style-name="co20" table:default-cell-style-name="ce44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mba grande A</text:p>
          </table:table-cell>
          <table:table-cell table:style-name="ce66" office:value-type="string" calcext:value-type="string">
            <text:p>mL/min</text:p>
          </table:table-cell>
          <table:table-cell table:style-name="ce66" office:value-type="string" calcext:value-type="string">
            <text:p>rpm</text:p>
          </table:table-cell>
          <table:table-cell table:style-name="ce66" office:value-type="string" calcext:value-type="string">
            <text:p>volume (mL)</text:p>
          </table:table-cell>
          <table:table-cell>
            <draw:frame draw:z-index="1" draw:name="Gráfico 2" draw:style-name="gr3" draw:text-style-name="P4" svg:width="5.6362in" svg:height="3.526in" svg:x="0.0236in" svg:y="0in">
              <draw:object draw:notify-on-update-of-ranges="'Calibracao Bombas'.C2:'Calibracao Bombas'.C12 'Calibracao Bombas'.D1:'Calibracao Bombas'.D1 'Calibracao Bombas'.D2:'Calibracao Bombas'.D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office:value-type="string" calcext:value-type="string">
            <text:p>bomba pequena</text:p>
          </table:table-cell>
          <table:table-cell table:style-name="ce280"/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0" draw:name="Gráfico 1" draw:style-name="gr3" draw:text-style-name="P4" svg:width="5.6563in" svg:height="3.5878in" svg:x="0.0185in" svg:y="0in">
              <draw:object draw:notify-on-update-of-ranges="'Calibracao Bombas'.L2:'Calibracao Bombas'.L12 'Calibracao Bombas'.M1:'Calibracao Bombas'.M1 'Calibracao Bombas'.M2:'Calibracao Bombas'.M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Diogenes</text:p>
          </table:table-cell>
          <table:table-cell table:style-name="ce67" office:value-type="float" office:value="0.3133" calcext:value-type="float">
            <text:p>0.3133</text:p>
          </table:table-cell>
          <table:table-cell table:style-name="ce67" office:value-type="float" office:value="0.1" calcext:value-type="float">
            <text:p>0.1000</text:p>
          </table:table-cell>
          <table:table-cell table:style-name="ce67" office:value-type="float" office:value="0.3" calcext:value-type="float">
            <text:p>0.30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" calcext:value-type="float">
            <text:p>1</text:p>
          </table:table-cell>
          <table:table-cell table:style-name="ce451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4" calcext:value-type="float">
            <text:p>0.4000</text:p>
          </table:table-cell>
          <table:table-cell table:style-name="ce448" office:value-type="float" office:value="0.128" calcext:value-type="float">
            <text:p>0.1280</text:p>
          </table:table-cell>
          <table:table-cell table:style-name="ce448" office:value-type="float" office:value="0.4" calcext:value-type="float">
            <text:p>0.40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5" calcext:value-type="float">
            <text:p>5</text:p>
          </table:table-cell>
          <table:table-cell table:style-name="ce45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5" calcext:value-type="float">
            <text:p>0.5000</text:p>
          </table:table-cell>
          <table:table-cell table:style-name="ce448" office:value-type="float" office:value="0.16" calcext:value-type="float">
            <text:p>0.1600</text:p>
          </table:table-cell>
          <table:table-cell table:style-name="ce448" office:value-type="float" office:value="0.45" calcext:value-type="float">
            <text:p>0.45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0" calcext:value-type="float">
            <text:p>10</text:p>
          </table:table-cell>
          <table:table-cell table:style-name="ce451"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6" calcext:value-type="float">
            <text:p>0.6000</text:p>
          </table:table-cell>
          <table:table-cell table:style-name="ce448" office:value-type="float" office:value="0.191" calcext:value-type="float">
            <text:p>0.1910</text:p>
          </table:table-cell>
          <table:table-cell table:style-name="ce448" office:value-type="float" office:value="0.59" calcext:value-type="float">
            <text:p>0.59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5" calcext:value-type="float">
            <text:p>15</text:p>
          </table:table-cell>
          <table:table-cell table:style-name="ce451" office:value-type="float" office:value="13.3" calcext:value-type="float">
            <text:p>13.3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75" calcext:value-type="float">
            <text:p>0.7500</text:p>
          </table:table-cell>
          <table:table-cell table:style-name="ce448" office:value-type="float" office:value="0.239" calcext:value-type="float">
            <text:p>0.2390</text:p>
          </table:table-cell>
          <table:table-cell table:style-name="ce448" office:value-type="float" office:value="0.67" calcext:value-type="float">
            <text:p>0.67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20" calcext:value-type="float">
            <text:p>20</text:p>
          </table:table-cell>
          <table:table-cell table:style-name="ce451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8" calcext:value-type="float">
            <text:p>0.8000</text:p>
          </table:table-cell>
          <table:table-cell table:style-name="ce448" office:value-type="float" office:value="0.255" calcext:value-type="float">
            <text:p>0.2550</text:p>
          </table:table-cell>
          <table:table-cell table:style-name="ce448" office:value-type="float" office:value="0.92" calcext:value-type="float">
            <text:p>0.92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30" calcext:value-type="float">
            <text:p>30</text:p>
          </table:table-cell>
          <table:table-cell table:style-name="ce45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9" calcext:value-type="float">
            <text:p>0.9000</text:p>
          </table:table-cell>
          <table:table-cell table:style-name="ce448" office:value-type="float" office:value="0.287" calcext:value-type="float">
            <text:p>0.2870</text:p>
          </table:table-cell>
          <table:table-cell table:style-name="ce448" office:value-type="float" office:value="1.14" calcext:value-type="float">
            <text:p>1.14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50" calcext:value-type="float">
            <text:p>50</text:p>
          </table:table-cell>
          <table:table-cell table:style-name="ce45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" calcext:value-type="float">
            <text:p>1.0000</text:p>
          </table:table-cell>
          <table:table-cell table:style-name="ce448" office:value-type="float" office:value="0.319" calcext:value-type="float">
            <text:p>0.3190</text:p>
          </table:table-cell>
          <table:table-cell table:style-name="ce448" office:value-type="float" office:value="1.16" calcext:value-type="float">
            <text:p>1.16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80" calcext:value-type="float">
            <text:p>80</text:p>
          </table:table-cell>
          <table:table-cell table:style-name="ce45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.25" calcext:value-type="float">
            <text:p>1.2500</text:p>
          </table:table-cell>
          <table:table-cell table:style-name="ce448" office:value-type="float" office:value="0.399" calcext:value-type="float">
            <text:p>0.3990</text:p>
          </table:table-cell>
          <table:table-cell table:style-name="ce448" office:value-type="float" office:value="1.35" calcext:value-type="float">
            <text:p>1.35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00" calcext:value-type="float">
            <text:p>100</text:p>
          </table:table-cell>
          <table:table-cell table:style-name="ce45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.5" calcext:value-type="float">
            <text:p>1.5000</text:p>
          </table:table-cell>
          <table:table-cell table:style-name="ce448" office:value-type="float" office:value="0.479" calcext:value-type="float">
            <text:p>0.4790</text:p>
          </table:table-cell>
          <table:table-cell table:style-name="ce448" office:value-type="float" office:value="1.43" calcext:value-type="float">
            <text:p>1.43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20" calcext:value-type="float">
            <text:p>120</text:p>
          </table:table-cell>
          <table:table-cell table:style-name="ce451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table:style-name="ce449" office:value-type="float" office:value="1.75" calcext:value-type="float">
            <text:p>1.7500</text:p>
          </table:table-cell>
          <table:table-cell table:style-name="ce449" office:value-type="float" office:value="0.559" calcext:value-type="float">
            <text:p>0.5590</text:p>
          </table:table-cell>
          <table:table-cell table:style-name="ce449" office:value-type="float" office:value="1.67" calcext:value-type="float">
            <text:p>1.6700</text:p>
          </table:table-cell>
          <table:table-cell table:number-columns-repeated="5"/>
          <table:table-cell table:style-name="ce280"/>
          <table:table-cell table:style-name="ce375"/>
          <table:table-cell table:style-name="ce445" office:value-type="float" office:value="200" calcext:value-type="float">
            <text:p>200</text:p>
          </table:table-cell>
          <table:table-cell table:style-name="ce445" office:value-type="float" office:value="168" calcext:value-type="float">
            <text:p>168</text:p>
          </table:table-cell>
          <table:table-cell table:number-columns-repeated="2"/>
        </table:table-row>
        <table:table-row table:style-name="ro1" table:number-rows-repeated="9">
          <table:table-cell/>
          <table:table-cell table:style-name="ce375" table:number-columns-repeated="3"/>
          <table:table-cell table:number-columns-repeated="6"/>
          <table:table-cell table:style-name="ce375" table:number-columns-repeated="3"/>
          <table:table-cell table:number-columns-repeated="2"/>
        </table:table-row>
        <table:table-row table:style-name="ro1" table:number-rows-repeated="2">
          <table:table-cell table:style-name="ce280" table:number-columns-repeated="4"/>
          <table:table-cell table:number-columns-repeated="5"/>
          <table:table-cell table:style-name="ce280" table:number-columns-repeated="4"/>
          <table:table-cell table:number-columns-repeated="2"/>
        </table:table-row>
        <table:table-row table:style-name="ro1">
          <table:table-cell table:style-name="ce280" table:number-columns-repeated="4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omba grande B</text:p>
          </table:table-cell>
          <table:table-cell table:style-name="ce140" office:value-type="string" calcext:value-type="string">
            <text:p>mL/min</text:p>
          </table:table-cell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2" draw:name="Gráfico 3" draw:style-name="gr3" draw:text-style-name="P4" svg:width="5.6339in" svg:height="3.526in" svg:x="0.0283in" svg:y="0.0276in">
              <draw:object draw:notify-on-update-of-ranges="'Calibracao Bombas'.C26:'Calibracao Bombas'.C36 'Calibracao Bombas'.D25:'Calibracao Bombas'.D25 'Calibracao Bombas'.D26:'Calibracao Bombas'.D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office:value-type="string" calcext:value-type="string">
            <text:p>bomba grande C</text:p>
          </table:table-cell>
          <table:table-cell table:style-name="ce140" office:value-type="string" calcext:value-type="string">
            <text:p>mL/min</text:p>
          </table:table-cell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3" draw:name="Gráfico 4" draw:style-name="gr3" draw:text-style-name="P4" svg:width="5.5996in" svg:height="3.5268in" svg:x="0.0394in" svg:y="0.026in">
              <draw:object draw:notify-on-update-of-ranges="'Calibracao Bombas'.J26:'Calibracao Bombas'.J36 'Calibracao Bombas'.K25:'Calibracao Bombas'.K25 'Calibracao Bombas'.K26:'Calibracao Bombas'.K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Verena entrada</text:p>
          </table:table-cell>
          <table:table-cell table:style-name="ce67" office:value-type="float" office:value="2" calcext:value-type="float">
            <text:p>2.0000</text:p>
          </table:table-cell>
          <table:table-cell table:style-name="ce67" office:value-type="float" office:value="0.67" calcext:value-type="float">
            <text:p>0.6700</text:p>
          </table:table-cell>
          <table:table-cell table:style-name="ce67" office:value-type="float" office:value="1.8" calcext:value-type="float">
            <text:p>1.8000</text:p>
          </table:table-cell>
          <table:table-cell table:number-columns-repeated="5"/>
          <table:table-cell office:value-type="string" calcext:value-type="string">
            <text:p>medido em 30 s</text:p>
          </table:table-cell>
          <table:table-cell table:style-name="ce67" office:value-type="float" office:value="1" calcext:value-type="float">
            <text:p>1.0000</text:p>
          </table:table-cell>
          <table:table-cell table:style-name="ce67" office:value-type="float" office:value="0.949" calcext:value-type="float">
            <text:p>0.9490</text:p>
          </table:table-cell>
          <table:table-cell table:style-name="ce67" office:value-type="float" office:value="3" calcext:value-type="float">
            <text:p>3.0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2.5" calcext:value-type="float">
            <text:p>2.5000</text:p>
          </table:table-cell>
          <table:table-cell table:style-name="ce448" office:value-type="float" office:value="0.837" calcext:value-type="float">
            <text:p>0.8370</text:p>
          </table:table-cell>
          <table:table-cell table:style-name="ce448" office:value-type="float" office:value="2.4" calcext:value-type="float">
            <text:p>2.4000</text:p>
          </table:table-cell>
          <table:table-cell table:number-columns-repeated="5"/>
          <table:table-cell office:value-type="string" calcext:value-type="string">
            <text:p>Verena saida</text:p>
          </table:table-cell>
          <table:table-cell table:style-name="ce448" office:value-type="float" office:value="1.5" calcext:value-type="float">
            <text:p>1.5000</text:p>
          </table:table-cell>
          <table:table-cell table:style-name="ce448" office:value-type="float" office:value="1.424" calcext:value-type="float">
            <text:p>1.4240</text:p>
          </table:table-cell>
          <table:table-cell table:style-name="ce448" office:value-type="float" office:value="3.8" calcext:value-type="float">
            <text:p>3.8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2.8" calcext:value-type="float">
            <text:p>2.8000</text:p>
          </table:table-cell>
          <table:table-cell table:style-name="ce448" office:value-type="float" office:value="0.938" calcext:value-type="float">
            <text:p>0.9380</text:p>
          </table:table-cell>
          <table:table-cell table:style-name="ce448" office:value-type="float" office:value="3" calcext:value-type="float">
            <text:p>3.0000</text:p>
          </table:table-cell>
          <table:table-cell table:number-columns-repeated="6"/>
          <table:table-cell table:style-name="ce448" office:value-type="float" office:value="1.8" calcext:value-type="float">
            <text:p>1.8000</text:p>
          </table:table-cell>
          <table:table-cell table:style-name="ce448" office:value-type="float" office:value="1.709" calcext:value-type="float">
            <text:p>1.7090</text:p>
          </table:table-cell>
          <table:table-cell table:style-name="ce448" office:value-type="float" office:value="5" calcext:value-type="float">
            <text:p>5.0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3" calcext:value-type="float">
            <text:p>3.0000</text:p>
          </table:table-cell>
          <table:table-cell table:style-name="ce448" office:value-type="float" office:value="1.004" calcext:value-type="float">
            <text:p>1.0040</text:p>
          </table:table-cell>
          <table:table-cell table:style-name="ce448" office:value-type="float" office:value="3.2" calcext:value-type="float">
            <text:p>3.2000</text:p>
          </table:table-cell>
          <table:table-cell table:number-columns-repeated="6"/>
          <table:table-cell table:style-name="ce448" office:value-type="float" office:value="2" calcext:value-type="float">
            <text:p>2.0000</text:p>
          </table:table-cell>
          <table:table-cell table:style-name="ce448" office:value-type="float" office:value="1.899" calcext:value-type="float">
            <text:p>1.8990</text:p>
          </table:table-cell>
          <table:table-cell table:style-name="ce448" office:value-type="float" office:value="5.6" calcext:value-type="float">
            <text:p>5.6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3.5" calcext:value-type="float">
            <text:p>3.5000</text:p>
          </table:table-cell>
          <table:table-cell table:style-name="ce448" office:value-type="float" office:value="1.172" calcext:value-type="float">
            <text:p>1.1720</text:p>
          </table:table-cell>
          <table:table-cell table:style-name="ce448" office:value-type="float" office:value="3.6" calcext:value-type="float">
            <text:p>3.6000</text:p>
          </table:table-cell>
          <table:table-cell table:number-columns-repeated="6"/>
          <table:table-cell table:style-name="ce448" office:value-type="float" office:value="2.5" calcext:value-type="float">
            <text:p>2.5000</text:p>
          </table:table-cell>
          <table:table-cell table:style-name="ce448" office:value-type="float" office:value="2.373" calcext:value-type="float">
            <text:p>2.3730</text:p>
          </table:table-cell>
          <table:table-cell table:style-name="ce448" office:value-type="float" office:value="6.8" calcext:value-type="float">
            <text:p>6.8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4" calcext:value-type="float">
            <text:p>4.0000</text:p>
          </table:table-cell>
          <table:table-cell table:style-name="ce448" office:value-type="float" office:value="1.339" calcext:value-type="float">
            <text:p>1.3390</text:p>
          </table:table-cell>
          <table:table-cell table:style-name="ce448" office:value-type="float" office:value="4.2" calcext:value-type="float">
            <text:p>4.2000</text:p>
          </table:table-cell>
          <table:table-cell table:number-columns-repeated="6"/>
          <table:table-cell table:style-name="ce448" office:value-type="float" office:value="3" calcext:value-type="float">
            <text:p>3.0000</text:p>
          </table:table-cell>
          <table:table-cell table:style-name="ce448" office:value-type="float" office:value="2.848" calcext:value-type="float">
            <text:p>2.8480</text:p>
          </table:table-cell>
          <table:table-cell table:style-name="ce448" office:value-type="float" office:value="8.5" calcext:value-type="float">
            <text:p>8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4.5" calcext:value-type="float">
            <text:p>4.5000</text:p>
          </table:table-cell>
          <table:table-cell table:style-name="ce448" office:value-type="float" office:value="1.507" calcext:value-type="float">
            <text:p>1.5070</text:p>
          </table:table-cell>
          <table:table-cell table:style-name="ce448" office:value-type="float" office:value="4.8" calcext:value-type="float">
            <text:p>4.8000</text:p>
          </table:table-cell>
          <table:table-cell table:number-columns-repeated="6"/>
          <table:table-cell table:style-name="ce448" office:value-type="float" office:value="3.5" calcext:value-type="float">
            <text:p>3.5000</text:p>
          </table:table-cell>
          <table:table-cell table:style-name="ce448" office:value-type="float" office:value="3.323" calcext:value-type="float">
            <text:p>3.3230</text:p>
          </table:table-cell>
          <table:table-cell table:style-name="ce448" office:value-type="float" office:value="10.5" calcext:value-type="float">
            <text:p>10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5" calcext:value-type="float">
            <text:p>5.0000</text:p>
          </table:table-cell>
          <table:table-cell table:style-name="ce448" office:value-type="float" office:value="1.674" calcext:value-type="float">
            <text:p>1.6740</text:p>
          </table:table-cell>
          <table:table-cell table:style-name="ce448" office:value-type="float" office:value="5.4" calcext:value-type="float">
            <text:p>5.4000</text:p>
          </table:table-cell>
          <table:table-cell table:number-columns-repeated="6"/>
          <table:table-cell table:style-name="ce448" office:value-type="float" office:value="4" calcext:value-type="float">
            <text:p>4.0000</text:p>
          </table:table-cell>
          <table:table-cell table:style-name="ce448" office:value-type="float" office:value="3.797" calcext:value-type="float">
            <text:p>3.7970</text:p>
          </table:table-cell>
          <table:table-cell table:style-name="ce448" office:value-type="float" office:value="11.5" calcext:value-type="float">
            <text:p>11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5.5" calcext:value-type="float">
            <text:p>5.5000</text:p>
          </table:table-cell>
          <table:table-cell table:style-name="ce448" office:value-type="float" office:value="1.842" calcext:value-type="float">
            <text:p>1.8420</text:p>
          </table:table-cell>
          <table:table-cell table:style-name="ce448" office:value-type="float" office:value="6" calcext:value-type="float">
            <text:p>6.0000</text:p>
          </table:table-cell>
          <table:table-cell table:number-columns-repeated="6"/>
          <table:table-cell table:style-name="ce448" office:value-type="float" office:value="4.5" calcext:value-type="float">
            <text:p>4.5000</text:p>
          </table:table-cell>
          <table:table-cell table:style-name="ce448" office:value-type="float" office:value="4.272" calcext:value-type="float">
            <text:p>4.2720</text:p>
          </table:table-cell>
          <table:table-cell table:style-name="ce448" office:value-type="float" office:value="13.4" calcext:value-type="float">
            <text:p>13.4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6" calcext:value-type="float">
            <text:p>6.0000</text:p>
          </table:table-cell>
          <table:table-cell table:style-name="ce448" office:value-type="float" office:value="2.009" calcext:value-type="float">
            <text:p>2.0090</text:p>
          </table:table-cell>
          <table:table-cell table:style-name="ce448" office:value-type="float" office:value="6.4" calcext:value-type="float">
            <text:p>6.4000</text:p>
          </table:table-cell>
          <table:table-cell table:number-columns-repeated="6"/>
          <table:table-cell table:style-name="ce448" office:value-type="float" office:value="5" calcext:value-type="float">
            <text:p>5.0000</text:p>
          </table:table-cell>
          <table:table-cell table:style-name="ce448" office:value-type="float" office:value="4.747" calcext:value-type="float">
            <text:p>4.7470</text:p>
          </table:table-cell>
          <table:table-cell table:style-name="ce448" office:value-type="float" office:value="15" calcext:value-type="float">
            <text:p>15.0000</text:p>
          </table:table-cell>
          <table:table-cell table:number-columns-repeated="2"/>
        </table:table-row>
        <table:table-row table:style-name="ro1">
          <table:table-cell/>
          <table:table-cell table:style-name="ce449" office:value-type="float" office:value="6.5" calcext:value-type="float">
            <text:p>6.5000</text:p>
          </table:table-cell>
          <table:table-cell table:style-name="ce449" office:value-type="float" office:value="2.176" calcext:value-type="float">
            <text:p>2.1760</text:p>
          </table:table-cell>
          <table:table-cell table:style-name="ce449" office:value-type="float" office:value="7.2" calcext:value-type="float">
            <text:p>7.2000</text:p>
          </table:table-cell>
          <table:table-cell table:number-columns-repeated="6"/>
          <table:table-cell table:style-name="ce449" office:value-type="float" office:value="5.5" calcext:value-type="float">
            <text:p>5.5000</text:p>
          </table:table-cell>
          <table:table-cell table:style-name="ce449" office:value-type="float" office:value="5.222" calcext:value-type="float">
            <text:p>5.2220</text:p>
          </table:table-cell>
          <table:table-cell table:style-name="ce449" office:value-type="float" office:value="17" calcext:value-type="float">
            <text:p>17.00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75" table:number-columns-repeated="3"/>
          <table:table-cell table:number-columns-repeated="6"/>
          <table:table-cell table:style-name="ce375" table:number-columns-repeated="5"/>
        </table:table-row>
        <table:table-row table:style-name="ro1" table:number-rows-repeated="14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Default" table:number-columns-repeated="2"/>
          <table:table-cell table:style-name="ce375" table:number-columns-repeated="2"/>
          <table:table-cell table:number-columns-repeated="2"/>
          <table:table-cell table:style-name="ce280"/>
          <table:table-cell table:style-name="ce140" office:value-type="string" calcext:value-type="string" table:number-columns-spanned="5" table:number-rows-spanned="1">
            <text:p>verena</text:p>
          </table:table-cell>
          <table:covered-table-cell table:style-name="ce280"/>
          <table:covered-table-cell table:number-columns-repeated="3" table:style-name="ce62"/>
          <table:table-cell/>
          <table:table-cell table:style-name="ce443" table:number-columns-repeated="2"/>
        </table:table-row>
        <table:table-row table:style-name="ro1">
          <table:table-cell table:style-name="Default" table:number-columns-repeated="2"/>
          <table:table-cell table:style-name="ce375" table:number-columns-repeated="2"/>
          <table:table-cell table:style-name="ce140" office:value-type="string" calcext:value-type="string" table:number-columns-spanned="2" table:number-rows-spanned="1">
            <text:p>reator diogenes</text:p>
          </table:table-cell>
          <table:covered-table-cell table:style-name="ce80"/>
          <table:table-cell table:style-name="ce280"/>
          <table:table-cell table:style-name="ce140" office:value-type="string" calcext:value-type="string" table:number-columns-spanned="2" table:number-rows-spanned="1">
            <text:p>reator pequeno</text:p>
          </table:table-cell>
          <table:covered-table-cell table:style-name="ce90"/>
          <table:table-cell table:style-name="ce280"/>
          <table:table-cell table:style-name="ce140" office:value-type="string" calcext:value-type="string" table:number-columns-spanned="2" table:number-rows-spanned="1">
            <text:p>reator grande</text:p>
          </table:table-cell>
          <table:covered-table-cell table:style-name="ce166"/>
          <table:table-cell/>
          <table:table-cell table:style-name="ce443" table:number-columns-repeated="2"/>
        </table:table-row>
        <table:table-row table:style-name="ro1">
          <table:table-cell table:style-name="ce444" office:value-type="string" calcext:value-type="string">
            <text:p>quant ativacoes</text:p>
          </table:table-cell>
          <table:table-cell table:style-name="ce72" office:value-type="float" office:value="1" calcext:value-type="float">
            <text:p>1</text:p>
          </table:table-cell>
          <table:table-cell table:style-name="ce375"/>
          <table:table-cell table:style-name="ce444" office:value-type="string" calcext:value-type="string">
            <text:p>tempo rentencao (dia)</text:p>
          </table:table-cell>
          <table:table-cell table:style-name="ce77" office:value-type="float" office:value="30" calcext:value-type="float">
            <text:p>30.000000</text:p>
          </table:table-cell>
          <table:table-cell table:style-name="ce81"/>
          <table:table-cell table:style-name="ce86"/>
          <table:table-cell table:style-name="ce77" office:value-type="float" office:value="3" calcext:value-type="float">
            <text:p>3.000000</text:p>
          </table:table-cell>
          <table:table-cell table:style-name="ce82"/>
          <table:table-cell table:style-name="ce88"/>
          <table:table-cell table:style-name="ce78" office:value-type="float" office:value="12" calcext:value-type="float">
            <text:p>12.000000</text:p>
          </table:table-cell>
          <table:table-cell table:style-name="ce83"/>
          <table:table-cell/>
          <table:table-cell table:style-name="ce443" table:number-columns-repeated="2"/>
        </table:table-row>
        <table:table-row table:style-name="ro1">
          <table:table-cell table:style-name="ce445" office:value-type="string" calcext:value-type="string">
            <text:p>tempo ativacao (min)</text:p>
          </table:table-cell>
          <table:table-cell table:style-name="ce73" office:value-type="float" office:value="4" calcext:value-type="float">
            <text:p>4</text:p>
          </table:table-cell>
          <table:table-cell table:style-name="ce375"/>
          <table:table-cell table:style-name="ce451" office:value-type="string" calcext:value-type="string">
            <text:p>volume (mL)</text:p>
          </table:table-cell>
          <table:table-cell table:style-name="ce77" office:value-type="float" office:value="1000" calcext:value-type="float">
            <text:p>1000.000000</text:p>
          </table:table-cell>
          <table:table-cell table:style-name="ce82"/>
          <table:table-cell table:style-name="ce86"/>
          <table:table-cell table:style-name="ce77" office:value-type="float" office:value="1000" calcext:value-type="float">
            <text:p>1000.000000</text:p>
          </table:table-cell>
          <table:table-cell table:style-name="ce82"/>
          <table:table-cell table:style-name="ce88"/>
          <table:table-cell table:style-name="ce77" office:value-type="float" office:value="4000" calcext:value-type="float">
            <text:p>4000.000000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/>
          <table:table-cell table:style-name="ce375" table:number-columns-repeated="2"/>
          <table:table-cell table:style-name="ce451" office:value-type="string" calcext:value-type="string">
            <text:p>volume/dia (mL)</text:p>
          </table:table-cell>
          <table:table-cell table:style-name="ce77" table:formula="of:=[.E56]/[.E55]" office:value-type="float" office:value="33.3333333333333" calcext:value-type="float">
            <text:p>33.333333</text:p>
          </table:table-cell>
          <table:table-cell table:style-name="ce82"/>
          <table:table-cell table:style-name="ce86"/>
          <table:table-cell table:style-name="ce77" table:formula="of:=[.H56]/[.H55]" office:value-type="float" office:value="333.333333333333" calcext:value-type="float">
            <text:p>333.333333</text:p>
          </table:table-cell>
          <table:table-cell table:style-name="ce82"/>
          <table:table-cell table:style-name="ce88"/>
          <table:table-cell table:style-name="ce77" table:formula="of:=[.K56]/[.K55]" office:value-type="float" office:value="333.333333333333" calcext:value-type="float">
            <text:p>333.333333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444" office:value-type="string" calcext:value-type="string">
            <text:p>quant ativacoes</text:p>
          </table:table-cell>
          <table:table-cell table:style-name="ce72" office:value-type="float" office:value="20" calcext:value-type="float">
            <text:p>20</text:p>
          </table:table-cell>
          <table:table-cell table:style-name="ce375"/>
          <table:table-cell table:style-name="ce451" office:value-type="string" calcext:value-type="string">
            <text:p>volume/ativacao (mL)</text:p>
          </table:table-cell>
          <table:table-cell table:style-name="ce77" table:formula="of:=[.E57]/[.$B$55]" office:value-type="float" office:value="33.3333333333333" calcext:value-type="float">
            <text:p>33.333333</text:p>
          </table:table-cell>
          <table:table-cell table:style-name="ce82"/>
          <table:table-cell table:style-name="ce86"/>
          <table:table-cell table:style-name="ce77" table:formula="of:=[.H57]/[.$B$58]" office:value-type="float" office:value="16.6666666666667" calcext:value-type="float">
            <text:p>16.666667</text:p>
          </table:table-cell>
          <table:table-cell table:style-name="ce82"/>
          <table:table-cell table:style-name="ce86"/>
          <table:table-cell table:style-name="ce77" table:formula="of:=[.K57]/[.$B$58]" office:value-type="float" office:value="16.6666666666667" calcext:value-type="float">
            <text:p>16.666667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445" office:value-type="string" calcext:value-type="string">
            <text:p>tempo ativacao (min)</text:p>
          </table:table-cell>
          <table:table-cell table:style-name="ce73" office:value-type="float" office:value="5" calcext:value-type="float">
            <text:p>5</text:p>
          </table:table-cell>
          <table:table-cell table:style-name="ce375"/>
          <table:table-cell table:style-name="ce445" office:value-type="string" calcext:value-type="string">
            <text:p>volume/minuto (mL)</text:p>
          </table:table-cell>
          <table:table-cell table:style-name="ce77" table:formula="of:=[.E58]/[.$B$56]" office:value-type="float" office:value="8.33333333333333" calcext:value-type="float">
            <text:p>8.333333</text:p>
          </table:table-cell>
          <table:table-cell table:style-name="ce82"/>
          <table:table-cell table:style-name="ce86"/>
          <table:table-cell table:style-name="ce77" table:formula="of:=[.H58]/[.$B$59]" office:value-type="float" office:value="3.33333333333333" calcext:value-type="float">
            <text:p>3.333333</text:p>
          </table:table-cell>
          <table:table-cell table:style-name="ce82"/>
          <table:table-cell table:style-name="ce88"/>
          <table:table-cell table:style-name="ce77" table:formula="of:=[.K58]/[.$B$59]" office:value-type="float" office:value="3.33333333333333" calcext:value-type="float">
            <text:p>3.333333</text:p>
          </table:table-cell>
          <table:table-cell table:style-name="ce84"/>
          <table:table-cell table:style-name="Default"/>
          <table:table-cell/>
          <table:table-cell table:style-name="ce443"/>
        </table:table-row>
        <table:table-row table:style-name="ro1">
          <table:table-cell/>
          <table:table-cell table:style-name="ce375" table:number-columns-repeated="2"/>
          <table:table-cell table:style-name="ce74" office:value-type="string" calcext:value-type="string">
            <text:p>curva bomba a</text:p>
          </table:table-cell>
          <table:table-cell table:style-name="ce78" table:number-matrix-columns-spanned="2" table:number-matrix-rows-spanned="1" table:formula="of:=LINEST([.C2:.C12];[.D2:.D12])" office:value-type="float" office:value="0.305306543235851" calcext:value-type="float">
            <text:p>0.305307</text:p>
          </table:table-cell>
          <table:table-cell table:style-name="ce83" office:value-type="float" office:value="0.00350091310751105" calcext:value-type="float">
            <text:p>0.003501</text:p>
          </table:table-cell>
          <table:table-cell table:style-name="ce87"/>
          <table:table-cell table:style-name="ce78" table:number-matrix-columns-spanned="2" table:number-matrix-rows-spanned="1" table:formula="of:=LINEST([.C26:.C36];[.D26:.D36])" office:value-type="float" office:value="0.28786680229775" calcext:value-type="float">
            <text:p>0.287867</text:p>
          </table:table-cell>
          <table:table-cell table:style-name="ce83" office:value-type="float" office:value="0.122763044518909" calcext:value-type="float">
            <text:p>0.122763</text:p>
          </table:table-cell>
          <table:table-cell table:style-name="ce89"/>
          <table:table-cell table:style-name="ce78" table:number-matrix-columns-spanned="2" table:number-matrix-rows-spanned="1" table:formula="of:=LINEST([.L26:.L36];[.M26:.M36])" office:value-type="float" office:value="0.30092866093806" calcext:value-type="float">
            <text:p>0.300929</text:p>
          </table:table-cell>
          <table:table-cell table:style-name="ce83" office:value-type="float" office:value="0.221821912736386" calcext:value-type="float">
            <text:p>0.221822</text:p>
          </table:table-cell>
          <table:table-cell table:style-name="Default"/>
          <table:table-cell table:style-name="ce443" table:number-columns-repeated="2"/>
        </table:table-row>
        <table:table-row table:style-name="ro1">
          <table:table-cell/>
          <table:table-cell table:style-name="ce375" table:number-columns-repeated="2"/>
          <table:table-cell table:style-name="ce166" office:value-type="string" calcext:value-type="string">
            <text:p>rpm</text:p>
          </table:table-cell>
          <table:table-cell table:style-name="ce77" table:formula="of:=([.E59]*[.E60])+[.F60]" office:value-type="float" office:value="2.5477221067396" calcext:value-type="float">
            <text:p>2.547722</text:p>
          </table:table-cell>
          <table:table-cell table:style-name="ce82"/>
          <table:table-cell table:style-name="ce88"/>
          <table:table-cell table:style-name="ce77" table:formula="of:=([.H59]*[.H60])+[.I60]" office:value-type="float" office:value="1.08231905217807" calcext:value-type="float">
            <text:p>1.082319</text:p>
          </table:table-cell>
          <table:table-cell table:style-name="ce84"/>
          <table:table-cell table:style-name="ce86"/>
          <table:table-cell table:style-name="ce77" table:formula="of:=([.K59]*[.K60])+[.L60]" office:value-type="float" office:value="1.22491744919658" calcext:value-type="float">
            <text:p>1.224917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280" table:number-columns-repeated="2"/>
          <table:table-cell table:style-name="ce375"/>
          <table:table-cell table:style-name="ce166" office:value-type="string" calcext:value-type="string">
            <text:p>Curva 2 bomba a</text:p>
          </table:table-cell>
          <table:table-cell table:style-name="ce77" table:number-matrix-columns-spanned="2" table:number-matrix-rows-spanned="1" table:formula="of:=LINEST([.B2:.B12];[.C2:.C12])" office:value-type="float" office:value="3.13108183713084" calcext:value-type="float">
            <text:p>3.131082</text:p>
          </table:table-cell>
          <table:table-cell table:style-name="ce84" office:value-type="float" office:value="0.000622635954573363" calcext:value-type="float">
            <text:p>0.000623</text:p>
          </table:table-cell>
          <table:table-cell table:style-name="ce88"/>
          <table:table-cell table:style-name="ce77" table:number-matrix-columns-spanned="2" table:number-matrix-rows-spanned="1" table:formula="of:=LINEST([.B26:.B36];[.C26:.C36])" office:value-type="float" office:value="2.98699761840629" calcext:value-type="float">
            <text:p>2.986998</text:p>
          </table:table-cell>
          <table:table-cell table:style-name="ce84" office:value-type="float" office:value="-0.000616352362423981" calcext:value-type="float">
            <text:p>-0.000616</text:p>
          </table:table-cell>
          <table:table-cell table:style-name="ce86"/>
          <table:table-cell table:style-name="ce92" table:number-matrix-columns-spanned="2" table:number-matrix-rows-spanned="1" table:formula="of:=LINEST([.K26:.K36];[.L26:.L36])" office:value-type="float" office:value="1.05325631990576" calcext:value-type="float">
            <text:p>1.053256</text:p>
          </table:table-cell>
          <table:table-cell table:style-name="ce84" office:value-type="float" office:value="0.000255859537147681" calcext:value-type="float">
            <text:p>0.000256</text:p>
          </table:table-cell>
          <table:table-cell table:number-columns-repeated="3"/>
        </table:table-row>
        <table:table-row table:style-name="ro1">
          <table:table-cell table:style-name="ce280" table:number-columns-repeated="2"/>
          <table:table-cell table:style-name="ce375"/>
          <table:table-cell table:style-name="ce76" office:value-type="string" calcext:value-type="string">
            <text:p>mL/min</text:p>
          </table:table-cell>
          <table:table-cell table:style-name="ce79" table:formula="of:=([.E62]*[.E61])+[.F62]" office:value-type="float" office:value="7.97774905042366" calcext:value-type="float">
            <text:p>7.977749</text:p>
          </table:table-cell>
          <table:table-cell table:style-name="ce85"/>
          <table:table-cell table:style-name="ce89"/>
          <table:table-cell table:style-name="ce79" table:formula="of:=([.H62]*[.H61])+[.I62]" office:value-type="float" office:value="3.23226807884924" calcext:value-type="float">
            <text:p>3.232268</text:p>
          </table:table-cell>
          <table:table-cell table:style-name="ce91"/>
          <table:table-cell table:style-name="ce87"/>
          <table:table-cell table:style-name="ce79" table:formula="of:=([.K62]*[.K61])+[.L62]" office:value-type="float" office:value="1.2904079042663" calcext:value-type="float">
            <text:p>1.290408</text:p>
          </table:table-cell>
          <table:table-cell table:style-name="ce91"/>
          <table:table-cell table:number-columns-repeated="2"/>
          <table:table-cell table:style-name="ce443"/>
        </table:table-row>
        <table:table-row table:style-name="ro1">
          <table:table-cell/>
          <table:table-cell table:style-name="ce375" table:number-columns-repeated="2"/>
          <table:table-cell table:style-name="Default" table:number-columns-repeated="9"/>
          <table:table-cell table:number-columns-repeated="2"/>
          <table:table-cell table:style-name="ce443"/>
        </table:table-row>
        <table:table-row table:style-name="ro1">
          <table:table-cell table:style-name="ce443"/>
          <table:table-cell table:number-columns-repeated="2"/>
          <table:table-cell table:style-name="Default"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 table:number-rows-repeated="2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4"/>
          <table:table-cell table:style-name="ce443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 table:number-rows-repeated="3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4"/>
          <table:table-cell table:style-name="ce44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</table:table>
      <table:table table:name="Nutrientes" table:style-name="ta1">
        <table:table-column table:style-name="co25" table:default-cell-style-name="ce451"/>
        <table:table-column table:style-name="co26" table:default-cell-style-name="ce474"/>
        <table:table-column table:style-name="co25" table:number-columns-repeated="3" table:default-cell-style-name="ce474"/>
        <table:table-column table:style-name="co1" table:number-columns-repeated="3" table:default-cell-style-name="Default"/>
        <table:table-row table:style-name="ro1">
          <table:table-cell table:style-name="ce140" office:value-type="string" calcext:value-type="string">
            <text:p>Nutrientes</text:p>
          </table:table-cell>
          <table:table-cell table:style-name="ce140" office:value-type="string" calcext:value-type="string">
            <text:p>Mass (mg/350ml)</text:p>
          </table:table-cell>
          <table:table-cell table:style-name="ce140" office:value-type="string" calcext:value-type="string">
            <text:p>Adição (mg/L)</text:p>
          </table:table-cell>
          <table:table-cell table:style-name="ce140" office:value-type="string" calcext:value-type="string">
            <text:p>Adição (g/L)</text:p>
          </table:table-cell>
          <table:table-cell table:style-name="ce140" office:value-type="string" calcext:value-type="string">
            <text:p>X100 (g/L)</text:p>
          </table:table-cell>
          <table:table-cell table:style-name="ce140" office:value-type="string" calcext:value-type="string">
            <text:p>X1000 (g/L)</text:p>
          </table:table-cell>
          <table:table-cell table:style-name="ce140" office:value-type="string" calcext:value-type="string">
            <text:p>X2000 (g/L)</text:p>
          </table:table-cell>
          <table:table-cell table:style-name="ce407"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gSO4.7H2O</text:p>
          </table:table-cell>
          <table:table-cell table:style-name="ce448" office:value-type="float" office:value="18.9" calcext:value-type="float">
            <text:p>18.9000</text:p>
          </table:table-cell>
          <table:table-cell table:style-name="ce448" table:formula="of:=(([.B2]*1000)/350)" office:value-type="float" office:value="54" calcext:value-type="float">
            <text:p>54.0000</text:p>
          </table:table-cell>
          <table:table-cell table:style-name="ce448" table:formula="of:=(([.B2]*1000)/350)/1000" office:value-type="float" office:value="0.054" calcext:value-type="float">
            <text:p>0.0540</text:p>
          </table:table-cell>
          <table:table-cell table:style-name="ce448" table:formula="of:=[.D2]*100" office:value-type="float" office:value="5.4" calcext:value-type="float">
            <text:p>5.4000</text:p>
          </table:table-cell>
          <table:table-cell table:style-name="ce448" table:formula="of:=[.D2]*1000" office:value-type="float" office:value="54" calcext:value-type="float">
            <text:p>54.0000</text:p>
          </table:table-cell>
          <table:table-cell table:style-name="ce448" table:formula="of:=[.D2]*2000" office:value-type="float" office:value="108" calcext:value-type="float">
            <text:p>108.0000</text:p>
          </table:table-cell>
          <table:table-cell table:style-name="ce407" office:value-type="string" calcext:value-type="string">
            <text:p>5.5.1</text:p>
          </table:table-cell>
        </table:table-row>
        <table:table-row table:style-name="ro1">
          <table:table-cell office:value-type="string" calcext:value-type="string">
            <text:p>FeSO4.7H2O</text:p>
          </table:table-cell>
          <table:table-cell table:style-name="ce448" office:value-type="float" office:value="522.8" calcext:value-type="float">
            <text:p>522.8000</text:p>
          </table:table-cell>
          <table:table-cell table:style-name="ce448" table:formula="of:=(([.B3]*1000)/350)" office:value-type="float" office:value="1493.71428571429" calcext:value-type="float">
            <text:p>1493.7143</text:p>
          </table:table-cell>
          <table:table-cell table:style-name="ce448" table:formula="of:=(([.B3]*1000)/350)/1000" office:value-type="float" office:value="1.49371428571429" calcext:value-type="float">
            <text:p>1.4937</text:p>
          </table:table-cell>
          <table:table-cell table:style-name="ce448" table:formula="of:=[.D3]*100" office:value-type="float" office:value="149.371428571429" calcext:value-type="float">
            <text:p>149.3714</text:p>
          </table:table-cell>
          <table:table-cell table:style-name="ce448" table:formula="of:=[.D3]*1000" office:value-type="float" office:value="1493.71428571429" calcext:value-type="float">
            <text:p>1493.7143</text:p>
          </table:table-cell>
          <table:table-cell table:style-name="ce448" table:formula="of:=[.D3]*2000" office:value-type="float" office:value="2987.42857142857" calcext:value-type="float">
            <text:p>2987.4286</text:p>
          </table:table-cell>
          <table:table-cell table:style-name="ce407" office:value-type="string" calcext:value-type="string">
            <text:p>5.4.1</text:p>
          </table:table-cell>
        </table:table-row>
        <table:table-row table:style-name="ro1">
          <table:table-cell office:value-type="string" calcext:value-type="string">
            <text:p>CoCl2.6H2O</text:p>
          </table:table-cell>
          <table:table-cell table:style-name="ce448" office:value-type="float" office:value="0.42" calcext:value-type="float">
            <text:p>0.4200</text:p>
          </table:table-cell>
          <table:table-cell table:style-name="ce448" table:formula="of:=(([.B4]*1000)/350)" office:value-type="float" office:value="1.2" calcext:value-type="float">
            <text:p>1.2000</text:p>
          </table:table-cell>
          <table:table-cell table:style-name="ce448" table:formula="of:=(([.B4]*1000)/350)/1000" office:value-type="float" office:value="0.0012" calcext:value-type="float">
            <text:p>0.0012</text:p>
          </table:table-cell>
          <table:table-cell table:style-name="ce448" table:formula="of:=[.D4]*100" office:value-type="float" office:value="0.12" calcext:value-type="float">
            <text:p>0.1200</text:p>
          </table:table-cell>
          <table:table-cell table:style-name="ce448" table:formula="of:=[.D4]*1000" office:value-type="float" office:value="1.2" calcext:value-type="float">
            <text:p>1.2000</text:p>
          </table:table-cell>
          <table:table-cell table:style-name="ce448" table:formula="of:=[.D4]*2000" office:value-type="float" office:value="2.4" calcext:value-type="float">
            <text:p>2.4000</text:p>
          </table:table-cell>
          <table:table-cell table:style-name="ce407" office:value-type="string" calcext:value-type="string">
            <text:p>2.5.4</text:p>
          </table:table-cell>
        </table:table-row>
        <table:table-row table:style-name="ro1">
          <table:table-cell office:value-type="string" calcext:value-type="string">
            <text:p>ZnCl2</text:p>
          </table:table-cell>
          <table:table-cell table:style-name="ce448" office:value-type="float" office:value="10.5" calcext:value-type="float">
            <text:p>10.5000</text:p>
          </table:table-cell>
          <table:table-cell table:style-name="ce448" table:formula="of:=(([.B5]*1000)/350)" office:value-type="float" office:value="30" calcext:value-type="float">
            <text:p>30.0000</text:p>
          </table:table-cell>
          <table:table-cell table:style-name="ce448" table:formula="of:=(([.B5]*1000)/350)/1000" office:value-type="float" office:value="0.03" calcext:value-type="float">
            <text:p>0.0300</text:p>
          </table:table-cell>
          <table:table-cell table:style-name="ce448" table:formula="of:=[.D5]*100" office:value-type="float" office:value="3" calcext:value-type="float">
            <text:p>3.0000</text:p>
          </table:table-cell>
          <table:table-cell table:style-name="ce448" table:formula="of:=[.D5]*1000" office:value-type="float" office:value="30" calcext:value-type="float">
            <text:p>30.0000</text:p>
          </table:table-cell>
          <table:table-cell table:style-name="ce448" table:formula="of:=[.D5]*2000" office:value-type="float" office:value="60" calcext:value-type="float">
            <text:p>60.0000</text:p>
          </table:table-cell>
          <table:table-cell table:style-name="ce407" office:value-type="string" calcext:value-type="string">
            <text:p>sem num</text:p>
          </table:table-cell>
        </table:table-row>
        <table:table-row table:style-name="ro1">
          <table:table-cell office:value-type="string" calcext:value-type="string">
            <text:p>NiCl2.6H2O</text:p>
          </table:table-cell>
          <table:table-cell table:style-name="ce448" office:value-type="float" office:value="0.0105" calcext:value-type="float">
            <text:p>0.0105</text:p>
          </table:table-cell>
          <table:table-cell table:style-name="ce448" table:formula="of:=(([.B6]*1000)/350)" office:value-type="float" office:value="0.03" calcext:value-type="float">
            <text:p>0.0300</text:p>
          </table:table-cell>
          <table:table-cell table:style-name="ce448" table:formula="of:=(([.B6]*1000)/350)/1000" office:value-type="float" office:value="0.00003" calcext:value-type="float">
            <text:p>0.0000</text:p>
          </table:table-cell>
          <table:table-cell table:style-name="ce448" table:formula="of:=[.D6]*100" office:value-type="float" office:value="0.003" calcext:value-type="float">
            <text:p>0.0030</text:p>
          </table:table-cell>
          <table:table-cell table:style-name="ce448" table:formula="of:=[.D6]*1000" office:value-type="float" office:value="0.03" calcext:value-type="float">
            <text:p>0.0300</text:p>
          </table:table-cell>
          <table:table-cell table:style-name="ce448" table:formula="of:=[.D6]*2000" office:value-type="float" office:value="0.06" calcext:value-type="float">
            <text:p>0.0600</text:p>
          </table:table-cell>
          <table:table-cell table:style-name="ce407" office:value-type="string" calcext:value-type="string">
            <text:p>2.5.8</text:p>
          </table:table-cell>
        </table:table-row>
        <table:table-row table:style-name="ro1">
          <table:table-cell office:value-type="string" calcext:value-type="string">
            <text:p>EDTA</text:p>
          </table:table-cell>
          <table:table-cell table:style-name="ce448" office:value-type="float" office:value="0.21" calcext:value-type="float">
            <text:p>0.2100</text:p>
          </table:table-cell>
          <table:table-cell table:style-name="ce448" table:formula="of:=(([.B7]*1000)/350)" office:value-type="float" office:value="0.6" calcext:value-type="float">
            <text:p>0.6000</text:p>
          </table:table-cell>
          <table:table-cell table:style-name="ce448" table:formula="of:=(([.B7]*1000)/350)/1000" office:value-type="float" office:value="0.0006" calcext:value-type="float">
            <text:p>0.0006</text:p>
          </table:table-cell>
          <table:table-cell table:style-name="ce448" table:formula="of:=[.D7]*100" office:value-type="float" office:value="0.06" calcext:value-type="float">
            <text:p>0.0600</text:p>
          </table:table-cell>
          <table:table-cell table:style-name="ce448" table:formula="of:=[.D7]*1000" office:value-type="float" office:value="0.6" calcext:value-type="float">
            <text:p>0.6000</text:p>
          </table:table-cell>
          <table:table-cell table:style-name="ce448" table:formula="of:=[.D7]*2000" office:value-type="float" office:value="1.2" calcext:value-type="float">
            <text:p>1.2000</text:p>
          </table:table-cell>
          <table:table-cell table:style-name="ce407" office:value-type="string" calcext:value-type="string">
            <text:p>1.2.1</text:p>
          </table:table-cell>
        </table:table-row>
        <table:table-row table:style-name="ro1">
          <table:table-cell table:style-name="ce445" office:value-type="string" calcext:value-type="string">
            <text:p>CuSO4.5H2O</text:p>
          </table:table-cell>
          <table:table-cell table:style-name="ce449" office:value-type="float" office:value="9.23" calcext:value-type="float">
            <text:p>9.2300</text:p>
          </table:table-cell>
          <table:table-cell table:style-name="ce449" table:formula="of:=(([.B8]*1000)/350)" office:value-type="float" office:value="26.3714285714286" calcext:value-type="float">
            <text:p>26.3714</text:p>
          </table:table-cell>
          <table:table-cell table:style-name="ce449" table:formula="of:=(([.B8]*1000)/350)/1000" office:value-type="float" office:value="0.0263714285714286" calcext:value-type="float">
            <text:p>0.0264</text:p>
          </table:table-cell>
          <table:table-cell table:style-name="ce449" table:formula="of:=[.D8]*100" office:value-type="float" office:value="2.63714285714286" calcext:value-type="float">
            <text:p>2.6371</text:p>
          </table:table-cell>
          <table:table-cell table:style-name="ce449" table:formula="of:=[.D8]*1000" office:value-type="float" office:value="26.3714285714286" calcext:value-type="float">
            <text:p>26.3714</text:p>
          </table:table-cell>
          <table:table-cell table:style-name="ce449" table:formula="of:=[.D8]*2000" office:value-type="float" office:value="52.7428571428571" calcext:value-type="float">
            <text:p>52.7429</text:p>
          </table:table-cell>
          <table:table-cell table:style-name="ce407" office:value-type="string" calcext:value-type="string">
            <text:p>5.3.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500" calcext:value-type="float">
            <text:p>50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12]/1000)" office:value-type="float" office:value="0.027" calcext:value-type="float">
            <text:p>0.0270000</text:p>
          </table:table-cell>
          <table:table-cell table:style-name="ce473" table:formula="of:=([.E2]*[.$A$12])/1000" office:value-type="float" office:value="2.7" calcext:value-type="float">
            <text:p>2.7000000</text:p>
          </table:table-cell>
          <table:table-cell table:style-name="ce473" table:formula="of:=([.F2]*[.$A$12])/1000" office:value-type="float" office:value="27" calcext:value-type="float">
            <text:p>27.0000000</text:p>
          </table:table-cell>
          <table:table-cell table:style-name="ce473" table:formula="of:=([.G2]*[.$A$12])/1000" office:value-type="float" office:value="54" calcext:value-type="float">
            <text:p>54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12]/1000)" office:value-type="float" office:value="0.746857142857143" calcext:value-type="float">
            <text:p>0.7468571</text:p>
          </table:table-cell>
          <table:table-cell table:formula="of:=([.E3]*[.$A$12])/1000" office:value-type="float" office:value="74.6857142857143" calcext:value-type="float">
            <text:p>74.6857143</text:p>
          </table:table-cell>
          <table:table-cell table:formula="of:=([.F3]*[.$A$12])/1000" office:value-type="float" office:value="746.857142857143" calcext:value-type="float">
            <text:p>746.8571429</text:p>
          </table:table-cell>
          <table:table-cell table:formula="of:=([.G3]*[.$A$12])/1000" office:value-type="float" office:value="1493.71428571429" calcext:value-type="float">
            <text:p>1493.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12]/1000)" office:value-type="float" office:value="0.0006" calcext:value-type="float">
            <text:p>0.0006000</text:p>
          </table:table-cell>
          <table:table-cell table:formula="of:=([.E4]*[.$A$12])/1000" office:value-type="float" office:value="0.06" calcext:value-type="float">
            <text:p>0.0600000</text:p>
          </table:table-cell>
          <table:table-cell table:formula="of:=([.F4]*[.$A$12])/1000" office:value-type="float" office:value="0.6" calcext:value-type="float">
            <text:p>0.6000000</text:p>
          </table:table-cell>
          <table:table-cell table:formula="of:=([.G4]*[.$A$12])/1000" office:value-type="float" office:value="1.2" calcext:value-type="float">
            <text:p>1.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12]/1000)" office:value-type="float" office:value="0.015" calcext:value-type="float">
            <text:p>0.0150000</text:p>
          </table:table-cell>
          <table:table-cell table:formula="of:=([.E5]*[.$A$12])/1000" office:value-type="float" office:value="1.5" calcext:value-type="float">
            <text:p>1.5000000</text:p>
          </table:table-cell>
          <table:table-cell table:formula="of:=([.F5]*[.$A$12])/1000" office:value-type="float" office:value="15" calcext:value-type="float">
            <text:p>15.0000000</text:p>
          </table:table-cell>
          <table:table-cell table:formula="of:=([.G5]*[.$A$12])/1000" office:value-type="float" office:value="30" calcext:value-type="float">
            <text:p>30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12]/1000)" office:value-type="float" office:value="0.000015" calcext:value-type="float">
            <text:p>0.0000150</text:p>
          </table:table-cell>
          <table:table-cell table:formula="of:=([.E6]*[.$A$12])/1000" office:value-type="float" office:value="0.0015" calcext:value-type="float">
            <text:p>0.0015000</text:p>
          </table:table-cell>
          <table:table-cell table:formula="of:=([.F6]*[.$A$12])/1000" office:value-type="float" office:value="0.015" calcext:value-type="float">
            <text:p>0.0150000</text:p>
          </table:table-cell>
          <table:table-cell table:formula="of:=([.G6]*[.$A$12])/1000" office:value-type="float" office:value="0.03" calcext:value-type="float">
            <text:p>0.0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12]/1000)" office:value-type="float" office:value="0.0003" calcext:value-type="float">
            <text:p>0.0003000</text:p>
          </table:table-cell>
          <table:table-cell table:formula="of:=([.E7]*[.$A$12])/1000" office:value-type="float" office:value="0.03" calcext:value-type="float">
            <text:p>0.0300000</text:p>
          </table:table-cell>
          <table:table-cell table:formula="of:=([.F7]*[.$A$12])/1000" office:value-type="float" office:value="0.3" calcext:value-type="float">
            <text:p>0.3000000</text:p>
          </table:table-cell>
          <table:table-cell table:formula="of:=([.G7]*[.$A$12])/1000" office:value-type="float" office:value="0.6" calcext:value-type="float">
            <text:p>0.6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12]/1000)" office:value-type="float" office:value="0.0131857142857143" calcext:value-type="float">
            <text:p>0.0131857</text:p>
          </table:table-cell>
          <table:table-cell table:formula="of:=([.E8]*[.$A$12])/1000" office:value-type="float" office:value="1.31857142857143" calcext:value-type="float">
            <text:p>1.3185714</text:p>
          </table:table-cell>
          <table:table-cell table:formula="of:=([.F8]*[.$A$12])/1000" office:value-type="float" office:value="13.1857142857143" calcext:value-type="float">
            <text:p>13.1857143</text:p>
          </table:table-cell>
          <table:table-cell table:formula="of:=([.G8]*[.$A$12])/1000" office:value-type="float" office:value="26.3714285714286" calcext:value-type="float">
            <text:p>26.3714286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20]*100" office:value-type="float" office:value="500" calcext:value-type="float">
            <text:p>500</text:p>
          </table:table-cell>
          <table:table-cell table:style-name="ce404" table:formula="of:=[.D20]*10" office:value-type="float" office:value="5" calcext:value-type="float">
            <text:p>5</text:p>
          </table:table-cell>
          <table:table-cell table:style-name="ce404" table:formula="of:=1*([.A12]/1000)" office:value-type="float" office:value="0.5" calcext:value-type="float">
            <text:p>0.5</text:p>
          </table:table-cell>
          <table:table-cell table:style-name="ce404" table:formula="of:=[.D20]/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43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250" calcext:value-type="float">
            <text:p>25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24]/1000)" office:value-type="float" office:value="0.0135" calcext:value-type="float">
            <text:p>0.0135000</text:p>
          </table:table-cell>
          <table:table-cell table:style-name="ce473" table:formula="of:=([.E2]*[.$A$24])/1000" office:value-type="float" office:value="1.35" calcext:value-type="float">
            <text:p>1.3500000</text:p>
          </table:table-cell>
          <table:table-cell table:style-name="ce473" table:formula="of:=([.F2]*[.$A$24])/1000" office:value-type="float" office:value="13.5" calcext:value-type="float">
            <text:p>13.5000000</text:p>
          </table:table-cell>
          <table:table-cell table:style-name="ce473" table:formula="of:=([.G2]*[.$A$24])/1000" office:value-type="float" office:value="27" calcext:value-type="float">
            <text:p>27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24]/1000)" office:value-type="float" office:value="0.373428571428571" calcext:value-type="float">
            <text:p>0.3734286</text:p>
          </table:table-cell>
          <table:table-cell table:formula="of:=([.E3]*[.$A$24])/1000" office:value-type="float" office:value="37.3428571428571" calcext:value-type="float">
            <text:p>37.3428571</text:p>
          </table:table-cell>
          <table:table-cell table:formula="of:=([.F3]*[.$A$24])/1000" office:value-type="float" office:value="373.428571428571" calcext:value-type="float">
            <text:p>373.4285714</text:p>
          </table:table-cell>
          <table:table-cell table:formula="of:=([.G3]*[.$A$24])/1000" office:value-type="float" office:value="746.857142857143" calcext:value-type="float">
            <text:p>746.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24]/1000)" office:value-type="float" office:value="0.0003" calcext:value-type="float">
            <text:p>0.0003000</text:p>
          </table:table-cell>
          <table:table-cell table:formula="of:=([.E4]*[.$A$24])/1000" office:value-type="float" office:value="0.03" calcext:value-type="float">
            <text:p>0.0300000</text:p>
          </table:table-cell>
          <table:table-cell table:formula="of:=([.F4]*[.$A$24])/1000" office:value-type="float" office:value="0.3" calcext:value-type="float">
            <text:p>0.3000000</text:p>
          </table:table-cell>
          <table:table-cell table:formula="of:=([.G4]*[.$A$24])/1000" office:value-type="float" office:value="0.6" calcext:value-type="float">
            <text:p>0.6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24]/1000)" office:value-type="float" office:value="0.0075" calcext:value-type="float">
            <text:p>0.0075000</text:p>
          </table:table-cell>
          <table:table-cell table:formula="of:=([.E5]*[.$A$24])/1000" office:value-type="float" office:value="0.75" calcext:value-type="float">
            <text:p>0.7500000</text:p>
          </table:table-cell>
          <table:table-cell table:formula="of:=([.F5]*[.$A$24])/1000" office:value-type="float" office:value="7.5" calcext:value-type="float">
            <text:p>7.5000000</text:p>
          </table:table-cell>
          <table:table-cell table:formula="of:=([.G5]*[.$A$24])/1000" office:value-type="float" office:value="15" calcext:value-type="float">
            <text:p>15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24]/1000)" office:value-type="float" office:value="0.0000075" calcext:value-type="float">
            <text:p>0.0000075</text:p>
          </table:table-cell>
          <table:table-cell table:formula="of:=([.E6]*[.$A$24])/1000" office:value-type="float" office:value="0.00075" calcext:value-type="float">
            <text:p>0.0007500</text:p>
          </table:table-cell>
          <table:table-cell table:formula="of:=([.F6]*[.$A$24])/1000" office:value-type="float" office:value="0.0075" calcext:value-type="float">
            <text:p>0.0075000</text:p>
          </table:table-cell>
          <table:table-cell table:formula="of:=([.G6]*[.$A$24])/1000" office:value-type="float" office:value="0.015" calcext:value-type="float">
            <text:p>0.01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24]/1000)" office:value-type="float" office:value="0.00015" calcext:value-type="float">
            <text:p>0.0001500</text:p>
          </table:table-cell>
          <table:table-cell table:formula="of:=([.E7]*[.$A$24])/1000" office:value-type="float" office:value="0.015" calcext:value-type="float">
            <text:p>0.0150000</text:p>
          </table:table-cell>
          <table:table-cell table:formula="of:=([.F7]*[.$A$24])/1000" office:value-type="float" office:value="0.15" calcext:value-type="float">
            <text:p>0.1500000</text:p>
          </table:table-cell>
          <table:table-cell table:formula="of:=([.G7]*[.$A$24])/1000" office:value-type="float" office:value="0.3" calcext:value-type="float">
            <text:p>0.3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24]/1000)" office:value-type="float" office:value="0.00659285714285714" calcext:value-type="float">
            <text:p>0.0065929</text:p>
          </table:table-cell>
          <table:table-cell table:formula="of:=([.E8]*[.$A$24])/1000" office:value-type="float" office:value="0.659285714285714" calcext:value-type="float">
            <text:p>0.6592857</text:p>
          </table:table-cell>
          <table:table-cell table:formula="of:=([.F8]*[.$A$24])/1000" office:value-type="float" office:value="6.59285714285714" calcext:value-type="float">
            <text:p>6.5928571</text:p>
          </table:table-cell>
          <table:table-cell table:formula="of:=([.G8]*[.$A$24])/1000" office:value-type="float" office:value="13.1857142857143" calcext:value-type="float">
            <text:p>13.1857143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32]*100" office:value-type="float" office:value="250" calcext:value-type="float">
            <text:p>250</text:p>
          </table:table-cell>
          <table:table-cell table:style-name="ce404" table:formula="of:=[.D32]*10" office:value-type="float" office:value="2.5" calcext:value-type="float">
            <text:p>2.5</text:p>
          </table:table-cell>
          <table:table-cell table:style-name="ce404" table:formula="of:=1*([.A24]/1000)" office:value-type="float" office:value="0.25" calcext:value-type="float">
            <text:p>0.25</text:p>
          </table:table-cell>
          <table:table-cell table:style-name="ce404" table:formula="of:=[.D32]/2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1000" calcext:value-type="float">
            <text:p>100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36]/1000)" office:value-type="float" office:value="0.054" calcext:value-type="float">
            <text:p>0.0540000</text:p>
          </table:table-cell>
          <table:table-cell table:style-name="ce473" table:formula="of:=([.E2]*[.$A$36])/1000" office:value-type="float" office:value="5.4" calcext:value-type="float">
            <text:p>5.4000000</text:p>
          </table:table-cell>
          <table:table-cell table:style-name="ce473" table:formula="of:=([.F2]*[.$A$36])/1000" office:value-type="float" office:value="54" calcext:value-type="float">
            <text:p>54.0000000</text:p>
          </table:table-cell>
          <table:table-cell table:style-name="ce473" table:formula="of:=([.G2]*[.$A$36])/1000" office:value-type="float" office:value="108" calcext:value-type="float">
            <text:p>108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36]/1000)" office:value-type="float" office:value="1.49371428571429" calcext:value-type="float">
            <text:p>1.4937143</text:p>
          </table:table-cell>
          <table:table-cell table:formula="of:=([.E3]*[.$A$36])/1000" office:value-type="float" office:value="149.371428571429" calcext:value-type="float">
            <text:p>149.3714286</text:p>
          </table:table-cell>
          <table:table-cell table:formula="of:=([.F3]*[.$A$36])/1000" office:value-type="float" office:value="1493.71428571429" calcext:value-type="float">
            <text:p>1493.7142857</text:p>
          </table:table-cell>
          <table:table-cell table:formula="of:=([.G3]*[.$A$36])/1000" office:value-type="float" office:value="2987.42857142857" calcext:value-type="float">
            <text:p>2987.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36]/1000)" office:value-type="float" office:value="0.0012" calcext:value-type="float">
            <text:p>0.0012000</text:p>
          </table:table-cell>
          <table:table-cell table:formula="of:=([.E4]*[.$A$36])/1000" office:value-type="float" office:value="0.12" calcext:value-type="float">
            <text:p>0.1200000</text:p>
          </table:table-cell>
          <table:table-cell table:formula="of:=([.F4]*[.$A$36])/1000" office:value-type="float" office:value="1.2" calcext:value-type="float">
            <text:p>1.2000000</text:p>
          </table:table-cell>
          <table:table-cell table:formula="of:=([.G4]*[.$A$36])/1000" office:value-type="float" office:value="2.4" calcext:value-type="float">
            <text:p>2.4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36]/1000)" office:value-type="float" office:value="0.03" calcext:value-type="float">
            <text:p>0.0300000</text:p>
          </table:table-cell>
          <table:table-cell table:formula="of:=([.E5]*[.$A$36])/1000" office:value-type="float" office:value="3" calcext:value-type="float">
            <text:p>3.0000000</text:p>
          </table:table-cell>
          <table:table-cell table:formula="of:=([.F5]*[.$A$36])/1000" office:value-type="float" office:value="30" calcext:value-type="float">
            <text:p>30.0000000</text:p>
          </table:table-cell>
          <table:table-cell table:formula="of:=([.G5]*[.$A$36])/1000" office:value-type="float" office:value="60" calcext:value-type="float">
            <text:p>60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36]/1000)" office:value-type="float" office:value="0.00003" calcext:value-type="float">
            <text:p>0.0000300</text:p>
          </table:table-cell>
          <table:table-cell table:formula="of:=([.E6]*[.$A$36])/1000" office:value-type="float" office:value="0.003" calcext:value-type="float">
            <text:p>0.0030000</text:p>
          </table:table-cell>
          <table:table-cell table:formula="of:=([.F6]*[.$A$36])/1000" office:value-type="float" office:value="0.03" calcext:value-type="float">
            <text:p>0.0300000</text:p>
          </table:table-cell>
          <table:table-cell table:formula="of:=([.G6]*[.$A$36])/1000" office:value-type="float" office:value="0.06" calcext:value-type="float">
            <text:p>0.06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36]/1000)" office:value-type="float" office:value="0.0006" calcext:value-type="float">
            <text:p>0.0006000</text:p>
          </table:table-cell>
          <table:table-cell table:formula="of:=([.E7]*[.$A$36])/1000" office:value-type="float" office:value="0.06" calcext:value-type="float">
            <text:p>0.0600000</text:p>
          </table:table-cell>
          <table:table-cell table:formula="of:=([.F7]*[.$A$36])/1000" office:value-type="float" office:value="0.6" calcext:value-type="float">
            <text:p>0.6000000</text:p>
          </table:table-cell>
          <table:table-cell table:formula="of:=([.G7]*[.$A$36])/1000" office:value-type="float" office:value="1.2" calcext:value-type="float">
            <text:p>1.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36]/1000)" office:value-type="float" office:value="0.0263714285714286" calcext:value-type="float">
            <text:p>0.0263714</text:p>
          </table:table-cell>
          <table:table-cell table:formula="of:=([.E8]*[.$A$36])/1000" office:value-type="float" office:value="2.63714285714286" calcext:value-type="float">
            <text:p>2.6371429</text:p>
          </table:table-cell>
          <table:table-cell table:formula="of:=([.F8]*[.$A$36])/1000" office:value-type="float" office:value="26.3714285714286" calcext:value-type="float">
            <text:p>26.3714286</text:p>
          </table:table-cell>
          <table:table-cell table:formula="of:=([.G8]*[.$A$36])/1000" office:value-type="float" office:value="52.7428571428571" calcext:value-type="float">
            <text:p>52.7428571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44]*100" office:value-type="float" office:value="1000" calcext:value-type="float">
            <text:p>1000</text:p>
          </table:table-cell>
          <table:table-cell table:style-name="ce404" table:formula="of:=[.D44]*10" office:value-type="float" office:value="10" calcext:value-type="float">
            <text:p>10</text:p>
          </table:table-cell>
          <table:table-cell table:style-name="ce404" table:formula="of:=1*([.A36]/1000)" office:value-type="float" office:value="1" calcext:value-type="float">
            <text:p>1</text:p>
          </table:table-cell>
          <table:table-cell table:style-name="ce404" table:formula="of:=[.D44]/2" office:value-type="float" office:value="0.5" calcext:value-type="float">
            <text:p>0.5</text:p>
          </table:table-cell>
          <table:table-cell table:number-columns-repeated="3"/>
        </table:table-row>
      </table:table>
      <table:table table:name="Alcalinidade-AGV" table:style-name="ta1">
        <table:table-column table:style-name="co27" table:default-cell-style-name="ce413"/>
        <table:table-column table:style-name="co28" table:default-cell-style-name="ce419"/>
        <table:table-column table:style-name="co29" table:default-cell-style-name="ce97"/>
        <table:table-column table:style-name="co11" table:default-cell-style-name="ce97"/>
        <table:table-column table:style-name="co30" table:default-cell-style-name="ce116"/>
        <table:table-column table:style-name="co31" table:default-cell-style-name="ce97"/>
        <table:table-column table:style-name="co1" table:default-cell-style-name="ce95"/>
        <table:table-column table:style-name="co32" table:default-cell-style-name="ce95"/>
        <table:table-column table:style-name="co33" table:default-cell-style-name="ce115"/>
        <table:table-column table:style-name="co28" table:default-cell-style-name="ce95"/>
        <table:table-column table:style-name="co9" table:default-cell-style-name="ce115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Dados</text:p>
          </table:table-cell>
          <table:covered-table-cell table:style-name="ce56"/>
          <table:table-cell table:style-name="ce96" office:value-type="string" calcext:value-type="string" table:number-columns-spanned="4" table:number-rows-spanned="1">
            <text:p>Calculo Alcalinidade</text:p>
          </table:table-cell>
          <table:covered-table-cell table:number-columns-repeated="3" table:style-name="ce96"/>
          <table:table-cell table:style-name="ce94" office:value-type="string" calcext:value-type="string" table:number-columns-spanned="5" table:number-rows-spanned="1">
            <text:p>Calculo AGV</text:p>
          </table:table-cell>
          <table:covered-table-cell table:number-columns-repeated="4" table:style-name="ce94"/>
          <table:table-cell>
            <draw:custom-shape draw:z-index="0" draw:name="CaixaDeTexto 2" draw:style-name="gr4" draw:text-style-name="P6" svg:width="4.4661in" svg:height="0.9787in" svg:x="0.1591in" svg:y="0.1256in">
              <text:p text:style-name="P5"><text:span text:style-name="T1">- Adição de acido sulfurico até atingir pH 4</text:span></text:p>
              <text:p text:style-name="P5"><text:span text:style-name="T1">- Quantidade de acido gasto representa a alcalinidade</text:span></text:p>
              <text:p text:style-name="P5"><text:span text:style-name="T1">- Adição de acido até 3,3 para remover CO2</text:span></text:p>
              <text:p text:style-name="P5"><text:span text:style-name="T1"><text:s/>- </text:span><text:span text:style-name="T2">Uso de ultra-som por 10 minutos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volume amostra (mL)</text:p>
          </table:table-cell>
          <table:table-cell table:style-name="ce96" office:value-type="string" calcext:value-type="string">
            <text:p>pH inicial</text:p>
          </table:table-cell>
          <table:table-cell table:style-name="ce96" office:value-type="string" calcext:value-type="string">
            <text:p>Volume Acido (mL)</text:p>
          </table:table-cell>
          <table:table-cell table:style-name="ce96" office:value-type="string" calcext:value-type="string">
            <text:p>Alcalinidade (mg CaCO3/L)</text:p>
          </table:table-cell>
          <table:table-cell table:style-name="ce96" office:value-type="string" calcext:value-type="string">
            <text:p>N acido</text:p>
          </table:table-cell>
          <table:table-cell table:style-name="ce94" office:value-type="string" calcext:value-type="string">
            <text:p>pH inicial</text:p>
          </table:table-cell>
          <table:table-cell table:style-name="ce94" office:value-type="string" calcext:value-type="string">
            <text:p>Volume Base (mL)</text:p>
          </table:table-cell>
          <table:table-cell table:style-name="ce429" office:value-type="string" calcext:value-type="string">
            <text:p>AGV (mg CH3COOH/L)</text:p>
          </table:table-cell>
          <table:table-cell table:style-name="ce94" office:value-type="string" calcext:value-type="string">
            <text:p>N base</text:p>
          </table:table-cell>
          <table:table-cell table:style-name="ce94" office:value-type="string" calcext:value-type="string">
            <text:p>AGV/Alcalinidade</text:p>
          </table:table-cell>
          <table:table-cell table:number-columns-repeated="4"/>
        </table:table-row>
        <table:table-row table:style-name="ro1">
          <table:table-cell table:style-name="ce592" office:value-type="string" calcext:value-type="string">
            <text:p>22/05/2026</text:p>
          </table:table-cell>
          <table:table-cell table:style-name="ce594" office:value-type="float" office:value="50" calcext:value-type="float">
            <text:p>50</text:p>
          </table:table-cell>
          <table:table-cell table:style-name="ce596" office:value-type="float" office:value="6.25" calcext:value-type="float">
            <text:p>6.25</text:p>
          </table:table-cell>
          <table:table-cell table:style-name="ce596" office:value-type="float" office:value="4.2" calcext:value-type="float">
            <text:p>4.2</text:p>
          </table:table-cell>
          <table:table-cell table:style-name="ce111" table:formula="of:=([.D3]*[.F3]*50000)/[.B3]" office:value-type="float" office:value="420" calcext:value-type="float">
            <text:p>420.0000</text:p>
          </table:table-cell>
          <table:table-cell table:style-name="ce105" office:value-type="float" office:value="0.1" calcext:value-type="float">
            <text:p>0.1</text:p>
          </table:table-cell>
          <table:table-cell table:style-name="ce426" office:value-type="float" office:value="4.05" calcext:value-type="float">
            <text:p>4.05</text:p>
          </table:table-cell>
          <table:table-cell table:style-name="ce426" office:value-type="float" office:value="3.95" calcext:value-type="float">
            <text:p>3.95</text:p>
          </table:table-cell>
          <table:table-cell table:style-name="ce109" table:formula="of:=([.H3]*[.J3]*60000)/[.B3]" office:value-type="float" office:value="474" calcext:value-type="float">
            <text:p>474.0000</text:p>
          </table:table-cell>
          <table:table-cell table:style-name="ce103" office:value-type="float" office:value="0.1" calcext:value-type="float">
            <text:p>0.1</text:p>
          </table:table-cell>
          <table:table-cell table:style-name="ce109" table:formula="of:=[.I3]/[.E3]" office:value-type="float" office:value="1.12857142857143" calcext:value-type="float">
            <text:p>1.1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05/2026</text:p>
          </table:table-cell>
          <table:table-cell office:value-type="float" office:value="50" calcext:value-type="float">
            <text:p>50</text:p>
          </table:table-cell>
          <table:table-cell table:style-name="ce422" office:value-type="float" office:value="5.78" calcext:value-type="float">
            <text:p>5.78</text:p>
          </table:table-cell>
          <table:table-cell table:style-name="ce422" office:value-type="float" office:value="10.5" calcext:value-type="float">
            <text:p>10.5</text:p>
          </table:table-cell>
          <table:table-cell table:formula="of:=([.D4]*[.F4]*50000)/[.B4]" office:value-type="float" office:value="1050" calcext:value-type="float">
            <text:p>1050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office:value-type="float" office:value="11.3" calcext:value-type="float">
            <text:p>11.3</text:p>
          </table:table-cell>
          <table:table-cell table:formula="of:=([.H4]*[.J4]*60000)/[.B4]" office:value-type="float" office:value="1356" calcext:value-type="float">
            <text:p>1356.0000</text:p>
          </table:table-cell>
          <table:table-cell office:value-type="float" office:value="0.1" calcext:value-type="float">
            <text:p>0.1</text:p>
          </table:table-cell>
          <table:table-cell table:formula="of:=[.I4]/[.E4]" office:value-type="float" office:value="1.29142857142857" calcext:value-type="float">
            <text:p>1.2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05/2026</text:p>
          </table:table-cell>
          <table:table-cell office:value-type="float" office:value="50" calcext:value-type="float">
            <text:p>50</text:p>
          </table:table-cell>
          <table:table-cell table:style-name="ce423" office:value-type="float" office:value="7.89" calcext:value-type="float">
            <text:p>7.89</text:p>
          </table:table-cell>
          <table:table-cell table:style-name="ce423" table:formula="of:=25+25+25+0.4" office:value-type="float" office:value="75.4" calcext:value-type="float">
            <text:p>75.4</text:p>
          </table:table-cell>
          <table:table-cell table:formula="of:=([.D5]*[.F5]*50000)/[.B5]" office:value-type="float" office:value="7540" calcext:value-type="float">
            <text:p>7540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office:value-type="float" office:value="21.55" calcext:value-type="float">
            <text:p>21.55</text:p>
          </table:table-cell>
          <table:table-cell table:formula="of:=([.H5]*[.J5]*60000)/[.B5]" office:value-type="float" office:value="2586" calcext:value-type="float">
            <text:p>2586.0000</text:p>
          </table:table-cell>
          <table:table-cell office:value-type="float" office:value="0.1" calcext:value-type="float">
            <text:p>0.1</text:p>
          </table:table-cell>
          <table:table-cell table:formula="of:=[.I5]/[.E5]" office:value-type="float" office:value="0.342970822281167" calcext:value-type="float">
            <text:p>0.3430</text:p>
          </table:table-cell>
          <table:table-cell table:number-columns-repeated="4"/>
        </table:table-row>
        <table:table-row table:style-name="ro1">
          <table:table-cell office:value-type="date" office:date-value="2026-01-06" calcext:value-type="date">
            <text:p>01/06/26</text:p>
          </table:table-cell>
          <table:table-cell office:value-type="float" office:value="50" calcext:value-type="float">
            <text:p>50</text:p>
          </table:table-cell>
          <table:table-cell office:value-type="float" office:value="7.65" calcext:value-type="float">
            <text:p>7.65</text:p>
          </table:table-cell>
          <table:table-cell table:formula="of:=25+25+25+6.45" office:value-type="float" office:value="81.45" calcext:value-type="float">
            <text:p>81.45</text:p>
          </table:table-cell>
          <table:table-cell table:formula="of:=([.D6]*[.F6]*50000)/[.B6]" office:value-type="float" office:value="8145" calcext:value-type="float">
            <text:p>8145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table:formula="of:=25+4.95" office:value-type="float" office:value="29.95" calcext:value-type="float">
            <text:p>29.95</text:p>
          </table:table-cell>
          <table:table-cell table:formula="of:=([.H6]*[.J6]*60000)/[.B6]" office:value-type="float" office:value="3594" calcext:value-type="float">
            <text:p>3594.0000</text:p>
          </table:table-cell>
          <table:table-cell office:value-type="float" office:value="0.1" calcext:value-type="float">
            <text:p>0.1</text:p>
          </table:table-cell>
          <table:table-cell table:formula="of:=[.I6]/[.E6]" office:value-type="float" office:value="0.441252302025783" calcext:value-type="float">
            <text:p>0.4413</text:p>
          </table:table-cell>
          <table:table-cell table:number-columns-repeated="4"/>
        </table:table-row>
        <table:table-row table:style-name="ro1">
          <table:table-cell office:value-type="date" office:date-value="2026-05-06" calcext:value-type="date">
            <text:p>05/06/26</text:p>
          </table:table-cell>
          <table:table-cell office:value-type="float" office:value="50" calcext:value-type="float">
            <text:p>50</text:p>
          </table:table-cell>
          <table:table-cell office:value-type="float" office:value="7.62" calcext:value-type="float">
            <text:p>7.62</text:p>
          </table:table-cell>
          <table:table-cell office:value-type="float" office:value="7.05" calcext:value-type="float">
            <text:p>7.05</text:p>
          </table:table-cell>
          <table:table-cell table:formula="of:=([.D7]*[.F7]*50000)/[.B7]" office:value-type="float" office:value="7050" calcext:value-type="float">
            <text:p>7050.0000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float" office:value="3.45" calcext:value-type="float">
            <text:p>3.45</text:p>
          </table:table-cell>
          <table:table-cell table:formula="of:=([.H7]*[.J7]*60000)/[.B7]" office:value-type="float" office:value="4140" calcext:value-type="float">
            <text:p>4140.0000</text:p>
          </table:table-cell>
          <table:table-cell office:value-type="float" office:value="1" calcext:value-type="float">
            <text:p>1</text:p>
          </table:table-cell>
          <table:table-cell table:formula="of:=[.I7]/[.E7]" office:value-type="float" office:value="0.587234042553191" calcext:value-type="float">
            <text:p>0.5872</text:p>
          </table:table-cell>
          <table:table-cell table:number-columns-repeated="4"/>
        </table:table-row>
        <table:table-row table:style-name="ro1">
          <table:table-cell office:value-type="date" office:date-value="2026-08-06" calcext:value-type="date">
            <text:p>08/06/26</text:p>
          </table:table-cell>
          <table:table-cell office:value-type="float" office:value="50" calcext:value-type="float">
            <text:p>50</text:p>
          </table:table-cell>
          <table:table-cell office:value-type="float" office:value="7.56" calcext:value-type="float">
            <text:p>7.56</text:p>
          </table:table-cell>
          <table:table-cell office:value-type="float" office:value="7" calcext:value-type="float">
            <text:p>7</text:p>
          </table:table-cell>
          <table:table-cell table:formula="of:=([.D8]*[.F8]*50000)/[.B8]" office:value-type="float" office:value="7000" calcext:value-type="float">
            <text:p>7000.0000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  <table:table-cell office:value-type="float" office:value="3.95" calcext:value-type="float">
            <text:p>3.95</text:p>
          </table:table-cell>
          <table:table-cell table:formula="of:=([.H8]*[.J8]*60000)/[.B8]" office:value-type="float" office:value="4740" calcext:value-type="float">
            <text:p>4740.0000</text:p>
          </table:table-cell>
          <table:table-cell office:value-type="float" office:value="1" calcext:value-type="float">
            <text:p>1</text:p>
          </table:table-cell>
          <table:table-cell table:formula="of:=[.I8]/[.E8]" office:value-type="float" office:value="0.677142857142857" calcext:value-type="float">
            <text:p>0.677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9]*[.F9]*50000)/[.B9]" office:value-type="string" office:string-value="" calcext:value-type="error">
            <text:p>#DIV/0!</text:p>
          </table:table-cell>
          <table:table-cell table:number-columns-repeated="3"/>
          <table:table-cell table:formula="of:=([.H9]*[.J9]*60000)/[.B9]" office:value-type="string" office:string-value="" calcext:value-type="error">
            <text:p>#DIV/0!</text:p>
          </table:table-cell>
          <table:table-cell/>
          <table:table-cell table:formula="of:=[.I9]/[.E9]" office:value-type="string" office:string-value="" calcext:value-type="error">
            <text:p>#DIV/0!</text:p>
          </table:table-cell>
          <table:table-cell>
            <draw:custom-shape draw:z-index="1" draw:name="CaixaDeTexto 1" draw:style-name="gr5" draw:text-style-name="P6" svg:width="4.4661in" svg:height="0.6976in" svg:x="0.187in" svg:y="0.0941in">
              <text:p text:style-name="P5"><text:span text:style-name="T1">- Adição de base até pH chegar a 4 novamente</text:span></text:p>
              <text:p text:style-name="P5"><text:span text:style-name="T1">- Adição de base até pH 7</text:span></text:p>
              <text:p text:style-name="P5"><text:span text:style-name="T1">- Quantidade de base gasta do 4 até o 7, representa AGV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D10]*[.F10]*50000)/[.B10]" office:value-type="string" office:string-value="" calcext:value-type="error">
            <text:p>#DIV/0!</text:p>
          </table:table-cell>
          <table:table-cell table:number-columns-repeated="3"/>
          <table:table-cell table:formula="of:=([.H10]*[.J10]*60000)/[.B10]" office:value-type="string" office:string-value="" calcext:value-type="error">
            <text:p>#DIV/0!</text:p>
          </table:table-cell>
          <table:table-cell/>
          <table:table-cell table:formula="of:=[.I10]/[.E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1]*[.F11]*50000)/[.B11]" office:value-type="string" office:string-value="" calcext:value-type="error">
            <text:p>#DIV/0!</text:p>
          </table:table-cell>
          <table:table-cell table:number-columns-repeated="3"/>
          <table:table-cell table:formula="of:=([.H11]*[.J11]*60000)/[.B11]" office:value-type="string" office:string-value="" calcext:value-type="error">
            <text:p>#DIV/0!</text:p>
          </table:table-cell>
          <table:table-cell/>
          <table:table-cell table:formula="of:=[.I11]/[.E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2]*[.F12]*50000)/[.B12]" office:value-type="string" office:string-value="" calcext:value-type="error">
            <text:p>#DIV/0!</text:p>
          </table:table-cell>
          <table:table-cell table:number-columns-repeated="3"/>
          <table:table-cell table:formula="of:=([.H12]*[.J12]*60000)/[.B12]" office:value-type="string" office:string-value="" calcext:value-type="error">
            <text:p>#DIV/0!</text:p>
          </table:table-cell>
          <table:table-cell/>
          <table:table-cell table:formula="of:=[.I12]/[.E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3]*[.F13]*50000)/[.B13]" office:value-type="string" office:string-value="" calcext:value-type="error">
            <text:p>#DIV/0!</text:p>
          </table:table-cell>
          <table:table-cell table:number-columns-repeated="3"/>
          <table:table-cell table:formula="of:=([.H13]*[.J13]*60000)/[.B13]" office:value-type="string" office:string-value="" calcext:value-type="error">
            <text:p>#DIV/0!</text:p>
          </table:table-cell>
          <table:table-cell/>
          <table:table-cell table:formula="of:=[.I13]/[.E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4]*[.F14]*50000)/[.B14]" office:value-type="string" office:string-value="" calcext:value-type="error">
            <text:p>#DIV/0!</text:p>
          </table:table-cell>
          <table:table-cell table:number-columns-repeated="3"/>
          <table:table-cell table:formula="of:=([.H14]*[.J14]*60000)/[.B14]" office:value-type="string" office:string-value="" calcext:value-type="error">
            <text:p>#DIV/0!</text:p>
          </table:table-cell>
          <table:table-cell/>
          <table:table-cell table:formula="of:=[.I14]/[.E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5]*[.F15]*50000)/[.B15]" office:value-type="string" office:string-value="" calcext:value-type="error">
            <text:p>#DIV/0!</text:p>
          </table:table-cell>
          <table:table-cell table:number-columns-repeated="3"/>
          <table:table-cell table:formula="of:=([.H15]*[.J15]*60000)/[.B15]" office:value-type="string" office:string-value="" calcext:value-type="error">
            <text:p>#DIV/0!</text:p>
          </table:table-cell>
          <table:table-cell/>
          <table:table-cell table:formula="of:=[.I15]/[.E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6]*[.F16]*50000)/[.B16]" office:value-type="string" office:string-value="" calcext:value-type="error">
            <text:p>#DIV/0!</text:p>
          </table:table-cell>
          <table:table-cell table:number-columns-repeated="3"/>
          <table:table-cell table:formula="of:=([.H16]*[.J16]*60000)/[.B16]" office:value-type="string" office:string-value="" calcext:value-type="error">
            <text:p>#DIV/0!</text:p>
          </table:table-cell>
          <table:table-cell/>
          <table:table-cell table:formula="of:=[.I16]/[.E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7]*[.F17]*50000)/[.B17]" office:value-type="string" office:string-value="" calcext:value-type="error">
            <text:p>#DIV/0!</text:p>
          </table:table-cell>
          <table:table-cell table:number-columns-repeated="3"/>
          <table:table-cell table:formula="of:=([.H17]*[.J17]*60000)/[.B17]" office:value-type="string" office:string-value="" calcext:value-type="error">
            <text:p>#DIV/0!</text:p>
          </table:table-cell>
          <table:table-cell/>
          <table:table-cell table:formula="of:=[.I17]/[.E1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8]*[.F18]*50000)/[.B18]" office:value-type="string" office:string-value="" calcext:value-type="error">
            <text:p>#DIV/0!</text:p>
          </table:table-cell>
          <table:table-cell table:number-columns-repeated="3"/>
          <table:table-cell table:formula="of:=([.H18]*[.J18]*60000)/[.B18]" office:value-type="string" office:string-value="" calcext:value-type="error">
            <text:p>#DIV/0!</text:p>
          </table:table-cell>
          <table:table-cell/>
          <table:table-cell table:formula="of:=[.I18]/[.E18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Production" table:style-name="ta1">
        <table:shapes>
          <draw:frame draw:z-index="0" draw:style-name="gr6" draw:text-style-name="P7" svg:width="6.2988in" svg:height="3.5429in" svg:x="12.135in" svg:y="0in">
            <draw:object draw:notify-on-update-of-ranges="Production.A3:Production.A21 Production.B2:Production.B2 Production.B3:Production.B21 Production.C2:Production.C2 Production.C3:Production.C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6" draw:text-style-name="P7" svg:width="6.2988in" svg:height="3.5429in" svg:x="12.1244in" svg:y="3.522in">
            <draw:object draw:notify-on-update-of-ranges="Production.E3:Production.E433 Production.F2:Production.F2 Production.F3:Production.F433 Production.G2:Production.G2 Production.G3:Production.G4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6" draw:text-style-name="P7" svg:width="6.2988in" svg:height="3.5429in" svg:x="12.1378in" svg:y="7.0677in">
            <draw:object draw:notify-on-update-of-ranges="Production.I3:Production.I1721 Production.J2:Production.J2 Production.J3:Production.J1721 Production.K2:Production.K2 Production.K3:Production.K17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d)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h)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h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.1" calcext:value-type="float">
            <text:p>1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8" calcext:value-type="float">
            <text:p>29.8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8" calcext:value-type="float">
            <text:p>55.8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.6" calcext:value-type="float">
            <text:p>124.6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.1" calcext:value-type="float">
            <text:p>149.1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.4" calcext:value-type="float">
            <text:p>217.4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7.9" calcext:value-type="float">
            <text:p>267.9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5.8" calcext:value-type="float">
            <text:p>305.8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.2" calcext:value-type="float">
            <text:p>350.2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3.7" calcext:value-type="float">
            <text:p>393.7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0.7" calcext:value-type="float">
            <text:p>430.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.4" calcext:value-type="float">
            <text:p>478.4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2.9" calcext:value-type="float">
            <text:p>522.9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5" calcext:value-type="float">
            <text:p>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7.75" calcext:value-type="float">
            <text:p>1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25" calcext:value-type="float">
            <text:p>1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75" calcext:value-type="float">
            <text:p>1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25" calcext:value-type="float">
            <text:p>2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75" calcext:value-type="float">
            <text:p>2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25" calcext:value-type="float">
            <text:p>2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5" calcext:value-type="float">
            <text:p>2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75" calcext:value-type="float">
            <text:p>2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25" calcext:value-type="float">
            <text:p>2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75" calcext:value-type="float">
            <text:p>2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3.25" calcext:value-type="float">
            <text:p>2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3.75" calcext:value-type="float">
            <text:p>2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9.1" calcext:value-type="float">
            <text:p>9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25" calcext:value-type="float">
            <text:p>2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75" calcext:value-type="float">
            <text:p>2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25" calcext:value-type="float">
            <text:p>2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75" calcext:value-type="float">
            <text:p>2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75" calcext:value-type="float">
            <text:p>2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25" calcext:value-type="float">
            <text:p>2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75" calcext:value-type="float">
            <text:p>2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25" calcext:value-type="float">
            <text:p>2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75" calcext:value-type="float">
            <text:p>2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.25" calcext:value-type="float">
            <text:p>2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.5" calcext:value-type="float">
            <text:p>2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9.75" calcext:value-type="float">
            <text:p>2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5.3" calcext:value-type="float">
            <text:p>15.3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30.25" calcext:value-type="float">
            <text:p>3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6.9" calcext:value-type="float">
            <text:p>16.9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.75" calcext:value-type="float">
            <text:p>3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75" calcext:value-type="float">
            <text:p>3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25" calcext:value-type="float">
            <text:p>3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75" calcext:value-type="float">
            <text:p>3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25" calcext:value-type="float">
            <text:p>3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75" calcext:value-type="float">
            <text:p>3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25" calcext:value-type="float">
            <text:p>3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75" calcext:value-type="float">
            <text:p>3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5.25" calcext:value-type="float">
            <text:p>3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24.7" calcext:value-type="float">
            <text:p>24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5.5" calcext:value-type="float">
            <text:p>3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27.2" calcext:value-type="float">
            <text:p>27.2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.75" calcext:value-type="float">
            <text:p>3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32.8" calcext:value-type="float">
            <text:p>32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.25" calcext:value-type="float">
            <text:p>3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34.3" calcext:value-type="float">
            <text:p>34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6.5" calcext:value-type="float">
            <text:p>3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6.75" calcext:value-type="float">
            <text:p>3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75" calcext:value-type="float">
            <text:p>3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25" calcext:value-type="float">
            <text:p>3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75" calcext:value-type="float">
            <text:p>3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25" calcext:value-type="float">
            <text:p>3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75" calcext:value-type="float">
            <text:p>3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25" calcext:value-type="float">
            <text:p>4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75" calcext:value-type="float">
            <text:p>4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38.9" calcext:value-type="float">
            <text:p>38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41.25" calcext:value-type="float">
            <text:p>4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49.5" calcext:value-type="float">
            <text:p>49.5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41.5" calcext:value-type="float">
            <text:p>4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1.75" calcext:value-type="float">
            <text:p>4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55.8" calcext:value-type="float">
            <text:p>55.8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56.2" calcext:value-type="float">
            <text:p>56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2.25" calcext:value-type="float">
            <text:p>4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2.5" calcext:value-type="float">
            <text:p>4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56.9" calcext:value-type="float">
            <text:p>56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2.75" calcext:value-type="float">
            <text:p>4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57.2" calcext:value-type="float">
            <text:p>57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25" calcext:value-type="float">
            <text:p>4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57.9" calcext:value-type="float">
            <text:p>57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5" calcext:value-type="float">
            <text:p>4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58.2" calcext:value-type="float">
            <text:p>58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75" calcext:value-type="float">
            <text:p>4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25" calcext:value-type="float">
            <text:p>4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59.2" calcext:value-type="float">
            <text:p>59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59.5" calcext:value-type="float">
            <text:p>59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75" calcext:value-type="float">
            <text:p>4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60.2" calcext:value-type="float">
            <text:p>60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.25" calcext:value-type="float">
            <text:p>4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60.5" calcext:value-type="float">
            <text:p>60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.75" calcext:value-type="float">
            <text:p>4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61.7" calcext:value-type="float">
            <text:p>61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62.4" calcext:value-type="float">
            <text:p>62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25" calcext:value-type="float">
            <text:p>4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63.2" calcext:value-type="float">
            <text:p>63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5" calcext:value-type="float">
            <text:p>4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75" calcext:value-type="float">
            <text:p>4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64.6" calcext:value-type="float">
            <text:p>64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65.3" calcext:value-type="float">
            <text:p>65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74.1" calcext:value-type="float">
            <text:p>74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116.8" calcext:value-type="float">
            <text:p>116.8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47.75" calcext:value-type="float">
            <text:p>4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124.6" calcext:value-type="float">
            <text:p>124.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128.6" calcext:value-type="float">
            <text:p>128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.25" calcext:value-type="float">
            <text:p>4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8.5" calcext:value-type="float">
            <text:p>4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129.2" calcext:value-type="float">
            <text:p>129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8.75" calcext:value-type="float">
            <text:p>4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129.5" calcext:value-type="float">
            <text:p>129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25" calcext:value-type="float">
            <text:p>4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5" calcext:value-type="float">
            <text:p>4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75" calcext:value-type="float">
            <text:p>4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130.9" calcext:value-type="float">
            <text:p>130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25" calcext:value-type="float">
            <text:p>5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131.2" calcext:value-type="float">
            <text:p>131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75" calcext:value-type="float">
            <text:p>5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25" calcext:value-type="float">
            <text:p>5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5" calcext:value-type="float">
            <text:p>5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132.6" calcext:value-type="float">
            <text:p>132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75" calcext:value-type="float">
            <text:p>5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132.9" calcext:value-type="float">
            <text:p>132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25" calcext:value-type="float">
            <text:p>5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75" calcext:value-type="float">
            <text:p>5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134.3" calcext:value-type="float">
            <text:p>134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3.25" calcext:value-type="float">
            <text:p>5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136.7" calcext:value-type="float">
            <text:p>136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3.5" calcext:value-type="float">
            <text:p>5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143.7" calcext:value-type="float">
            <text:p>143.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.75" calcext:value-type="float">
            <text:p>5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149.1" calcext:value-type="float">
            <text:p>14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153.8" calcext:value-type="float">
            <text:p>153.8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54.25" calcext:value-type="float">
            <text:p>5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157.3" calcext:value-type="float">
            <text:p>157.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4.5" calcext:value-type="float">
            <text:p>5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160.5" calcext:value-type="float">
            <text:p>160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54.75" calcext:value-type="float">
            <text:p>5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63.1" calcext:value-type="float">
            <text:p>163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165.7" calcext:value-type="float">
            <text:p>165.7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55.25" calcext:value-type="float">
            <text:p>5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167.5" calcext:value-type="float">
            <text:p>167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169.4" calcext:value-type="float">
            <text:p>169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5.75" calcext:value-type="float">
            <text:p>5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171.2" calcext:value-type="float">
            <text:p>171.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172.4" calcext:value-type="float">
            <text:p>172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173.1" calcext:value-type="float">
            <text:p>173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173.9" calcext:value-type="float">
            <text:p>173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6.75" calcext:value-type="float">
            <text:p>5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174.6" calcext:value-type="float">
            <text:p>174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175.4" calcext:value-type="float">
            <text:p>175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25" calcext:value-type="float">
            <text:p>5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76.1" calcext:value-type="float">
            <text:p>176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5" calcext:value-type="float">
            <text:p>5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176.9" calcext:value-type="float">
            <text:p>176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75" calcext:value-type="float">
            <text:p>5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177.6" calcext:value-type="float">
            <text:p>177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178.4" calcext:value-type="float">
            <text:p>178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58.25" calcext:value-type="float">
            <text:p>5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179.8" calcext:value-type="float">
            <text:p>179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181.3" calcext:value-type="float">
            <text:p>18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8.75" calcext:value-type="float">
            <text:p>5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182.8" calcext:value-type="float">
            <text:p>182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184.3" calcext:value-type="float">
            <text:p>184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9.25" calcext:value-type="float">
            <text:p>5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198.3" calcext:value-type="float">
            <text:p>198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9.5" calcext:value-type="float">
            <text:p>5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207.8" calcext:value-type="float">
            <text:p>207.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9.75" calcext:value-type="float">
            <text:p>5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17.4" calcext:value-type="float">
            <text:p>217.4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22.8" calcext:value-type="float">
            <text:p>222.8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0.25" calcext:value-type="float">
            <text:p>6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226.8" calcext:value-type="float">
            <text:p>226.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230.2" calcext:value-type="float">
            <text:p>230.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60.75" calcext:value-type="float">
            <text:p>6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232.8" calcext:value-type="float">
            <text:p>23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1.25" calcext:value-type="float">
            <text:p>6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37.3" calcext:value-type="float">
            <text:p>237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1.5" calcext:value-type="float">
            <text:p>6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238.7" calcext:value-type="float">
            <text:p>238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61.75" calcext:value-type="float">
            <text:p>6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239.6" calcext:value-type="float">
            <text:p>23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240.6" calcext:value-type="float">
            <text:p>24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25" calcext:value-type="float">
            <text:p>6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241.6" calcext:value-type="float">
            <text:p>241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242.5" calcext:value-type="float">
            <text:p>24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75" calcext:value-type="float">
            <text:p>6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243.5" calcext:value-type="float">
            <text:p>243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244.4" calcext:value-type="float">
            <text:p>244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.25" calcext:value-type="float">
            <text:p>6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245.4" calcext:value-type="float">
            <text:p>245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46.2" calcext:value-type="float">
            <text:p>246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3.75" calcext:value-type="float">
            <text:p>6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47.1" calcext:value-type="float">
            <text:p>24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247.9" calcext:value-type="float">
            <text:p>247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25" calcext:value-type="float">
            <text:p>6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248.8" calcext:value-type="float">
            <text:p>248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249.6" calcext:value-type="float">
            <text:p>249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75" calcext:value-type="float">
            <text:p>6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251.4" calcext:value-type="float">
            <text:p>251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5.25" calcext:value-type="float">
            <text:p>6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256.9" calcext:value-type="float">
            <text:p>256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265.6" calcext:value-type="float">
            <text:p>265.6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65.75" calcext:value-type="float">
            <text:p>6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267.9" calcext:value-type="float">
            <text:p>267.9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270.2" calcext:value-type="float">
            <text:p>270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6.25" calcext:value-type="float">
            <text:p>6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272.4" calcext:value-type="float">
            <text:p>272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6.5" calcext:value-type="float">
            <text:p>6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272.9" calcext:value-type="float">
            <text:p>272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6.75" calcext:value-type="float">
            <text:p>6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273.4" calcext:value-type="float">
            <text:p>273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73.9" calcext:value-type="float">
            <text:p>273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25" calcext:value-type="float">
            <text:p>6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4.4" calcext:value-type="float">
            <text:p>274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274.9" calcext:value-type="float">
            <text:p>274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75" calcext:value-type="float">
            <text:p>6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275.4" calcext:value-type="float">
            <text:p>275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275.9" calcext:value-type="float">
            <text:p>275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25" calcext:value-type="float">
            <text:p>6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float" office:value="276.4" calcext:value-type="float">
            <text:p>276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5" calcext:value-type="float">
            <text:p>6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float" office:value="276.9" calcext:value-type="float">
            <text:p>276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277.5" calcext:value-type="float">
            <text:p>277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25" calcext:value-type="float">
            <text:p>6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278.5" calcext:value-type="float">
            <text:p>278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79" calcext:value-type="float">
            <text:p>27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75" calcext:value-type="float">
            <text:p>69.7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79.7" calcext:value-type="float">
            <text:p>279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25" calcext:value-type="float">
            <text:p>70.2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282.1" calcext:value-type="float">
            <text:p>282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float" office:value="283.4" calcext:value-type="float">
            <text:p>28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75" calcext:value-type="float">
            <text:p>70.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284.6" calcext:value-type="float">
            <text:p>28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285.8" calcext:value-type="float">
            <text:p>285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1.25" calcext:value-type="float">
            <text:p>71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96.4" calcext:value-type="float">
            <text:p>296.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301.4" calcext:value-type="float">
            <text:p>301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71.75" calcext:value-type="float">
            <text:p>71.7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305.8" calcext:value-type="float">
            <text:p>305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float" office:value="308.3" calcext:value-type="float">
            <text:p>308.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2.25" calcext:value-type="float">
            <text:p>72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09.7" calcext:value-type="float">
            <text:p>309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311.1" calcext:value-type="float">
            <text:p>31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2.75" calcext:value-type="float">
            <text:p>72.7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313.9" calcext:value-type="float">
            <text:p>313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3.25" calcext:value-type="float">
            <text:p>73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float" office:value="314.9" calcext:value-type="float">
            <text:p>314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float" office:value="315.6" calcext:value-type="float">
            <text:p>315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3.75" calcext:value-type="float">
            <text:p>73.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float" office:value="316.3" calcext:value-type="float">
            <text:p>31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25" calcext:value-type="float">
            <text:p>74.2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317.7" calcext:value-type="float">
            <text:p>317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float" office:value="318.4" calcext:value-type="float">
            <text:p>318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75" calcext:value-type="float">
            <text:p>74.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19.1" calcext:value-type="float">
            <text:p>319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319.8" calcext:value-type="float">
            <text:p>319.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25" calcext:value-type="float">
            <text:p>75.2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320.5" calcext:value-type="float">
            <text:p>320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321.2" calcext:value-type="float">
            <text:p>32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75" calcext:value-type="float">
            <text:p>75.7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322.2" calcext:value-type="float">
            <text:p>322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323.4" calcext:value-type="float">
            <text:p>32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25" calcext:value-type="float">
            <text:p>76.2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324.6" calcext:value-type="float">
            <text:p>32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325.7" calcext:value-type="float">
            <text:p>325.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75" calcext:value-type="float">
            <text:p>76.7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326.9" calcext:value-type="float">
            <text:p>326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328.1" calcext:value-type="float">
            <text:p>328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7.25" calcext:value-type="float">
            <text:p>77.2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340.5" calcext:value-type="float">
            <text:p>340.5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346.1" calcext:value-type="float">
            <text:p>346.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77.75" calcext:value-type="float">
            <text:p>77.7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350.2" calcext:value-type="float">
            <text:p>350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352" calcext:value-type="float">
            <text:p>35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25" calcext:value-type="float">
            <text:p>78.2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353.9" calcext:value-type="float">
            <text:p>353.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355.7" calcext:value-type="float">
            <text:p>355.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357.3" calcext:value-type="float">
            <text:p>357.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358.2" calcext:value-type="float">
            <text:p>358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25" calcext:value-type="float">
            <text:p>79.2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359.1" calcext:value-type="float">
            <text:p>359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75" calcext:value-type="float">
            <text:p>79.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360.9" calcext:value-type="float">
            <text:p>360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361.8" calcext:value-type="float">
            <text:p>361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25" calcext:value-type="float">
            <text:p>80.2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362.7" calcext:value-type="float">
            <text:p>362.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363.6" calcext:value-type="float">
            <text:p>363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75" calcext:value-type="float">
            <text:p>80.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364.5" calcext:value-type="float">
            <text:p>364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65.6" calcext:value-type="float">
            <text:p>365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25" calcext:value-type="float">
            <text:p>81.2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366.7" calcext:value-type="float">
            <text:p>366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367.9" calcext:value-type="float">
            <text:p>367.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75" calcext:value-type="float">
            <text:p>81.7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370.1" calcext:value-type="float">
            <text:p>370.1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.25" calcext:value-type="float">
            <text:p>82.2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371.2" calcext:value-type="float">
            <text:p>371.2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373.2" calcext:value-type="float">
            <text:p>373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75" calcext:value-type="float">
            <text:p>82.7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375.5" calcext:value-type="float">
            <text:p>375.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77.8" calcext:value-type="float">
            <text:p>377.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3.25" calcext:value-type="float">
            <text:p>83.2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389.8" calcext:value-type="float">
            <text:p>389.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93.3" calcext:value-type="float">
            <text:p>393.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83.75" calcext:value-type="float">
            <text:p>83.7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393.7" calcext:value-type="float">
            <text:p>393.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25" calcext:value-type="float">
            <text:p>84.2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394.4" calcext:value-type="float">
            <text:p>394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394.8" calcext:value-type="float">
            <text:p>394.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75" calcext:value-type="float">
            <text:p>84.7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95.2" calcext:value-type="float">
            <text:p>395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395.5" calcext:value-type="float">
            <text:p>395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25" calcext:value-type="float">
            <text:p>85.2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395.9" calcext:value-type="float">
            <text:p>395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396.3" calcext:value-type="float">
            <text:p>396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75" calcext:value-type="float">
            <text:p>85.7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397.4" calcext:value-type="float">
            <text:p>397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397.8" calcext:value-type="float">
            <text:p>397.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75" calcext:value-type="float">
            <text:p>86.7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398.1" calcext:value-type="float">
            <text:p>398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398.5" calcext:value-type="float">
            <text:p>398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25" calcext:value-type="float">
            <text:p>87.2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398.9" calcext:value-type="float">
            <text:p>398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75" calcext:value-type="float">
            <text:p>87.7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399.6" calcext:value-type="float">
            <text:p>399.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.25" calcext:value-type="float">
            <text:p>88.2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400.4" calcext:value-type="float">
            <text:p>40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402.6" calcext:value-type="float">
            <text:p>402.6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8.75" calcext:value-type="float">
            <text:p>88.7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404.7" calcext:value-type="float">
            <text:p>404.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406.8" calcext:value-type="float">
            <text:p>406.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9.25" calcext:value-type="float">
            <text:p>89.2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420.1" calcext:value-type="float">
            <text:p>420.1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426.9" calcext:value-type="float">
            <text:p>426.9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89.75" calcext:value-type="float">
            <text:p>89.7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30.7" calcext:value-type="float">
            <text:p>430.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432.8" calcext:value-type="float">
            <text:p>432.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90.25" calcext:value-type="float">
            <text:p>90.2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434.9" calcext:value-type="float">
            <text:p>434.9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436.9" calcext:value-type="float">
            <text:p>436.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.75" calcext:value-type="float">
            <text:p>90.7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438.1" calcext:value-type="float">
            <text:p>438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439.4" calcext:value-type="float">
            <text:p>439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25" calcext:value-type="float">
            <text:p>91.25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440.6" calcext:value-type="float">
            <text:p>440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441.8" calcext:value-type="float">
            <text:p>441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75" calcext:value-type="float">
            <text:p>91.75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444.2" calcext:value-type="float">
            <text:p>444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2.25" calcext:value-type="float">
            <text:p>92.25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445.3" calcext:value-type="float">
            <text:p>445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446.4" calcext:value-type="float">
            <text:p>446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2.75" calcext:value-type="float">
            <text:p>92.7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447.6" calcext:value-type="float">
            <text:p>447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448.7" calcext:value-type="float">
            <text:p>448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25" calcext:value-type="float">
            <text:p>93.25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449.8" calcext:value-type="float">
            <text:p>449.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5.1" calcext:value-type="float">
            <text:p>5.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450.9" calcext:value-type="float">
            <text:p>450.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75" calcext:value-type="float">
            <text:p>93.75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452.1" calcext:value-type="float">
            <text:p>452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6" calcext:value-type="float">
            <text:p>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453.5" calcext:value-type="float">
            <text:p>453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25" calcext:value-type="float">
            <text:p>94.25</text:p>
          </table:table-cell>
          <table:table-cell office:value-type="float" office:value="5.9" calcext:value-type="float">
            <text:p>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454.9" calcext:value-type="float">
            <text:p>454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456.3" calcext:value-type="float">
            <text:p>456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75" calcext:value-type="float">
            <text:p>94.75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457.7" calcext:value-type="float">
            <text:p>457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461.2" calcext:value-type="float">
            <text:p>46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5.25" calcext:value-type="float">
            <text:p>95.25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471.3" calcext:value-type="float">
            <text:p>471.3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475.6" calcext:value-type="float">
            <text:p>475.6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5.75" calcext:value-type="float">
            <text:p>95.7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478.4" calcext:value-type="float">
            <text:p>478.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6.25" calcext:value-type="float">
            <text:p>96.2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482.2" calcext:value-type="float">
            <text:p>482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483.4" calcext:value-type="float">
            <text:p>48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6.75" calcext:value-type="float">
            <text:p>96.7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484.6" calcext:value-type="float">
            <text:p>48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485.8" calcext:value-type="float">
            <text:p>485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25" calcext:value-type="float">
            <text:p>97.2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87" calcext:value-type="float">
            <text:p>48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488.2" calcext:value-type="float">
            <text:p>488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75" calcext:value-type="float">
            <text:p>97.7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489.3" calcext:value-type="float">
            <text:p>489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490.3" calcext:value-type="float">
            <text:p>490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25" calcext:value-type="float">
            <text:p>98.2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491.4" calcext:value-type="float">
            <text:p>491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492.5" calcext:value-type="float">
            <text:p>492.5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75" calcext:value-type="float">
            <text:p>98.7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493.6" calcext:value-type="float">
            <text:p>493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494.7" calcext:value-type="float">
            <text:p>494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.25" calcext:value-type="float">
            <text:p>99.2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495.8" calcext:value-type="float">
            <text:p>495.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9.75" calcext:value-type="float">
            <text:p>99.7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498.3" calcext:value-type="float">
            <text:p>498.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499.5" calcext:value-type="float">
            <text:p>499.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25" calcext:value-type="float">
            <text:p>100.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500.7" calcext:value-type="float">
            <text:p>500.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5" calcext:value-type="float">
            <text:p>100.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float" office:value="502" calcext:value-type="float">
            <text:p>50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75" calcext:value-type="float">
            <text:p>100.7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508.5" calcext:value-type="float">
            <text:p>508.5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01.25" calcext:value-type="float">
            <text:p>101.2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518" calcext:value-type="float">
            <text:p>518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1.5" calcext:value-type="float">
            <text:p>101.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520.4" calcext:value-type="float">
            <text:p>520.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1.75" calcext:value-type="float">
            <text:p>101.7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522.9" calcext:value-type="float">
            <text:p>522.9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525.3" calcext:value-type="float">
            <text:p>525.3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02.25" calcext:value-type="float">
            <text:p>102.2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526.8" calcext:value-type="float">
            <text:p>526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2.5" calcext:value-type="float">
            <text:p>102.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528.3" calcext:value-type="float">
            <text:p>528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2.75" calcext:value-type="float">
            <text:p>102.7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office:value-type="float" office:value="529.8" calcext:value-type="float">
            <text:p>529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531.3" calcext:value-type="float">
            <text:p>53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3.25" calcext:value-type="float">
            <text:p>103.2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532.7" calcext:value-type="float">
            <text:p>532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533.6" calcext:value-type="float">
            <text:p>533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3.75" calcext:value-type="float">
            <text:p>103.7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office:value-type="float" office:value="534.5" calcext:value-type="float">
            <text:p>534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535.4" calcext:value-type="float">
            <text:p>535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25" calcext:value-type="float">
            <text:p>104.2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536.4" calcext:value-type="float">
            <text:p>536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5" calcext:value-type="float">
            <text:p>104.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office:value-type="float" office:value="537.3" calcext:value-type="float">
            <text:p>537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75" calcext:value-type="float">
            <text:p>104.7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538.2" calcext:value-type="float">
            <text:p>538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539.1" calcext:value-type="float">
            <text:p>539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.25" calcext:value-type="float">
            <text:p>105.2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office:value-type="float" office:value="540.1" calcext:value-type="float">
            <text:p>540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541.5" calcext:value-type="float">
            <text:p>541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5.75" calcext:value-type="float">
            <text:p>105.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office:value-type="float" office:value="542.9" calcext:value-type="float">
            <text:p>542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544.3" calcext:value-type="float">
            <text:p>544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25" calcext:value-type="float">
            <text:p>106.2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office:value-type="float" office:value="545.7" calcext:value-type="float">
            <text:p>545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547.1" calcext:value-type="float">
            <text:p>547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75" calcext:value-type="float">
            <text:p>106.7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550" calcext:value-type="float">
            <text:p>55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553.6" calcext:value-type="float">
            <text:p>553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7.25" calcext:value-type="float">
            <text:p>107.2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555" calcext:value-type="float">
            <text:p>55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7.5" calcext:value-type="float">
            <text:p>107.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7.75" calcext:value-type="float">
            <text:p>107.7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25" calcext:value-type="float">
            <text:p>108.2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5" calcext:value-type="float">
            <text:p>108.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75" calcext:value-type="float">
            <text:p>108.7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25" calcext:value-type="float">
            <text:p>109.2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5" calcext:value-type="float">
            <text:p>109.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75" calcext:value-type="float">
            <text:p>109.7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25" calcext:value-type="float">
            <text:p>110.2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5" calcext:value-type="float">
            <text:p>110.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75" calcext:value-type="float">
            <text:p>110.7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25" calcext:value-type="float">
            <text:p>111.2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5" calcext:value-type="float">
            <text:p>111.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75" calcext:value-type="float">
            <text:p>111.7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25" calcext:value-type="float">
            <text:p>112.25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5" calcext:value-type="float">
            <text:p>112.5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75" calcext:value-type="float">
            <text:p>112.7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25" calcext:value-type="float">
            <text:p>113.2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5" calcext:value-type="float">
            <text:p>113.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75" calcext:value-type="float">
            <text:p>113.7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25" calcext:value-type="float">
            <text:p>114.2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5" calcext:value-type="float">
            <text:p>114.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75" calcext:value-type="float">
            <text:p>114.7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25" calcext:value-type="float">
            <text:p>115.2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5" calcext:value-type="float">
            <text:p>115.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75" calcext:value-type="float">
            <text:p>115.7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25" calcext:value-type="float">
            <text:p>116.2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5" calcext:value-type="float">
            <text:p>116.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75" calcext:value-type="float">
            <text:p>116.7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25" calcext:value-type="float">
            <text:p>117.2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5" calcext:value-type="float">
            <text:p>117.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75" calcext:value-type="float">
            <text:p>117.7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25" calcext:value-type="float">
            <text:p>118.2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5" calcext:value-type="float">
            <text:p>118.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75" calcext:value-type="float">
            <text:p>118.75</text:p>
          </table:table-cell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119.25" calcext:value-type="float">
            <text:p>119.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19.5" calcext:value-type="float">
            <text:p>119.5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19.75" calcext:value-type="float">
            <text:p>119.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.25" calcext:value-type="float">
            <text:p>120.25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.5" calcext:value-type="float">
            <text:p>120.5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0.75" calcext:value-type="float">
            <text:p>120.75</text:p>
          </table:table-cell>
          <table:table-cell office:value-type="float" office:value="14.8" calcext:value-type="float">
            <text:p>14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5.3" calcext:value-type="float">
            <text:p>15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25" calcext:value-type="float">
            <text:p>121.25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5" calcext:value-type="float">
            <text:p>121.5</text:p>
          </table:table-cell>
          <table:table-cell office:value-type="float" office:value="16.2" calcext:value-type="float">
            <text:p>16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75" calcext:value-type="float">
            <text:p>121.75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16.9" calcext:value-type="float">
            <text:p>16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122.25" calcext:value-type="float">
            <text:p>122.25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2.5" calcext:value-type="float">
            <text:p>122.5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2.75" calcext:value-type="float">
            <text:p>122.7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25" calcext:value-type="float">
            <text:p>123.2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5" calcext:value-type="float">
            <text:p>123.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75" calcext:value-type="float">
            <text:p>123.7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25" calcext:value-type="float">
            <text:p>124.25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5" calcext:value-type="float">
            <text:p>124.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75" calcext:value-type="float">
            <text:p>124.7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25" calcext:value-type="float">
            <text:p>125.25</text:p>
          </table:table-cell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5" calcext:value-type="float">
            <text:p>125.5</text:p>
          </table:table-cell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75" calcext:value-type="float">
            <text:p>125.75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25" calcext:value-type="float">
            <text:p>126.25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5" calcext:value-type="float">
            <text:p>126.5</text:p>
          </table:table-cell>
          <table:table-cell office:value-type="float" office:value="17.6" calcext:value-type="float">
            <text:p>1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75" calcext:value-type="float">
            <text:p>126.75</text:p>
          </table:table-cell>
          <table:table-cell office:value-type="float" office:value="17.6" calcext:value-type="float">
            <text:p>1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25" calcext:value-type="float">
            <text:p>127.25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5" calcext:value-type="float">
            <text:p>127.5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75" calcext:value-type="float">
            <text:p>127.75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25" calcext:value-type="float">
            <text:p>128.25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5" calcext:value-type="float">
            <text:p>128.5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75" calcext:value-type="float">
            <text:p>128.75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25" calcext:value-type="float">
            <text:p>129.25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5" calcext:value-type="float">
            <text:p>129.5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75" calcext:value-type="float">
            <text:p>129.75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25" calcext:value-type="float">
            <text:p>130.2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5" calcext:value-type="float">
            <text:p>130.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75" calcext:value-type="float">
            <text:p>130.7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25" calcext:value-type="float">
            <text:p>131.25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5" calcext:value-type="float">
            <text:p>131.5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75" calcext:value-type="float">
            <text:p>131.75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25" calcext:value-type="float">
            <text:p>132.25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5" calcext:value-type="float">
            <text:p>132.5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75" calcext:value-type="float">
            <text:p>132.75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25" calcext:value-type="float">
            <text:p>133.25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5" calcext:value-type="float">
            <text:p>133.5</text:p>
          </table:table-cell>
          <table:table-cell office:value-type="float" office:value="18.7" calcext:value-type="float">
            <text:p>1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75" calcext:value-type="float">
            <text:p>133.75</text:p>
          </table:table-cell>
          <table:table-cell office:value-type="float" office:value="18.7" calcext:value-type="float">
            <text:p>1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25" calcext:value-type="float">
            <text:p>134.25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5" calcext:value-type="float">
            <text:p>134.5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75" calcext:value-type="float">
            <text:p>134.7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25" calcext:value-type="float">
            <text:p>135.2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5" calcext:value-type="float">
            <text:p>135.5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75" calcext:value-type="float">
            <text:p>135.75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25" calcext:value-type="float">
            <text:p>136.25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5" calcext:value-type="float">
            <text:p>136.5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75" calcext:value-type="float">
            <text:p>136.75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25" calcext:value-type="float">
            <text:p>137.2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5" calcext:value-type="float">
            <text:p>137.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75" calcext:value-type="float">
            <text:p>137.7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25" calcext:value-type="float">
            <text:p>138.25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5" calcext:value-type="float">
            <text:p>138.5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75" calcext:value-type="float">
            <text:p>138.75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25" calcext:value-type="float">
            <text:p>139.25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5" calcext:value-type="float">
            <text:p>139.5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75" calcext:value-type="float">
            <text:p>139.75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25" calcext:value-type="float">
            <text:p>140.25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5" calcext:value-type="float">
            <text:p>140.5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75" calcext:value-type="float">
            <text:p>140.75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.25" calcext:value-type="float">
            <text:p>141.25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.5" calcext:value-type="float">
            <text:p>141.5</text:p>
          </table:table-cell>
          <table:table-cell office:value-type="float" office:value="23.4" calcext:value-type="float">
            <text:p>23.4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8"/>
          <table:table-cell office:value-type="float" office:value="141.75" calcext:value-type="float">
            <text:p>141.75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24.7" calcext:value-type="float">
            <text:p>24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25" calcext:value-type="float">
            <text:p>142.25</text:p>
          </table:table-cell>
          <table:table-cell office:value-type="float" office:value="25.3" calcext:value-type="float">
            <text:p>25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5" calcext:value-type="float">
            <text:p>142.5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75" calcext:value-type="float">
            <text:p>142.75</text:p>
          </table:table-cell>
          <table:table-cell office:value-type="float" office:value="26.6" calcext:value-type="float">
            <text:p>26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27.2" calcext:value-type="float">
            <text:p>27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25" calcext:value-type="float">
            <text:p>143.25</text:p>
          </table:table-cell>
          <table:table-cell office:value-type="float" office:value="27.9" calcext:value-type="float">
            <text:p>27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5" calcext:value-type="float">
            <text:p>143.5</text:p>
          </table:table-cell>
          <table:table-cell office:value-type="float" office:value="28.5" calcext:value-type="float">
            <text:p>28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75" calcext:value-type="float">
            <text:p>143.75</text:p>
          </table:table-cell>
          <table:table-cell office:value-type="float" office:value="29.2" calcext:value-type="float">
            <text:p>29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4.25" calcext:value-type="float">
            <text:p>144.25</text:p>
          </table:table-cell>
          <table:table-cell office:value-type="float" office:value="30.5" calcext:value-type="float">
            <text:p>30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144.5" calcext:value-type="float">
            <text:p>144.5</text:p>
          </table:table-cell>
          <table:table-cell office:value-type="float" office:value="31.3" calcext:value-type="float">
            <text:p>3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4.75" calcext:value-type="float">
            <text:p>144.75</text:p>
          </table:table-cell>
          <table:table-cell office:value-type="float" office:value="32.1" calcext:value-type="float">
            <text:p>32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32.8" calcext:value-type="float">
            <text:p>32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.25" calcext:value-type="float">
            <text:p>145.25</text:p>
          </table:table-cell>
          <table:table-cell office:value-type="float" office:value="33.6" calcext:value-type="float">
            <text:p>33.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.5" calcext:value-type="float">
            <text:p>145.5</text:p>
          </table:table-cell>
          <table:table-cell office:value-type="float" office:value="34.2" calcext:value-type="float">
            <text:p>34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5.75" calcext:value-type="float">
            <text:p>145.75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25" calcext:value-type="float">
            <text:p>146.25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5" calcext:value-type="float">
            <text:p>146.5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75" calcext:value-type="float">
            <text:p>146.75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25" calcext:value-type="float">
            <text:p>147.25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5" calcext:value-type="float">
            <text:p>147.5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75" calcext:value-type="float">
            <text:p>147.75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25" calcext:value-type="float">
            <text:p>148.25</text:p>
          </table:table-cell>
          <table:table-cell office:value-type="float" office:value="34.8" calcext:value-type="float">
            <text:p>3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5" calcext:value-type="float">
            <text:p>148.5</text:p>
          </table:table-cell>
          <table:table-cell office:value-type="float" office:value="34.8" calcext:value-type="float">
            <text:p>3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75" calcext:value-type="float">
            <text:p>148.75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25" calcext:value-type="float">
            <text:p>149.25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5" calcext:value-type="float">
            <text:p>149.5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75" calcext:value-type="float">
            <text:p>149.75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25" calcext:value-type="float">
            <text:p>150.25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5" calcext:value-type="float">
            <text:p>150.5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75" calcext:value-type="float">
            <text:p>150.75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25" calcext:value-type="float">
            <text:p>151.25</text:p>
          </table:table-cell>
          <table:table-cell office:value-type="float" office:value="35.4" calcext:value-type="float">
            <text:p>35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5" calcext:value-type="float">
            <text:p>151.5</text:p>
          </table:table-cell>
          <table:table-cell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75" calcext:value-type="float">
            <text:p>151.75</text:p>
          </table:table-cell>
          <table:table-cell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25" calcext:value-type="float">
            <text:p>152.25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5" calcext:value-type="float">
            <text:p>152.5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75" calcext:value-type="float">
            <text:p>152.75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25" calcext:value-type="float">
            <text:p>153.25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5" calcext:value-type="float">
            <text:p>153.5</text:p>
          </table:table-cell>
          <table:table-cell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75" calcext:value-type="float">
            <text:p>153.75</text:p>
          </table:table-cell>
          <table:table-cell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25" calcext:value-type="float">
            <text:p>154.25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5" calcext:value-type="float">
            <text:p>154.5</text:p>
          </table:table-cell>
          <table:table-cell office:value-type="float" office:value="36.1" calcext:value-type="float">
            <text:p>36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75" calcext:value-type="float">
            <text:p>154.75</text:p>
          </table:table-cell>
          <table:table-cell office:value-type="float" office:value="36.1" calcext:value-type="float">
            <text:p>36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25" calcext:value-type="float">
            <text:p>155.2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5" calcext:value-type="float">
            <text:p>155.5</text:p>
          </table:table-cell>
          <table:table-cell office:value-type="float" office:value="36.3" calcext:value-type="float">
            <text:p>3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75" calcext:value-type="float">
            <text:p>155.75</text:p>
          </table:table-cell>
          <table:table-cell office:value-type="float" office:value="36.3" calcext:value-type="float">
            <text:p>3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25" calcext:value-type="float">
            <text:p>156.25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5" calcext:value-type="float">
            <text:p>156.5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75" calcext:value-type="float">
            <text:p>156.75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25" calcext:value-type="float">
            <text:p>157.25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5" calcext:value-type="float">
            <text:p>157.5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75" calcext:value-type="float">
            <text:p>157.75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25" calcext:value-type="float">
            <text:p>158.25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5" calcext:value-type="float">
            <text:p>158.5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75" calcext:value-type="float">
            <text:p>158.75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25" calcext:value-type="float">
            <text:p>159.25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5" calcext:value-type="float">
            <text:p>159.5</text:p>
          </table:table-cell>
          <table:table-cell office:value-type="float" office:value="37.1" calcext:value-type="float">
            <text:p>3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75" calcext:value-type="float">
            <text:p>159.75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25" calcext:value-type="float">
            <text:p>160.25</text:p>
          </table:table-cell>
          <table:table-cell office:value-type="float" office:value="37.3" calcext:value-type="float">
            <text:p>3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5" calcext:value-type="float">
            <text:p>160.5</text:p>
          </table:table-cell>
          <table:table-cell office:value-type="float" office:value="37.3" calcext:value-type="float">
            <text:p>3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75" calcext:value-type="float">
            <text:p>160.75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25" calcext:value-type="float">
            <text:p>161.25</text:p>
          </table:table-cell>
          <table:table-cell office:value-type="float" office:value="37.5" calcext:value-type="float">
            <text:p>3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5" calcext:value-type="float">
            <text:p>161.5</text:p>
          </table:table-cell>
          <table:table-cell office:value-type="float" office:value="37.5" calcext:value-type="float">
            <text:p>3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75" calcext:value-type="float">
            <text:p>161.75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25" calcext:value-type="float">
            <text:p>162.25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5" calcext:value-type="float">
            <text:p>162.5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75" calcext:value-type="float">
            <text:p>162.75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25" calcext:value-type="float">
            <text:p>163.25</text:p>
          </table:table-cell>
          <table:table-cell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5" calcext:value-type="float">
            <text:p>163.5</text:p>
          </table:table-cell>
          <table:table-cell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75" calcext:value-type="float">
            <text:p>163.75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25" calcext:value-type="float">
            <text:p>164.25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5" calcext:value-type="float">
            <text:p>164.5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75" calcext:value-type="float">
            <text:p>164.7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38.9" calcext:value-type="float">
            <text:p>38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8"/>
          <table:table-cell office:value-type="float" office:value="165.25" calcext:value-type="float">
            <text:p>165.25</text:p>
          </table:table-cell>
          <table:table-cell office:value-type="float" office:value="41.1" calcext:value-type="float">
            <text:p>41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165.5" calcext:value-type="float">
            <text:p>165.5</text:p>
          </table:table-cell>
          <table:table-cell office:value-type="float" office:value="47.2" calcext:value-type="float">
            <text:p>47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8"/>
          <table:table-cell office:value-type="float" office:value="165.75" calcext:value-type="float">
            <text:p>165.75</text:p>
          </table:table-cell>
          <table:table-cell office:value-type="float" office:value="48.3" calcext:value-type="float">
            <text:p>48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49.5" calcext:value-type="float">
            <text:p>49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.25" calcext:value-type="float">
            <text:p>166.25</text:p>
          </table:table-cell>
          <table:table-cell office:value-type="float" office:value="50.7" calcext:value-type="float">
            <text:p>50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.5" calcext:value-type="float">
            <text:p>166.5</text:p>
          </table:table-cell>
          <table:table-cell office:value-type="float" office:value="51.6" calcext:value-type="float">
            <text:p>51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number-columns-repeated="8"/>
          <table:table-cell office:value-type="float" office:value="166.75" calcext:value-type="float">
            <text:p>166.75</text:p>
          </table:table-cell>
          <table:table-cell office:value-type="float" office:value="52.3" calcext:value-type="float">
            <text:p>52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25" calcext:value-type="float">
            <text:p>167.25</text:p>
          </table:table-cell>
          <table:table-cell office:value-type="float" office:value="53.7" calcext:value-type="float">
            <text:p>53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5" calcext:value-type="float">
            <text:p>167.5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75" calcext:value-type="float">
            <text:p>167.75</text:p>
          </table:table-cell>
          <table:table-cell office:value-type="float" office:value="55.1" calcext:value-type="float">
            <text:p>55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55.8" calcext:value-type="float">
            <text:p>55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8.25" calcext:value-type="float">
            <text:p>168.25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8"/>
          <table:table-cell office:value-type="float" office:value="168.5" calcext:value-type="float">
            <text:p>168.5</text:p>
          </table:table-cell>
          <table:table-cell office:value-type="float" office:value="56.1" calcext:value-type="float">
            <text:p>5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8.75" calcext:value-type="float">
            <text:p>168.75</text:p>
          </table:table-cell>
          <table:table-cell office:value-type="float" office:value="56.1" calcext:value-type="float">
            <text:p>5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56.2" calcext:value-type="float">
            <text:p>56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25" calcext:value-type="float">
            <text:p>169.25</text:p>
          </table:table-cell>
          <table:table-cell office:value-type="float" office:value="56.3" calcext:value-type="float">
            <text:p>56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5" calcext:value-type="float">
            <text:p>169.5</text:p>
          </table:table-cell>
          <table:table-cell office:value-type="float" office:value="56.4" calcext:value-type="float">
            <text:p>56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75" calcext:value-type="float">
            <text:p>169.75</text:p>
          </table:table-cell>
          <table:table-cell office:value-type="float" office:value="56.5" calcext:value-type="float">
            <text:p>56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25" calcext:value-type="float">
            <text:p>170.25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5" calcext:value-type="float">
            <text:p>170.5</text:p>
          </table:table-cell>
          <table:table-cell office:value-type="float" office:value="56.7" calcext:value-type="float">
            <text:p>56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75" calcext:value-type="float">
            <text:p>170.75</text:p>
          </table:table-cell>
          <table:table-cell office:value-type="float" office:value="56.8" calcext:value-type="float">
            <text:p>56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56.9" calcext:value-type="float">
            <text:p>56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25" calcext:value-type="float">
            <text:p>171.25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5" calcext:value-type="float">
            <text:p>171.5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75" calcext:value-type="float">
            <text:p>171.75</text:p>
          </table:table-cell>
          <table:table-cell office:value-type="float" office:value="57.1" calcext:value-type="float">
            <text:p>57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57.2" calcext:value-type="float">
            <text:p>57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25" calcext:value-type="float">
            <text:p>172.25</text:p>
          </table:table-cell>
          <table:table-cell office:value-type="float" office:value="57.3" calcext:value-type="float">
            <text:p>57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5" calcext:value-type="float">
            <text:p>172.5</text:p>
          </table:table-cell>
          <table:table-cell office:value-type="float" office:value="57.4" calcext:value-type="float">
            <text:p>57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75" calcext:value-type="float">
            <text:p>172.75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25" calcext:value-type="float">
            <text:p>173.25</text:p>
          </table:table-cell>
          <table:table-cell office:value-type="float" office:value="57.6" calcext:value-type="float">
            <text:p>5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5" calcext:value-type="float">
            <text:p>173.5</text:p>
          </table:table-cell>
          <table:table-cell office:value-type="float" office:value="57.7" calcext:value-type="float">
            <text:p>57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75" calcext:value-type="float">
            <text:p>173.75</text:p>
          </table:table-cell>
          <table:table-cell office:value-type="float" office:value="57.8" calcext:value-type="float">
            <text:p>57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57.9" calcext:value-type="float">
            <text:p>57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25" calcext:value-type="float">
            <text:p>174.25</text:p>
          </table:table-cell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5" calcext:value-type="float">
            <text:p>174.5</text:p>
          </table:table-cell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75" calcext:value-type="float">
            <text:p>174.75</text:p>
          </table:table-cell>
          <table:table-cell office:value-type="float" office:value="58.1" calcext:value-type="float">
            <text:p>58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58.2" calcext:value-type="float">
            <text:p>58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25" calcext:value-type="float">
            <text:p>175.25</text:p>
          </table:table-cell>
          <table:table-cell office:value-type="float" office:value="58.3" calcext:value-type="float">
            <text:p>58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5" calcext:value-type="float">
            <text:p>175.5</text:p>
          </table:table-cell>
          <table:table-cell office:value-type="float" office:value="58.4" calcext:value-type="float">
            <text:p>5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75" calcext:value-type="float">
            <text:p>175.75</text:p>
          </table:table-cell>
          <table:table-cell office:value-type="float" office:value="58.4" calcext:value-type="float">
            <text:p>5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25" calcext:value-type="float">
            <text:p>176.25</text:p>
          </table:table-cell>
          <table:table-cell office:value-type="float" office:value="58.6" calcext:value-type="float">
            <text:p>5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5" calcext:value-type="float">
            <text:p>176.5</text:p>
          </table:table-cell>
          <table:table-cell office:value-type="float" office:value="58.7" calcext:value-type="float">
            <text:p>58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75" calcext:value-type="float">
            <text:p>176.75</text:p>
          </table:table-cell>
          <table:table-cell office:value-type="float" office:value="58.8" calcext:value-type="float">
            <text:p>58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25" calcext:value-type="float">
            <text:p>177.25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5" calcext:value-type="float">
            <text:p>177.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75" calcext:value-type="float">
            <text:p>177.75</text:p>
          </table:table-cell>
          <table:table-cell office:value-type="float" office:value="59.1" calcext:value-type="float">
            <text:p>5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59.2" calcext:value-type="float">
            <text:p>5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25" calcext:value-type="float">
            <text:p>178.25</text:p>
          </table:table-cell>
          <table:table-cell office:value-type="float" office:value="59.3" calcext:value-type="float">
            <text:p>5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5" calcext:value-type="float">
            <text:p>178.5</text:p>
          </table:table-cell>
          <table:table-cell office:value-type="float" office:value="59.4" calcext:value-type="float">
            <text:p>5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75" calcext:value-type="float">
            <text:p>178.75</text:p>
          </table:table-cell>
          <table:table-cell office:value-type="float" office:value="59.4" calcext:value-type="float">
            <text:p>5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59.5" calcext:value-type="float">
            <text:p>59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25" calcext:value-type="float">
            <text:p>179.25</text:p>
          </table:table-cell>
          <table:table-cell office:value-type="float" office:value="59.6" calcext:value-type="float">
            <text:p>5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5" calcext:value-type="float">
            <text:p>179.5</text:p>
          </table:table-cell>
          <table:table-cell office:value-type="float" office:value="59.7" calcext:value-type="float">
            <text:p>59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75" calcext:value-type="float">
            <text:p>179.75</text:p>
          </table:table-cell>
          <table:table-cell office:value-type="float" office:value="59.8" calcext:value-type="float">
            <text:p>5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25" calcext:value-type="float">
            <text:p>180.25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5" calcext:value-type="float">
            <text:p>180.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75" calcext:value-type="float">
            <text:p>180.75</text:p>
          </table:table-cell>
          <table:table-cell office:value-type="float" office:value="60.1" calcext:value-type="float">
            <text:p>6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60.2" calcext:value-type="float">
            <text:p>6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25" calcext:value-type="float">
            <text:p>181.25</text:p>
          </table:table-cell>
          <table:table-cell office:value-type="float" office:value="60.3" calcext:value-type="float">
            <text:p>6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5" calcext:value-type="float">
            <text:p>181.5</text:p>
          </table:table-cell>
          <table:table-cell office:value-type="float" office:value="60.3" calcext:value-type="float">
            <text:p>6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75" calcext:value-type="float">
            <text:p>181.75</text:p>
          </table:table-cell>
          <table:table-cell office:value-type="float" office:value="60.4" calcext:value-type="float">
            <text:p>6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60.5" calcext:value-type="float">
            <text:p>6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25" calcext:value-type="float">
            <text:p>182.25</text:p>
          </table:table-cell>
          <table:table-cell office:value-type="float" office:value="60.6" calcext:value-type="float">
            <text:p>6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5" calcext:value-type="float">
            <text:p>182.5</text:p>
          </table:table-cell>
          <table:table-cell office:value-type="float" office:value="60.7" calcext:value-type="float">
            <text:p>6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75" calcext:value-type="float">
            <text:p>182.75</text:p>
          </table:table-cell>
          <table:table-cell office:value-type="float" office:value="60.9" calcext:value-type="float">
            <text:p>6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25" calcext:value-type="float">
            <text:p>183.25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5" calcext:value-type="float">
            <text:p>183.5</text:p>
          </table:table-cell>
          <table:table-cell office:value-type="float" office:value="61.4" calcext:value-type="float">
            <text:p>6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75" calcext:value-type="float">
            <text:p>183.75</text:p>
          </table:table-cell>
          <table:table-cell office:value-type="float" office:value="61.6" calcext:value-type="float">
            <text:p>61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61.7" calcext:value-type="float">
            <text:p>61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25" calcext:value-type="float">
            <text:p>184.25</text:p>
          </table:table-cell>
          <table:table-cell office:value-type="float" office:value="61.9" calcext:value-type="float">
            <text:p>61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5" calcext:value-type="float">
            <text:p>184.5</text:p>
          </table:table-cell>
          <table:table-cell office:value-type="float" office:value="62.1" calcext:value-type="float">
            <text:p>62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75" calcext:value-type="float">
            <text:p>184.75</text:p>
          </table:table-cell>
          <table:table-cell office:value-type="float" office:value="62.3" calcext:value-type="float">
            <text:p>62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62.4" calcext:value-type="float">
            <text:p>62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25" calcext:value-type="float">
            <text:p>185.25</text:p>
          </table:table-cell>
          <table:table-cell office:value-type="float" office:value="62.6" calcext:value-type="float">
            <text:p>62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5" calcext:value-type="float">
            <text:p>185.5</text:p>
          </table:table-cell>
          <table:table-cell office:value-type="float" office:value="62.8" calcext:value-type="float">
            <text:p>62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75" calcext:value-type="float">
            <text:p>185.75</text:p>
          </table:table-cell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63.2" calcext:value-type="float">
            <text:p>6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25" calcext:value-type="float">
            <text:p>186.25</text:p>
          </table:table-cell>
          <table:table-cell office:value-type="float" office:value="63.3" calcext:value-type="float">
            <text:p>63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5" calcext:value-type="float">
            <text:p>186.5</text:p>
          </table:table-cell>
          <table:table-cell office:value-type="float" office:value="63.5" calcext:value-type="float">
            <text:p>63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75" calcext:value-type="float">
            <text:p>186.75</text:p>
          </table:table-cell>
          <table:table-cell office:value-type="float" office:value="63.7" calcext:value-type="float">
            <text:p>63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25" calcext:value-type="float">
            <text:p>187.25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5" calcext:value-type="float">
            <text:p>187.5</text:p>
          </table:table-cell>
          <table:table-cell office:value-type="float" office:value="64.2" calcext:value-type="float">
            <text:p>64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75" calcext:value-type="float">
            <text:p>187.75</text:p>
          </table:table-cell>
          <table:table-cell office:value-type="float" office:value="64.4" calcext:value-type="float">
            <text:p>6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64.6" calcext:value-type="float">
            <text:p>6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25" calcext:value-type="float">
            <text:p>188.25</text:p>
          </table:table-cell>
          <table:table-cell office:value-type="float" office:value="64.7" calcext:value-type="float">
            <text:p>64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5" calcext:value-type="float">
            <text:p>188.5</text:p>
          </table:table-cell>
          <table:table-cell office:value-type="float" office:value="64.9" calcext:value-type="float">
            <text:p>64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75" calcext:value-type="float">
            <text:p>188.75</text:p>
          </table:table-cell>
          <table:table-cell office:value-type="float" office:value="65.1" calcext:value-type="float">
            <text:p>65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65.3" calcext:value-type="float">
            <text:p>65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.25" calcext:value-type="float">
            <text:p>189.25</text:p>
          </table:table-cell>
          <table:table-cell office:value-type="float" office:value="65.4" calcext:value-type="float">
            <text:p>6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.5" calcext:value-type="float">
            <text:p>189.5</text:p>
          </table:table-cell>
          <table:table-cell office:value-type="float" office:value="71.1" calcext:value-type="float">
            <text:p>71.1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8"/>
          <table:table-cell office:value-type="float" office:value="189.75" calcext:value-type="float">
            <text:p>189.75</text:p>
          </table:table-cell>
          <table:table-cell office:value-type="float" office:value="72.6" calcext:value-type="float">
            <text:p>72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74.1" calcext:value-type="float">
            <text:p>74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.25" calcext:value-type="float">
            <text:p>190.25</text:p>
          </table:table-cell>
          <table:table-cell office:value-type="float" office:value="75.7" calcext:value-type="float">
            <text:p>75.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.5" calcext:value-type="float">
            <text:p>190.5</text:p>
          </table:table-cell>
          <table:table-cell office:value-type="float" office:value="107.8" calcext:value-type="float">
            <text:p>107.8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1">
          <table:table-cell table:number-columns-repeated="8"/>
          <table:table-cell office:value-type="float" office:value="190.75" calcext:value-type="float">
            <text:p>190.75</text:p>
          </table:table-cell>
          <table:table-cell office:value-type="float" office:value="111.8" calcext:value-type="float">
            <text:p>111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16.8" calcext:value-type="float">
            <text:p>116.8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table:number-columns-repeated="8"/>
          <table:table-cell office:value-type="float" office:value="191.25" calcext:value-type="float">
            <text:p>191.25</text:p>
          </table:table-cell>
          <table:table-cell office:value-type="float" office:value="118.8" calcext:value-type="float">
            <text:p>118.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1.5" calcext:value-type="float">
            <text:p>191.5</text:p>
          </table:table-cell>
          <table:table-cell office:value-type="float" office:value="120.7" calcext:value-type="float">
            <text:p>120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1.75" calcext:value-type="float">
            <text:p>191.75</text:p>
          </table:table-cell>
          <table:table-cell office:value-type="float" office:value="122.7" calcext:value-type="float">
            <text:p>122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24.6" calcext:value-type="float">
            <text:p>124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8"/>
          <table:table-cell office:value-type="float" office:value="192.25" calcext:value-type="float">
            <text:p>192.25</text:p>
          </table:table-cell>
          <table:table-cell office:value-type="float" office:value="126.6" calcext:value-type="float">
            <text:p>126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8"/>
          <table:table-cell office:value-type="float" office:value="192.5" calcext:value-type="float">
            <text:p>192.5</text:p>
          </table:table-cell>
          <table:table-cell office:value-type="float" office:value="128.5" calcext:value-type="float">
            <text:p>128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8"/>
          <table:table-cell office:value-type="float" office:value="192.75" calcext:value-type="float">
            <text:p>192.75</text:p>
          </table:table-cell>
          <table:table-cell office:value-type="float" office:value="128.6" calcext:value-type="float">
            <text:p>12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28.6" calcext:value-type="float">
            <text:p>12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25" calcext:value-type="float">
            <text:p>193.25</text:p>
          </table:table-cell>
          <table:table-cell office:value-type="float" office:value="128.7" calcext:value-type="float">
            <text:p>128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5" calcext:value-type="float">
            <text:p>193.5</text:p>
          </table:table-cell>
          <table:table-cell office:value-type="float" office:value="128.8" calcext:value-type="float">
            <text:p>128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75" calcext:value-type="float">
            <text:p>193.75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25" calcext:value-type="float">
            <text:p>194.25</text:p>
          </table:table-cell>
          <table:table-cell office:value-type="float" office:value="129" calcext:value-type="float">
            <text:p>1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5" calcext:value-type="float">
            <text:p>194.5</text:p>
          </table:table-cell>
          <table:table-cell office:value-type="float" office:value="129.1" calcext:value-type="float">
            <text:p>12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75" calcext:value-type="float">
            <text:p>194.75</text:p>
          </table:table-cell>
          <table:table-cell office:value-type="float" office:value="129.1" calcext:value-type="float">
            <text:p>12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129.2" calcext:value-type="float">
            <text:p>12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25" calcext:value-type="float">
            <text:p>195.25</text:p>
          </table:table-cell>
          <table:table-cell office:value-type="float" office:value="129.3" calcext:value-type="float">
            <text:p>12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5" calcext:value-type="float">
            <text:p>195.5</text:p>
          </table:table-cell>
          <table:table-cell office:value-type="float" office:value="129.3" calcext:value-type="float">
            <text:p>12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75" calcext:value-type="float">
            <text:p>195.75</text:p>
          </table:table-cell>
          <table:table-cell office:value-type="float" office:value="129.4" calcext:value-type="float">
            <text:p>12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29.5" calcext:value-type="float">
            <text:p>129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25" calcext:value-type="float">
            <text:p>196.25</text:p>
          </table:table-cell>
          <table:table-cell office:value-type="float" office:value="129.6" calcext:value-type="float">
            <text:p>12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5" calcext:value-type="float">
            <text:p>196.5</text:p>
          </table:table-cell>
          <table:table-cell office:value-type="float" office:value="129.6" calcext:value-type="float">
            <text:p>12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75" calcext:value-type="float">
            <text:p>196.75</text:p>
          </table:table-cell>
          <table:table-cell office:value-type="float" office:value="129.7" calcext:value-type="float">
            <text:p>129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25" calcext:value-type="float">
            <text:p>197.25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5" calcext:value-type="float">
            <text:p>197.5</text:p>
          </table:table-cell>
          <table:table-cell office:value-type="float" office:value="129.9" calcext:value-type="float">
            <text:p>12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75" calcext:value-type="float">
            <text:p>197.75</text:p>
          </table:table-cell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25" calcext:value-type="float">
            <text:p>198.25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5" calcext:value-type="float">
            <text:p>198.5</text:p>
          </table:table-cell>
          <table:table-cell office:value-type="float" office:value="130.2" calcext:value-type="float">
            <text:p>13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75" calcext:value-type="float">
            <text:p>198.75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25" calcext:value-type="float">
            <text:p>199.25</text:p>
          </table:table-cell>
          <table:table-cell office:value-type="float" office:value="130.4" calcext:value-type="float">
            <text:p>13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5" calcext:value-type="float">
            <text:p>199.5</text:p>
          </table:table-cell>
          <table:table-cell office:value-type="float" office:value="130.5" calcext:value-type="float">
            <text:p>13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75" calcext:value-type="float">
            <text:p>199.75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25" calcext:value-type="float">
            <text:p>200.25</text:p>
          </table:table-cell>
          <table:table-cell office:value-type="float" office:value="130.7" calcext:value-type="float">
            <text:p>13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5" calcext:value-type="float">
            <text:p>200.5</text:p>
          </table:table-cell>
          <table:table-cell office:value-type="float" office:value="130.8" calcext:value-type="float">
            <text:p>1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75" calcext:value-type="float">
            <text:p>200.75</text:p>
          </table:table-cell>
          <table:table-cell office:value-type="float" office:value="130.8" calcext:value-type="float">
            <text:p>1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30.9" calcext:value-type="float">
            <text:p>130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25" calcext:value-type="float">
            <text:p>201.25</text:p>
          </table:table-cell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5" calcext:value-type="float">
            <text:p>201.5</text:p>
          </table:table-cell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75" calcext:value-type="float">
            <text:p>201.75</text:p>
          </table:table-cell>
          <table:table-cell office:value-type="float" office:value="131.1" calcext:value-type="float">
            <text:p>13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31.2" calcext:value-type="float">
            <text:p>131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25" calcext:value-type="float">
            <text:p>202.25</text:p>
          </table:table-cell>
          <table:table-cell office:value-type="float" office:value="131.3" calcext:value-type="float">
            <text:p>131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5" calcext:value-type="float">
            <text:p>202.5</text:p>
          </table:table-cell>
          <table:table-cell office:value-type="float" office:value="131.3" calcext:value-type="float">
            <text:p>131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75" calcext:value-type="float">
            <text:p>202.75</text:p>
          </table:table-cell>
          <table:table-cell office:value-type="float" office:value="131.4" calcext:value-type="float">
            <text:p>13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25" calcext:value-type="float">
            <text:p>203.25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5" calcext:value-type="float">
            <text:p>203.5</text:p>
          </table:table-cell>
          <table:table-cell office:value-type="float" office:value="131.6" calcext:value-type="float">
            <text:p>131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75" calcext:value-type="float">
            <text:p>203.75</text:p>
          </table:table-cell>
          <table:table-cell office:value-type="float" office:value="131.7" calcext:value-type="float">
            <text:p>13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25" calcext:value-type="float">
            <text:p>204.25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5" calcext:value-type="float">
            <text:p>204.5</text:p>
          </table:table-cell>
          <table:table-cell office:value-type="float" office:value="131.9" calcext:value-type="float">
            <text:p>131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75" calcext:value-type="float">
            <text:p>204.7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25" calcext:value-type="float">
            <text:p>205.25</text:p>
          </table:table-cell>
          <table:table-cell office:value-type="float" office:value="132.1" calcext:value-type="float">
            <text:p>132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5" calcext:value-type="float">
            <text:p>205.5</text:p>
          </table:table-cell>
          <table:table-cell office:value-type="float" office:value="132.2" calcext:value-type="float">
            <text:p>13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75" calcext:value-type="float">
            <text:p>205.75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25" calcext:value-type="float">
            <text:p>206.25</text:p>
          </table:table-cell>
          <table:table-cell office:value-type="float" office:value="132.4" calcext:value-type="float">
            <text:p>132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5" calcext:value-type="float">
            <text:p>206.5</text:p>
          </table:table-cell>
          <table:table-cell office:value-type="float" office:value="132.5" calcext:value-type="float">
            <text:p>132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75" calcext:value-type="float">
            <text:p>206.75</text:p>
          </table:table-cell>
          <table:table-cell office:value-type="float" office:value="132.5" calcext:value-type="float">
            <text:p>132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132.6" calcext:value-type="float">
            <text:p>132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25" calcext:value-type="float">
            <text:p>207.25</text:p>
          </table:table-cell>
          <table:table-cell office:value-type="float" office:value="132.7" calcext:value-type="float">
            <text:p>1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5" calcext:value-type="float">
            <text:p>207.5</text:p>
          </table:table-cell>
          <table:table-cell office:value-type="float" office:value="132.7" calcext:value-type="float">
            <text:p>1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75" calcext:value-type="float">
            <text:p>207.75</text:p>
          </table:table-cell>
          <table:table-cell office:value-type="float" office:value="132.8" calcext:value-type="float">
            <text:p>13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132.9" calcext:value-type="float">
            <text:p>13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25" calcext:value-type="float">
            <text:p>208.25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5" calcext:value-type="float">
            <text:p>208.5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75" calcext:value-type="float">
            <text:p>208.75</text:p>
          </table:table-cell>
          <table:table-cell office:value-type="float" office:value="133.1" calcext:value-type="float">
            <text:p>133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" calcext:value-type="float">
            <text:p>209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25" calcext:value-type="float">
            <text:p>209.25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5" calcext:value-type="float">
            <text:p>209.5</text:p>
          </table:table-cell>
          <table:table-cell office:value-type="float" office:value="133.3" calcext:value-type="float">
            <text:p>13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75" calcext:value-type="float">
            <text:p>209.75</text:p>
          </table:table-cell>
          <table:table-cell office:value-type="float" office:value="133.4" calcext:value-type="float">
            <text:p>13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25" calcext:value-type="float">
            <text:p>210.25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5" calcext:value-type="float">
            <text:p>210.5</text:p>
          </table:table-cell>
          <table:table-cell office:value-type="float" office:value="133.6" calcext:value-type="float">
            <text:p>133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75" calcext:value-type="float">
            <text:p>210.75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25" calcext:value-type="float">
            <text:p>211.25</text:p>
          </table:table-cell>
          <table:table-cell office:value-type="float" office:value="133.8" calcext:value-type="float">
            <text:p>133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5" calcext:value-type="float">
            <text:p>211.5</text:p>
          </table:table-cell>
          <table:table-cell office:value-type="float" office:value="133.9" calcext:value-type="float">
            <text:p>13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75" calcext:value-type="float">
            <text:p>211.75</text:p>
          </table:table-cell>
          <table:table-cell office:value-type="float" office:value="133.9" calcext:value-type="float">
            <text:p>13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25" calcext:value-type="float">
            <text:p>212.25</text:p>
          </table:table-cell>
          <table:table-cell office:value-type="float" office:value="134.1" calcext:value-type="float">
            <text:p>13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5" calcext:value-type="float">
            <text:p>212.5</text:p>
          </table:table-cell>
          <table:table-cell office:value-type="float" office:value="134.2" calcext:value-type="float">
            <text:p>13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75" calcext:value-type="float">
            <text:p>21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134.3" calcext:value-type="float">
            <text:p>13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25" calcext:value-type="float">
            <text:p>213.25</text:p>
          </table:table-cell>
          <table:table-cell office:value-type="float" office:value="134.4" calcext:value-type="float">
            <text:p>13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5" calcext:value-type="float">
            <text:p>213.5</text:p>
          </table:table-cell>
          <table:table-cell office:value-type="float" office:value="134.4" calcext:value-type="float">
            <text:p>13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75" calcext:value-type="float">
            <text:p>213.75</text:p>
          </table:table-cell>
          <table:table-cell office:value-type="float" office:value="134.5" calcext:value-type="float">
            <text:p>13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136.7" calcext:value-type="float">
            <text:p>136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14.25" calcext:value-type="float">
            <text:p>214.25</text:p>
          </table:table-cell>
          <table:table-cell office:value-type="float" office:value="139" calcext:value-type="float">
            <text:p>13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14.5" calcext:value-type="float">
            <text:p>214.5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float" office:value="214.75" calcext:value-type="float">
            <text:p>214.75</text:p>
          </table:table-cell>
          <table:table-cell office:value-type="float" office:value="142.3" calcext:value-type="float">
            <text:p>142.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143.7" calcext:value-type="float">
            <text:p>143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25" calcext:value-type="float">
            <text:p>215.25</text:p>
          </table:table-cell>
          <table:table-cell office:value-type="float" office:value="145.1" calcext:value-type="float">
            <text:p>145.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5" calcext:value-type="float">
            <text:p>215.5</text:p>
          </table:table-cell>
          <table:table-cell office:value-type="float" office:value="146.5" calcext:value-type="float">
            <text:p>146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75" calcext:value-type="float">
            <text:p>215.75</text:p>
          </table:table-cell>
          <table:table-cell office:value-type="float" office:value="147.8" calcext:value-type="float">
            <text:p>147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149.1" calcext:value-type="float">
            <text:p>149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25" calcext:value-type="float">
            <text:p>216.25</text:p>
          </table:table-cell>
          <table:table-cell office:value-type="float" office:value="150.4" calcext:value-type="float">
            <text:p>150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5" calcext:value-type="float">
            <text:p>216.5</text:p>
          </table:table-cell>
          <table:table-cell office:value-type="float" office:value="151.7" calcext:value-type="float">
            <text:p>151.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75" calcext:value-type="float">
            <text:p>216.75</text:p>
          </table:table-cell>
          <table:table-cell office:value-type="float" office:value="153" calcext:value-type="float">
            <text:p>15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153.8" calcext:value-type="float">
            <text:p>153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25" calcext:value-type="float">
            <text:p>217.25</text:p>
          </table:table-cell>
          <table:table-cell office:value-type="float" office:value="154.7" calcext:value-type="float">
            <text:p>154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5" calcext:value-type="float">
            <text:p>217.5</text:p>
          </table:table-cell>
          <table:table-cell office:value-type="float" office:value="155.6" calcext:value-type="float">
            <text:p>155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75" calcext:value-type="float">
            <text:p>217.75</text:p>
          </table:table-cell>
          <table:table-cell office:value-type="float" office:value="156.5" calcext:value-type="float">
            <text:p>156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57.3" calcext:value-type="float">
            <text:p>157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25" calcext:value-type="float">
            <text:p>218.25</text:p>
          </table:table-cell>
          <table:table-cell office:value-type="float" office:value="158.2" calcext:value-type="float">
            <text:p>158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5" calcext:value-type="float">
            <text:p>218.5</text:p>
          </table:table-cell>
          <table:table-cell office:value-type="float" office:value="159.1" calcext:value-type="float">
            <text:p>159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75" calcext:value-type="float">
            <text:p>218.75</text:p>
          </table:table-cell>
          <table:table-cell office:value-type="float" office:value="159.8" calcext:value-type="float">
            <text:p>159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160.5" calcext:value-type="float">
            <text:p>160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25" calcext:value-type="float">
            <text:p>219.25</text:p>
          </table:table-cell>
          <table:table-cell office:value-type="float" office:value="161.1" calcext:value-type="float">
            <text:p>161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5" calcext:value-type="float">
            <text:p>219.5</text:p>
          </table:table-cell>
          <table:table-cell office:value-type="float" office:value="161.8" calcext:value-type="float">
            <text:p>161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75" calcext:value-type="float">
            <text:p>219.75</text:p>
          </table:table-cell>
          <table:table-cell office:value-type="float" office:value="162.5" calcext:value-type="float">
            <text:p>16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63.1" calcext:value-type="float">
            <text:p>163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25" calcext:value-type="float">
            <text:p>220.25</text:p>
          </table:table-cell>
          <table:table-cell office:value-type="float" office:value="163.8" calcext:value-type="float">
            <text:p>163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5" calcext:value-type="float">
            <text:p>220.5</text:p>
          </table:table-cell>
          <table:table-cell office:value-type="float" office:value="164.5" calcext:value-type="float">
            <text:p>164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75" calcext:value-type="float">
            <text:p>220.75</text:p>
          </table:table-cell>
          <table:table-cell office:value-type="float" office:value="165.2" calcext:value-type="float">
            <text:p>165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65.7" calcext:value-type="float">
            <text:p>165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21.25" calcext:value-type="float">
            <text:p>221.25</text:p>
          </table:table-cell>
          <table:table-cell office:value-type="float" office:value="166.2" calcext:value-type="float">
            <text:p>166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1.5" calcext:value-type="float">
            <text:p>221.5</text:p>
          </table:table-cell>
          <table:table-cell office:value-type="float" office:value="166.6" calcext:value-type="float">
            <text:p>166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1.75" calcext:value-type="float">
            <text:p>221.75</text:p>
          </table:table-cell>
          <table:table-cell office:value-type="float" office:value="167.1" calcext:value-type="float">
            <text:p>167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167.5" calcext:value-type="float">
            <text:p>167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25" calcext:value-type="float">
            <text:p>222.25</text:p>
          </table:table-cell>
          <table:table-cell office:value-type="float" office:value="168" calcext:value-type="float">
            <text:p>16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5" calcext:value-type="float">
            <text:p>222.5</text:p>
          </table:table-cell>
          <table:table-cell office:value-type="float" office:value="168.5" calcext:value-type="float">
            <text:p>168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75" calcext:value-type="float">
            <text:p>222.75</text:p>
          </table:table-cell>
          <table:table-cell office:value-type="float" office:value="168.9" calcext:value-type="float">
            <text:p>168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169.4" calcext:value-type="float">
            <text:p>169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25" calcext:value-type="float">
            <text:p>223.25</text:p>
          </table:table-cell>
          <table:table-cell office:value-type="float" office:value="169.8" calcext:value-type="float">
            <text:p>169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5" calcext:value-type="float">
            <text:p>223.5</text:p>
          </table:table-cell>
          <table:table-cell office:value-type="float" office:value="170.3" calcext:value-type="float">
            <text:p>170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75" calcext:value-type="float">
            <text:p>223.75</text:p>
          </table:table-cell>
          <table:table-cell office:value-type="float" office:value="170.7" calcext:value-type="float">
            <text:p>170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71.2" calcext:value-type="float">
            <text:p>171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.25" calcext:value-type="float">
            <text:p>224.25</text:p>
          </table:table-cell>
          <table:table-cell office:value-type="float" office:value="171.6" calcext:value-type="float">
            <text:p>17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.5" calcext:value-type="float">
            <text:p>224.5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24.75" calcext:value-type="float">
            <text:p>224.75</text:p>
          </table:table-cell>
          <table:table-cell office:value-type="float" office:value="172.2" calcext:value-type="float">
            <text:p>172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172.4" calcext:value-type="float">
            <text:p>172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25" calcext:value-type="float">
            <text:p>225.25</text:p>
          </table:table-cell>
          <table:table-cell office:value-type="float" office:value="172.5" calcext:value-type="float">
            <text:p>172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5" calcext:value-type="float">
            <text:p>225.5</text:p>
          </table:table-cell>
          <table:table-cell office:value-type="float" office:value="172.7" calcext:value-type="float">
            <text:p>172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75" calcext:value-type="float">
            <text:p>225.75</text:p>
          </table:table-cell>
          <table:table-cell office:value-type="float" office:value="172.9" calcext:value-type="float">
            <text:p>17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173.1" calcext:value-type="float">
            <text:p>173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25" calcext:value-type="float">
            <text:p>226.25</text:p>
          </table:table-cell>
          <table:table-cell office:value-type="float" office:value="173.3" calcext:value-type="float">
            <text:p>173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5" calcext:value-type="float">
            <text:p>226.5</text:p>
          </table:table-cell>
          <table:table-cell office:value-type="float" office:value="173.5" calcext:value-type="float">
            <text:p>173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75" calcext:value-type="float">
            <text:p>226.75</text:p>
          </table:table-cell>
          <table:table-cell office:value-type="float" office:value="173.7" calcext:value-type="float">
            <text:p>173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173.9" calcext:value-type="float">
            <text:p>17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25" calcext:value-type="float">
            <text:p>227.25</text:p>
          </table:table-cell>
          <table:table-cell office:value-type="float" office:value="174" calcext:value-type="float">
            <text:p>17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5" calcext:value-type="float">
            <text:p>227.5</text:p>
          </table:table-cell>
          <table:table-cell office:value-type="float" office:value="174.2" calcext:value-type="float">
            <text:p>174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75" calcext:value-type="float">
            <text:p>227.75</text:p>
          </table:table-cell>
          <table:table-cell office:value-type="float" office:value="174.4" calcext:value-type="float">
            <text:p>17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74.6" calcext:value-type="float">
            <text:p>17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25" calcext:value-type="float">
            <text:p>228.25</text:p>
          </table:table-cell>
          <table:table-cell office:value-type="float" office:value="174.8" calcext:value-type="float">
            <text:p>174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5" calcext:value-type="float">
            <text:p>228.5</text:p>
          </table:table-cell>
          <table:table-cell office:value-type="float" office:value="175" calcext:value-type="float">
            <text:p>17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75" calcext:value-type="float">
            <text:p>228.75</text:p>
          </table:table-cell>
          <table:table-cell office:value-type="float" office:value="175.2" calcext:value-type="float">
            <text:p>17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75.4" calcext:value-type="float">
            <text:p>17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25" calcext:value-type="float">
            <text:p>229.25</text:p>
          </table:table-cell>
          <table:table-cell office:value-type="float" office:value="175.5" calcext:value-type="float">
            <text:p>175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5" calcext:value-type="float">
            <text:p>229.5</text:p>
          </table:table-cell>
          <table:table-cell office:value-type="float" office:value="175.7" calcext:value-type="float">
            <text:p>17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75" calcext:value-type="float">
            <text:p>229.75</text:p>
          </table:table-cell>
          <table:table-cell office:value-type="float" office:value="175.9" calcext:value-type="float">
            <text:p>175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76.1" calcext:value-type="float">
            <text:p>176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25" calcext:value-type="float">
            <text:p>230.25</text:p>
          </table:table-cell>
          <table:table-cell office:value-type="float" office:value="176.3" calcext:value-type="float">
            <text:p>176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5" calcext:value-type="float">
            <text:p>230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75" calcext:value-type="float">
            <text:p>230.75</text:p>
          </table:table-cell>
          <table:table-cell office:value-type="float" office:value="176.7" calcext:value-type="float">
            <text:p>17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76.9" calcext:value-type="float">
            <text:p>17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25" calcext:value-type="float">
            <text:p>231.25</text:p>
          </table:table-cell>
          <table:table-cell office:value-type="float" office:value="177" calcext:value-type="float">
            <text:p>17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5" calcext:value-type="float">
            <text:p>231.5</text:p>
          </table:table-cell>
          <table:table-cell office:value-type="float" office:value="177.2" calcext:value-type="float">
            <text:p>177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75" calcext:value-type="float">
            <text:p>231.75</text:p>
          </table:table-cell>
          <table:table-cell office:value-type="float" office:value="177.4" calcext:value-type="float">
            <text:p>17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77.6" calcext:value-type="float">
            <text:p>177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25" calcext:value-type="float">
            <text:p>232.25</text:p>
          </table:table-cell>
          <table:table-cell office:value-type="float" office:value="177.8" calcext:value-type="float">
            <text:p>17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5" calcext:value-type="float">
            <text:p>232.5</text:p>
          </table:table-cell>
          <table:table-cell office:value-type="float" office:value="178" calcext:value-type="float">
            <text:p>1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75" calcext:value-type="float">
            <text:p>232.75</text:p>
          </table:table-cell>
          <table:table-cell office:value-type="float" office:value="178.2" calcext:value-type="float">
            <text:p>178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178.4" calcext:value-type="float">
            <text:p>178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8"/>
          <table:table-cell office:value-type="float" office:value="233.25" calcext:value-type="float">
            <text:p>233.25</text:p>
          </table:table-cell>
          <table:table-cell office:value-type="float" office:value="178.7" calcext:value-type="float">
            <text:p>17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3.5" calcext:value-type="float">
            <text:p>233.5</text:p>
          </table:table-cell>
          <table:table-cell office:value-type="float" office:value="179.1" calcext:value-type="float">
            <text:p>179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3.75" calcext:value-type="float">
            <text:p>233.75</text:p>
          </table:table-cell>
          <table:table-cell office:value-type="float" office:value="179.5" calcext:value-type="float">
            <text:p>179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179.8" calcext:value-type="float">
            <text:p>179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25" calcext:value-type="float">
            <text:p>234.25</text:p>
          </table:table-cell>
          <table:table-cell office:value-type="float" office:value="180.2" calcext:value-type="float">
            <text:p>18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5" calcext:value-type="float">
            <text:p>234.5</text:p>
          </table:table-cell>
          <table:table-cell office:value-type="float" office:value="180.6" calcext:value-type="float">
            <text:p>180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75" calcext:value-type="float">
            <text:p>234.75</text:p>
          </table:table-cell>
          <table:table-cell office:value-type="float" office:value="180.9" calcext:value-type="float">
            <text:p>180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181.3" calcext:value-type="float">
            <text:p>18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25" calcext:value-type="float">
            <text:p>235.25</text:p>
          </table:table-cell>
          <table:table-cell office:value-type="float" office:value="181.7" calcext:value-type="float">
            <text:p>181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5" calcext:value-type="float">
            <text:p>235.5</text:p>
          </table:table-cell>
          <table:table-cell office:value-type="float" office:value="182" calcext:value-type="float">
            <text:p>1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75" calcext:value-type="float">
            <text:p>235.75</text:p>
          </table:table-cell>
          <table:table-cell office:value-type="float" office:value="182.4" calcext:value-type="float">
            <text:p>182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82.8" calcext:value-type="float">
            <text:p>182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25" calcext:value-type="float">
            <text:p>236.25</text:p>
          </table:table-cell>
          <table:table-cell office:value-type="float" office:value="183.2" calcext:value-type="float">
            <text:p>183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5" calcext:value-type="float">
            <text:p>236.5</text:p>
          </table:table-cell>
          <table:table-cell office:value-type="float" office:value="183.5" calcext:value-type="float">
            <text:p>183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75" calcext:value-type="float">
            <text:p>236.75</text:p>
          </table:table-cell>
          <table:table-cell office:value-type="float" office:value="183.9" calcext:value-type="float">
            <text:p>183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184.3" calcext:value-type="float">
            <text:p>184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.25" calcext:value-type="float">
            <text:p>237.25</text:p>
          </table:table-cell>
          <table:table-cell office:value-type="float" office:value="184.6" calcext:value-type="float">
            <text:p>18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.5" calcext:value-type="float">
            <text:p>237.5</text:p>
          </table:table-cell>
          <table:table-cell office:value-type="float" office:value="192.4" calcext:value-type="float">
            <text:p>192.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office:value-type="float" office:value="237.75" calcext:value-type="float">
            <text:p>237.75</text:p>
          </table:table-cell>
          <table:table-cell office:value-type="float" office:value="195.4" calcext:value-type="float">
            <text:p>195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198.3" calcext:value-type="float">
            <text:p>198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number-columns-repeated="8"/>
          <table:table-cell office:value-type="float" office:value="238.25" calcext:value-type="float">
            <text:p>238.25</text:p>
          </table:table-cell>
          <table:table-cell office:value-type="float" office:value="200.6" calcext:value-type="float">
            <text:p>200.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number-columns-repeated="8"/>
          <table:table-cell office:value-type="float" office:value="238.5" calcext:value-type="float">
            <text:p>238.5</text:p>
          </table:table-cell>
          <table:table-cell office:value-type="float" office:value="203" calcext:value-type="float">
            <text:p>20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number-columns-repeated="8"/>
          <table:table-cell office:value-type="float" office:value="238.75" calcext:value-type="float">
            <text:p>238.75</text:p>
          </table:table-cell>
          <table:table-cell office:value-type="float" office:value="205.4" calcext:value-type="float">
            <text:p>205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207.8" calcext:value-type="float">
            <text:p>207.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8"/>
          <table:table-cell office:value-type="float" office:value="239.25" calcext:value-type="float">
            <text:p>239.25</text:p>
          </table:table-cell>
          <table:table-cell office:value-type="float" office:value="210.2" calcext:value-type="float">
            <text:p>210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8"/>
          <table:table-cell office:value-type="float" office:value="239.5" calcext:value-type="float">
            <text:p>239.5</text:p>
          </table:table-cell>
          <table:table-cell office:value-type="float" office:value="212.6" calcext:value-type="float">
            <text:p>212.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number-columns-repeated="8"/>
          <table:table-cell office:value-type="float" office:value="239.75" calcext:value-type="float">
            <text:p>239.75</text:p>
          </table:table-cell>
          <table:table-cell office:value-type="float" office:value="215" calcext:value-type="float">
            <text:p>21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217.4" calcext:value-type="float">
            <text:p>217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40.25" calcext:value-type="float">
            <text:p>240.25</text:p>
          </table:table-cell>
          <table:table-cell office:value-type="float" office:value="218.9" calcext:value-type="float">
            <text:p>218.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240.5" calcext:value-type="float">
            <text:p>240.5</text:p>
          </table:table-cell>
          <table:table-cell office:value-type="float" office:value="220.2" calcext:value-type="float">
            <text:p>220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0.75" calcext:value-type="float">
            <text:p>240.75</text:p>
          </table:table-cell>
          <table:table-cell office:value-type="float" office:value="221.5" calcext:value-type="float">
            <text:p>221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222.8" calcext:value-type="float">
            <text:p>222.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.25" calcext:value-type="float">
            <text:p>241.25</text:p>
          </table:table-cell>
          <table:table-cell office:value-type="float" office:value="224.2" calcext:value-type="float">
            <text:p>224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.5" calcext:value-type="float">
            <text:p>241.5</text:p>
          </table:table-cell>
          <table:table-cell office:value-type="float" office:value="225.1" calcext:value-type="float">
            <text:p>225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8"/>
          <table:table-cell office:value-type="float" office:value="241.75" calcext:value-type="float">
            <text:p>241.75</text:p>
          </table:table-cell>
          <table:table-cell office:value-type="float" office:value="226" calcext:value-type="float">
            <text:p>22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226.8" calcext:value-type="float">
            <text:p>226.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25" calcext:value-type="float">
            <text:p>242.25</text:p>
          </table:table-cell>
          <table:table-cell office:value-type="float" office:value="227.7" calcext:value-type="float">
            <text:p>227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5" calcext:value-type="float">
            <text:p>242.5</text:p>
          </table:table-cell>
          <table:table-cell office:value-type="float" office:value="228.5" calcext:value-type="float">
            <text:p>228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75" calcext:value-type="float">
            <text:p>242.75</text:p>
          </table:table-cell>
          <table:table-cell office:value-type="float" office:value="229.3" calcext:value-type="float">
            <text:p>229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230.2" calcext:value-type="float">
            <text:p>230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.25" calcext:value-type="float">
            <text:p>243.25</text:p>
          </table:table-cell>
          <table:table-cell office:value-type="float" office:value="231" calcext:value-type="float">
            <text:p>23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.5" calcext:value-type="float">
            <text:p>243.5</text:p>
          </table:table-cell>
          <table:table-cell office:value-type="float" office:value="231.7" calcext:value-type="float">
            <text:p>231.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243.75" calcext:value-type="float">
            <text:p>243.75</text:p>
          </table:table-cell>
          <table:table-cell office:value-type="float" office:value="232.2" calcext:value-type="float">
            <text:p>23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232.8" calcext:value-type="float">
            <text:p>232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25" calcext:value-type="float">
            <text:p>244.25</text:p>
          </table:table-cell>
          <table:table-cell office:value-type="float" office:value="233.3" calcext:value-type="float">
            <text:p>233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5" calcext:value-type="float">
            <text:p>244.5</text:p>
          </table:table-cell>
          <table:table-cell office:value-type="float" office:value="233.9" calcext:value-type="float">
            <text:p>233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75" calcext:value-type="float">
            <text:p>244.75</text:p>
          </table:table-cell>
          <table:table-cell office:value-type="float" office:value="234.5" calcext:value-type="float">
            <text:p>234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25" calcext:value-type="float">
            <text:p>245.25</text:p>
          </table:table-cell>
          <table:table-cell office:value-type="float" office:value="235.6" calcext:value-type="float">
            <text:p>235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5" calcext:value-type="float">
            <text:p>245.5</text:p>
          </table:table-cell>
          <table:table-cell office:value-type="float" office:value="236.2" calcext:value-type="float">
            <text:p>236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75" calcext:value-type="float">
            <text:p>245.75</text:p>
          </table:table-cell>
          <table:table-cell office:value-type="float" office:value="236.7" calcext:value-type="float">
            <text:p>23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237.3" calcext:value-type="float">
            <text:p>237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.25" calcext:value-type="float">
            <text:p>246.25</text:p>
          </table:table-cell>
          <table:table-cell office:value-type="float" office:value="237.8" calcext:value-type="float">
            <text:p>237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.5" calcext:value-type="float">
            <text:p>246.5</text:p>
          </table:table-cell>
          <table:table-cell office:value-type="float" office:value="238.2" calcext:value-type="float">
            <text:p>238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46.75" calcext:value-type="float">
            <text:p>246.75</text:p>
          </table:table-cell>
          <table:table-cell office:value-type="float" office:value="238.4" calcext:value-type="float">
            <text:p>23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238.7" calcext:value-type="float">
            <text:p>23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25" calcext:value-type="float">
            <text:p>247.25</text:p>
          </table:table-cell>
          <table:table-cell office:value-type="float" office:value="238.9" calcext:value-type="float">
            <text:p>23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5" calcext:value-type="float">
            <text:p>247.5</text:p>
          </table:table-cell>
          <table:table-cell office:value-type="float" office:value="239.2" calcext:value-type="float">
            <text:p>23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75" calcext:value-type="float">
            <text:p>247.75</text:p>
          </table:table-cell>
          <table:table-cell office:value-type="float" office:value="239.4" calcext:value-type="float">
            <text:p>2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239.6" calcext:value-type="float">
            <text:p>23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25" calcext:value-type="float">
            <text:p>248.2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5" calcext:value-type="float">
            <text:p>248.5</text:p>
          </table:table-cell>
          <table:table-cell office:value-type="float" office:value="240.1" calcext:value-type="float">
            <text:p>24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75" calcext:value-type="float">
            <text:p>248.75</text:p>
          </table:table-cell>
          <table:table-cell office:value-type="float" office:value="240.4" calcext:value-type="float">
            <text:p>24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240.6" calcext:value-type="float">
            <text:p>24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25" calcext:value-type="float">
            <text:p>249.25</text:p>
          </table:table-cell>
          <table:table-cell office:value-type="float" office:value="240.8" calcext:value-type="float">
            <text:p>24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5" calcext:value-type="float">
            <text:p>249.5</text:p>
          </table:table-cell>
          <table:table-cell office:value-type="float" office:value="241.1" calcext:value-type="float">
            <text:p>2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75" calcext:value-type="float">
            <text:p>249.75</text:p>
          </table:table-cell>
          <table:table-cell office:value-type="float" office:value="241.3" calcext:value-type="float">
            <text:p>24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241.6" calcext:value-type="float">
            <text:p>24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25" calcext:value-type="float">
            <text:p>250.25</text:p>
          </table:table-cell>
          <table:table-cell office:value-type="float" office:value="241.8" calcext:value-type="float">
            <text:p>2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5" calcext:value-type="float">
            <text:p>250.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75" calcext:value-type="float">
            <text:p>250.75</text:p>
          </table:table-cell>
          <table:table-cell office:value-type="float" office:value="242.3" calcext:value-type="float">
            <text:p>24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242.5" calcext:value-type="float">
            <text:p>2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25" calcext:value-type="float">
            <text:p>251.25</text:p>
          </table:table-cell>
          <table:table-cell office:value-type="float" office:value="242.8" calcext:value-type="float">
            <text:p>24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5" calcext:value-type="float">
            <text:p>251.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75" calcext:value-type="float">
            <text:p>251.75</text:p>
          </table:table-cell>
          <table:table-cell office:value-type="float" office:value="243.2" calcext:value-type="float">
            <text:p>2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243.5" calcext:value-type="float">
            <text:p>24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25" calcext:value-type="float">
            <text:p>252.25</text:p>
          </table:table-cell>
          <table:table-cell office:value-type="float" office:value="243.7" calcext:value-type="float">
            <text:p>24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5" calcext:value-type="float">
            <text:p>252.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75" calcext:value-type="float">
            <text:p>252.75</text:p>
          </table:table-cell>
          <table:table-cell office:value-type="float" office:value="244.2" calcext:value-type="float">
            <text:p>24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244.4" calcext:value-type="float">
            <text:p>2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.25" calcext:value-type="float">
            <text:p>253.25</text:p>
          </table:table-cell>
          <table:table-cell office:value-type="float" office:value="244.7" calcext:value-type="float">
            <text:p>24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.5" calcext:value-type="float">
            <text:p>253.5</text:p>
          </table:table-cell>
          <table:table-cell office:value-type="float" office:value="244.9" calcext:value-type="float">
            <text:p>244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3.75" calcext:value-type="float">
            <text:p>253.75</text:p>
          </table:table-cell>
          <table:table-cell office:value-type="float" office:value="245.1" calcext:value-type="float">
            <text:p>245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245.4" calcext:value-type="float">
            <text:p>24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25" calcext:value-type="float">
            <text:p>254.25</text:p>
          </table:table-cell>
          <table:table-cell office:value-type="float" office:value="245.6" calcext:value-type="float">
            <text:p>245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5" calcext:value-type="float">
            <text:p>254.5</text:p>
          </table:table-cell>
          <table:table-cell office:value-type="float" office:value="245.8" calcext:value-type="float">
            <text:p>245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75" calcext:value-type="float">
            <text:p>254.75</text:p>
          </table:table-cell>
          <table:table-cell office:value-type="float" office:value="246" calcext:value-type="float">
            <text:p>2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246.2" calcext:value-type="float">
            <text:p>246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25" calcext:value-type="float">
            <text:p>255.25</text:p>
          </table:table-cell>
          <table:table-cell office:value-type="float" office:value="246.4" calcext:value-type="float">
            <text:p>246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5" calcext:value-type="float">
            <text:p>255.5</text:p>
          </table:table-cell>
          <table:table-cell office:value-type="float" office:value="246.6" calcext:value-type="float">
            <text:p>246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75" calcext:value-type="float">
            <text:p>255.75</text:p>
          </table:table-cell>
          <table:table-cell office:value-type="float" office:value="246.9" calcext:value-type="float">
            <text:p>246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247.1" calcext:value-type="float">
            <text:p>24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25" calcext:value-type="float">
            <text:p>256.25</text:p>
          </table:table-cell>
          <table:table-cell office:value-type="float" office:value="247.3" calcext:value-type="float">
            <text:p>24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5" calcext:value-type="float">
            <text:p>256.5</text:p>
          </table:table-cell>
          <table:table-cell office:value-type="float" office:value="247.5" calcext:value-type="float">
            <text:p>24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75" calcext:value-type="float">
            <text:p>256.75</text:p>
          </table:table-cell>
          <table:table-cell office:value-type="float" office:value="247.7" calcext:value-type="float">
            <text:p>247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247.9" calcext:value-type="float">
            <text:p>247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25" calcext:value-type="float">
            <text:p>257.25</text:p>
          </table:table-cell>
          <table:table-cell office:value-type="float" office:value="248.1" calcext:value-type="float">
            <text:p>248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5" calcext:value-type="float">
            <text:p>257.5</text:p>
          </table:table-cell>
          <table:table-cell office:value-type="float" office:value="248.4" calcext:value-type="float">
            <text:p>24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75" calcext:value-type="float">
            <text:p>257.75</text:p>
          </table:table-cell>
          <table:table-cell office:value-type="float" office:value="248.6" calcext:value-type="float">
            <text:p>24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248.8" calcext:value-type="float">
            <text:p>248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25" calcext:value-type="float">
            <text:p>258.25</text:p>
          </table:table-cell>
          <table:table-cell office:value-type="float" office:value="249" calcext:value-type="float">
            <text:p>2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5" calcext:value-type="float">
            <text:p>258.5</text:p>
          </table:table-cell>
          <table:table-cell office:value-type="float" office:value="249.2" calcext:value-type="float">
            <text:p>2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75" calcext:value-type="float">
            <text:p>258.75</text:p>
          </table:table-cell>
          <table:table-cell office:value-type="float" office:value="249.4" calcext:value-type="float">
            <text:p>24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249.6" calcext:value-type="float">
            <text:p>24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25" calcext:value-type="float">
            <text:p>259.25</text:p>
          </table:table-cell>
          <table:table-cell office:value-type="float" office:value="249.9" calcext:value-type="float">
            <text:p>249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5" calcext:value-type="float">
            <text:p>259.5</text:p>
          </table:table-cell>
          <table:table-cell office:value-type="float" office:value="250.1" calcext:value-type="float">
            <text:p>25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75" calcext:value-type="float">
            <text:p>259.75</text:p>
          </table:table-cell>
          <table:table-cell office:value-type="float" office:value="250.3" calcext:value-type="float">
            <text:p>250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25" calcext:value-type="float">
            <text:p>260.25</text:p>
          </table:table-cell>
          <table:table-cell office:value-type="float" office:value="250.7" calcext:value-type="float">
            <text:p>25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5" calcext:value-type="float">
            <text:p>260.5</text:p>
          </table:table-cell>
          <table:table-cell office:value-type="float" office:value="250.9" calcext:value-type="float">
            <text:p>250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75" calcext:value-type="float">
            <text:p>260.75</text:p>
          </table:table-cell>
          <table:table-cell office:value-type="float" office:value="251.1" calcext:value-type="float">
            <text:p>25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251.4" calcext:value-type="float">
            <text:p>251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.25" calcext:value-type="float">
            <text:p>261.25</text:p>
          </table:table-cell>
          <table:table-cell office:value-type="float" office:value="251.6" calcext:value-type="float">
            <text:p>251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.5" calcext:value-type="float">
            <text:p>261.5</text:p>
          </table:table-cell>
          <table:table-cell office:value-type="float" office:value="252.5" calcext:value-type="float">
            <text:p>252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261.75" calcext:value-type="float">
            <text:p>261.75</text:p>
          </table:table-cell>
          <table:table-cell office:value-type="float" office:value="254.7" calcext:value-type="float">
            <text:p>254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256.9" calcext:value-type="float">
            <text:p>256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62.25" calcext:value-type="float">
            <text:p>262.25</text:p>
          </table:table-cell>
          <table:table-cell office:value-type="float" office:value="259.2" calcext:value-type="float">
            <text:p>259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float" office:value="262.5" calcext:value-type="float">
            <text:p>262.5</text:p>
          </table:table-cell>
          <table:table-cell office:value-type="float" office:value="261.5" calcext:value-type="float">
            <text:p>261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8"/>
          <table:table-cell office:value-type="float" office:value="262.75" calcext:value-type="float">
            <text:p>262.75</text:p>
          </table:table-cell>
          <table:table-cell office:value-type="float" office:value="263.8" calcext:value-type="float">
            <text:p>263.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265.6" calcext:value-type="float">
            <text:p>265.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8"/>
          <table:table-cell office:value-type="float" office:value="263.25" calcext:value-type="float">
            <text:p>263.25</text:p>
          </table:table-cell>
          <table:table-cell office:value-type="float" office:value="266.2" calcext:value-type="float">
            <text:p>266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3.5" calcext:value-type="float">
            <text:p>263.5</text:p>
          </table:table-cell>
          <table:table-cell office:value-type="float" office:value="266.8" calcext:value-type="float">
            <text:p>266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3.75" calcext:value-type="float">
            <text:p>263.75</text:p>
          </table:table-cell>
          <table:table-cell office:value-type="float" office:value="267.3" calcext:value-type="float">
            <text:p>267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267.9" calcext:value-type="float">
            <text:p>26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25" calcext:value-type="float">
            <text:p>264.25</text:p>
          </table:table-cell>
          <table:table-cell office:value-type="float" office:value="268.5" calcext:value-type="float">
            <text:p>268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5" calcext:value-type="float">
            <text:p>264.5</text:p>
          </table:table-cell>
          <table:table-cell office:value-type="float" office:value="269" calcext:value-type="float">
            <text:p>26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75" calcext:value-type="float">
            <text:p>264.75</text:p>
          </table:table-cell>
          <table:table-cell office:value-type="float" office:value="269.6" calcext:value-type="float">
            <text:p>269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270.2" calcext:value-type="float">
            <text:p>27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25" calcext:value-type="float">
            <text:p>265.25</text:p>
          </table:table-cell>
          <table:table-cell office:value-type="float" office:value="270.7" calcext:value-type="float">
            <text:p>270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5" calcext:value-type="float">
            <text:p>265.5</text:p>
          </table:table-cell>
          <table:table-cell office:value-type="float" office:value="271.3" calcext:value-type="float">
            <text:p>271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75" calcext:value-type="float">
            <text:p>265.75</text:p>
          </table:table-cell>
          <table:table-cell office:value-type="float" office:value="271.8" calcext:value-type="float">
            <text:p>271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272.4" calcext:value-type="float">
            <text:p>272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66.25" calcext:value-type="float">
            <text:p>266.25</text:p>
          </table:table-cell>
          <table:table-cell office:value-type="float" office:value="272.5" calcext:value-type="float">
            <text:p>27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6.5" calcext:value-type="float">
            <text:p>266.5</text:p>
          </table:table-cell>
          <table:table-cell office:value-type="float" office:value="272.6" calcext:value-type="float">
            <text:p>272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6.75" calcext:value-type="float">
            <text:p>266.75</text:p>
          </table:table-cell>
          <table:table-cell office:value-type="float" office:value="272.8" calcext:value-type="float">
            <text:p>272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272.9" calcext:value-type="float">
            <text:p>272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25" calcext:value-type="float">
            <text:p>267.25</text:p>
          </table:table-cell>
          <table:table-cell office:value-type="float" office:value="273" calcext:value-type="float">
            <text:p>2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5" calcext:value-type="float">
            <text:p>267.5</text:p>
          </table:table-cell>
          <table:table-cell office:value-type="float" office:value="273.2" calcext:value-type="float">
            <text:p>273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75" calcext:value-type="float">
            <text:p>267.75</text:p>
          </table:table-cell>
          <table:table-cell office:value-type="float" office:value="273.3" calcext:value-type="float">
            <text:p>273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273.4" calcext:value-type="float">
            <text:p>27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25" calcext:value-type="float">
            <text:p>268.25</text:p>
          </table:table-cell>
          <table:table-cell office:value-type="float" office:value="273.5" calcext:value-type="float">
            <text:p>273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5" calcext:value-type="float">
            <text:p>268.5</text:p>
          </table:table-cell>
          <table:table-cell office:value-type="float" office:value="273.7" calcext:value-type="float">
            <text:p>273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75" calcext:value-type="float">
            <text:p>268.75</text:p>
          </table:table-cell>
          <table:table-cell office:value-type="float" office:value="273.8" calcext:value-type="float">
            <text:p>273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273.9" calcext:value-type="float">
            <text:p>273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25" calcext:value-type="float">
            <text:p>269.25</text:p>
          </table:table-cell>
          <table:table-cell office:value-type="float" office:value="274" calcext:value-type="float">
            <text:p>2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5" calcext:value-type="float">
            <text:p>269.5</text:p>
          </table:table-cell>
          <table:table-cell office:value-type="float" office:value="274.2" calcext:value-type="float">
            <text:p>274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75" calcext:value-type="float">
            <text:p>269.75</text:p>
          </table:table-cell>
          <table:table-cell office:value-type="float" office:value="274.3" calcext:value-type="float">
            <text:p>27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274.4" calcext:value-type="float">
            <text:p>27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25" calcext:value-type="float">
            <text:p>270.25</text:p>
          </table:table-cell>
          <table:table-cell office:value-type="float" office:value="274.5" calcext:value-type="float">
            <text:p>27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5" calcext:value-type="float">
            <text:p>270.5</text:p>
          </table:table-cell>
          <table:table-cell office:value-type="float" office:value="274.7" calcext:value-type="float">
            <text:p>27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75" calcext:value-type="float">
            <text:p>270.75</text:p>
          </table:table-cell>
          <table:table-cell office:value-type="float" office:value="274.8" calcext:value-type="float">
            <text:p>27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" calcext:value-type="float">
            <text:p>271</text:p>
          </table:table-cell>
          <table:table-cell office:value-type="float" office:value="274.9" calcext:value-type="float">
            <text:p>27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25" calcext:value-type="float">
            <text:p>271.25</text:p>
          </table:table-cell>
          <table:table-cell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5" calcext:value-type="float">
            <text:p>271.5</text:p>
          </table:table-cell>
          <table:table-cell office:value-type="float" office:value="275.2" calcext:value-type="float">
            <text:p>275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75" calcext:value-type="float">
            <text:p>271.75</text:p>
          </table:table-cell>
          <table:table-cell office:value-type="float" office:value="275.3" calcext:value-type="float">
            <text:p>275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275.4" calcext:value-type="float">
            <text:p>275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25" calcext:value-type="float">
            <text:p>272.25</text:p>
          </table:table-cell>
          <table:table-cell office:value-type="float" office:value="275.6" calcext:value-type="float">
            <text:p>275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5" calcext:value-type="float">
            <text:p>272.5</text:p>
          </table:table-cell>
          <table:table-cell office:value-type="float" office:value="275.7" calcext:value-type="float">
            <text:p>275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75" calcext:value-type="float">
            <text:p>272.75</text:p>
          </table:table-cell>
          <table:table-cell office:value-type="float" office:value="275.8" calcext:value-type="float">
            <text:p>275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275.9" calcext:value-type="float">
            <text:p>275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25" calcext:value-type="float">
            <text:p>273.25</text:p>
          </table:table-cell>
          <table:table-cell office:value-type="float" office:value="276.1" calcext:value-type="float">
            <text:p>276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5" calcext:value-type="float">
            <text:p>273.5</text:p>
          </table:table-cell>
          <table:table-cell office:value-type="float" office:value="276.2" calcext:value-type="float">
            <text:p>276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75" calcext:value-type="float">
            <text:p>273.75</text:p>
          </table:table-cell>
          <table:table-cell office:value-type="float" office:value="276.3" calcext:value-type="float">
            <text:p>27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276.4" calcext:value-type="float">
            <text:p>27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25" calcext:value-type="float">
            <text:p>274.25</text:p>
          </table:table-cell>
          <table:table-cell office:value-type="float" office:value="276.6" calcext:value-type="float">
            <text:p>27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5" calcext:value-type="float">
            <text:p>274.5</text:p>
          </table:table-cell>
          <table:table-cell office:value-type="float" office:value="276.7" calcext:value-type="float">
            <text:p>276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75" calcext:value-type="float">
            <text:p>274.75</text:p>
          </table:table-cell>
          <table:table-cell office:value-type="float" office:value="276.8" calcext:value-type="float">
            <text:p>276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276.9" calcext:value-type="float">
            <text:p>276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25" calcext:value-type="float">
            <text:p>275.25</text:p>
          </table:table-cell>
          <table:table-cell office:value-type="float" office:value="277.1" calcext:value-type="float">
            <text:p>277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5" calcext:value-type="float">
            <text:p>275.5</text:p>
          </table:table-cell>
          <table:table-cell office:value-type="float" office:value="277.2" calcext:value-type="float">
            <text:p>277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75" calcext:value-type="float">
            <text:p>275.75</text:p>
          </table:table-cell>
          <table:table-cell office:value-type="float" office:value="277.3" calcext:value-type="float">
            <text:p>277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277.5" calcext:value-type="float">
            <text:p>277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25" calcext:value-type="float">
            <text:p>276.25</text:p>
          </table:table-cell>
          <table:table-cell office:value-type="float" office:value="277.6" calcext:value-type="float">
            <text:p>277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5" calcext:value-type="float">
            <text:p>276.5</text:p>
          </table:table-cell>
          <table:table-cell office:value-type="float" office:value="277.7" calcext:value-type="float">
            <text:p>277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75" calcext:value-type="float">
            <text:p>276.75</text:p>
          </table:table-cell>
          <table:table-cell office:value-type="float" office:value="277.8" calcext:value-type="float">
            <text:p>277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25" calcext:value-type="float">
            <text:p>277.25</text:p>
          </table:table-cell>
          <table:table-cell office:value-type="float" office:value="278.1" calcext:value-type="float">
            <text:p>278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5" calcext:value-type="float">
            <text:p>277.5</text:p>
          </table:table-cell>
          <table:table-cell office:value-type="float" office:value="278.2" calcext:value-type="float">
            <text:p>278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75" calcext:value-type="float">
            <text:p>277.75</text:p>
          </table:table-cell>
          <table:table-cell office:value-type="float" office:value="278.3" calcext:value-type="float">
            <text:p>278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278.5" calcext:value-type="float">
            <text:p>278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25" calcext:value-type="float">
            <text:p>278.25</text:p>
          </table:table-cell>
          <table:table-cell office:value-type="float" office:value="278.6" calcext:value-type="float">
            <text:p>278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5" calcext:value-type="float">
            <text:p>278.5</text:p>
          </table:table-cell>
          <table:table-cell office:value-type="float" office:value="278.7" calcext:value-type="float">
            <text:p>278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75" calcext:value-type="float">
            <text:p>278.75</text:p>
          </table:table-cell>
          <table:table-cell office:value-type="float" office:value="278.8" calcext:value-type="float">
            <text:p>278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279" calcext:value-type="float">
            <text:p>2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25" calcext:value-type="float">
            <text:p>279.25</text:p>
          </table:table-cell>
          <table:table-cell office:value-type="float" office:value="279.1" calcext:value-type="float">
            <text:p>279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5" calcext:value-type="float">
            <text:p>279.5</text:p>
          </table:table-cell>
          <table:table-cell office:value-type="float" office:value="279.2" calcext:value-type="float">
            <text:p>279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75" calcext:value-type="float">
            <text:p>279.75</text:p>
          </table:table-cell>
          <table:table-cell office:value-type="float" office:value="279.4" calcext:value-type="float">
            <text:p>279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279.7" calcext:value-type="float">
            <text:p>279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25" calcext:value-type="float">
            <text:p>280.25</text:p>
          </table:table-cell>
          <table:table-cell office:value-type="float" office:value="280" calcext:value-type="float">
            <text:p>2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5" calcext:value-type="float">
            <text:p>280.5</text:p>
          </table:table-cell>
          <table:table-cell office:value-type="float" office:value="280.3" calcext:value-type="float">
            <text:p>280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75" calcext:value-type="float">
            <text:p>280.75</text:p>
          </table:table-cell>
          <table:table-cell office:value-type="float" office:value="280.6" calcext:value-type="float">
            <text:p>28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.25" calcext:value-type="float">
            <text:p>281.25</text:p>
          </table:table-cell>
          <table:table-cell office:value-type="float" office:value="281.2" calcext:value-type="float">
            <text:p>28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281.5" calcext:value-type="float">
            <text:p>281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.75" calcext:value-type="float">
            <text:p>281.75</text:p>
          </table:table-cell>
          <table:table-cell office:value-type="float" office:value="281.8" calcext:value-type="float">
            <text:p>281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282.1" calcext:value-type="float">
            <text:p>28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25" calcext:value-type="float">
            <text:p>282.25</text:p>
          </table:table-cell>
          <table:table-cell office:value-type="float" office:value="282.4" calcext:value-type="float">
            <text:p>282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5" calcext:value-type="float">
            <text:p>282.5</text:p>
          </table:table-cell>
          <table:table-cell office:value-type="float" office:value="282.8" calcext:value-type="float">
            <text:p>28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75" calcext:value-type="float">
            <text:p>282.75</text:p>
          </table:table-cell>
          <table:table-cell office:value-type="float" office:value="283.1" calcext:value-type="float">
            <text:p>28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283.4" calcext:value-type="float">
            <text:p>28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25" calcext:value-type="float">
            <text:p>283.25</text:p>
          </table:table-cell>
          <table:table-cell office:value-type="float" office:value="283.7" calcext:value-type="float">
            <text:p>28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5" calcext:value-type="float">
            <text:p>283.5</text:p>
          </table:table-cell>
          <table:table-cell office:value-type="float" office:value="284" calcext:value-type="float">
            <text:p>28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75" calcext:value-type="float">
            <text:p>283.75</text:p>
          </table:table-cell>
          <table:table-cell office:value-type="float" office:value="284.3" calcext:value-type="float">
            <text:p>28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284.6" calcext:value-type="float">
            <text:p>28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25" calcext:value-type="float">
            <text:p>284.25</text:p>
          </table:table-cell>
          <table:table-cell office:value-type="float" office:value="284.9" calcext:value-type="float">
            <text:p>28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5" calcext:value-type="float">
            <text:p>284.5</text:p>
          </table:table-cell>
          <table:table-cell office:value-type="float" office:value="285.2" calcext:value-type="float">
            <text:p>28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75" calcext:value-type="float">
            <text:p>284.75</text:p>
          </table:table-cell>
          <table:table-cell office:value-type="float" office:value="285.5" calcext:value-type="float">
            <text:p>28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285.8" calcext:value-type="float">
            <text:p>28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.25" calcext:value-type="float">
            <text:p>285.25</text:p>
          </table:table-cell>
          <table:table-cell office:value-type="float" office:value="286.1" calcext:value-type="float">
            <text:p>28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.5" calcext:value-type="float">
            <text:p>285.5</text:p>
          </table:table-cell>
          <table:table-cell office:value-type="float" office:value="293.7" calcext:value-type="float">
            <text:p>293.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8"/>
          <table:table-cell office:value-type="float" office:value="285.75" calcext:value-type="float">
            <text:p>285.75</text:p>
          </table:table-cell>
          <table:table-cell office:value-type="float" office:value="295.1" calcext:value-type="float">
            <text:p>295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" calcext:value-type="float">
            <text:p>286</text:p>
          </table:table-cell>
          <table:table-cell office:value-type="float" office:value="296.4" calcext:value-type="float">
            <text:p>296.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25" calcext:value-type="float">
            <text:p>286.25</text:p>
          </table:table-cell>
          <table:table-cell office:value-type="float" office:value="297.7" calcext:value-type="float">
            <text:p>297.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5" calcext:value-type="float">
            <text:p>286.5</text:p>
          </table:table-cell>
          <table:table-cell office:value-type="float" office:value="299" calcext:value-type="float">
            <text:p>29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75" calcext:value-type="float">
            <text:p>286.75</text:p>
          </table:table-cell>
          <table:table-cell office:value-type="float" office:value="300.3" calcext:value-type="float">
            <text:p>300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301.4" calcext:value-type="float">
            <text:p>301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25" calcext:value-type="float">
            <text:p>287.25</text:p>
          </table:table-cell>
          <table:table-cell office:value-type="float" office:value="302.5" calcext:value-type="float">
            <text:p>302.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5" calcext:value-type="float">
            <text:p>287.5</text:p>
          </table:table-cell>
          <table:table-cell office:value-type="float" office:value="303.6" calcext:value-type="float">
            <text:p>303.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75" calcext:value-type="float">
            <text:p>287.75</text:p>
          </table:table-cell>
          <table:table-cell office:value-type="float" office:value="304.7" calcext:value-type="float">
            <text:p>304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305.8" calcext:value-type="float">
            <text:p>305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.25" calcext:value-type="float">
            <text:p>288.25</text:p>
          </table:table-cell>
          <table:table-cell office:value-type="float" office:value="306.9" calcext:value-type="float">
            <text:p>306.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.5" calcext:value-type="float">
            <text:p>288.5</text:p>
          </table:table-cell>
          <table:table-cell office:value-type="float" office:value="307.6" calcext:value-type="float">
            <text:p>307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88.75" calcext:value-type="float">
            <text:p>288.75</text:p>
          </table:table-cell>
          <table:table-cell office:value-type="float" office:value="307.9" calcext:value-type="float">
            <text:p>307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308.3" calcext:value-type="float">
            <text:p>308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25" calcext:value-type="float">
            <text:p>289.25</text:p>
          </table:table-cell>
          <table:table-cell office:value-type="float" office:value="308.6" calcext:value-type="float">
            <text:p>308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5" calcext:value-type="float">
            <text:p>289.5</text:p>
          </table:table-cell>
          <table:table-cell office:value-type="float" office:value="309" calcext:value-type="float">
            <text:p>30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75" calcext:value-type="float">
            <text:p>289.75</text:p>
          </table:table-cell>
          <table:table-cell office:value-type="float" office:value="309.3" calcext:value-type="float">
            <text:p>309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309.7" calcext:value-type="float">
            <text:p>309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25" calcext:value-type="float">
            <text:p>290.25</text:p>
          </table:table-cell>
          <table:table-cell office:value-type="float" office:value="310" calcext:value-type="float">
            <text:p>31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5" calcext:value-type="float">
            <text:p>290.5</text:p>
          </table:table-cell>
          <table:table-cell office:value-type="float" office:value="310.4" calcext:value-type="float">
            <text:p>31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75" calcext:value-type="float">
            <text:p>290.75</text:p>
          </table:table-cell>
          <table:table-cell office:value-type="float" office:value="310.7" calcext:value-type="float">
            <text:p>310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311.1" calcext:value-type="float">
            <text:p>31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25" calcext:value-type="float">
            <text:p>291.25</text:p>
          </table:table-cell>
          <table:table-cell office:value-type="float" office:value="311.4" calcext:value-type="float">
            <text:p>311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5" calcext:value-type="float">
            <text:p>291.5</text:p>
          </table:table-cell>
          <table:table-cell office:value-type="float" office:value="311.8" calcext:value-type="float">
            <text:p>31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75" calcext:value-type="float">
            <text:p>291.75</text:p>
          </table:table-cell>
          <table:table-cell office:value-type="float" office:value="312.1" calcext:value-type="float">
            <text:p>312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25" calcext:value-type="float">
            <text:p>292.25</text:p>
          </table:table-cell>
          <table:table-cell office:value-type="float" office:value="312.8" calcext:value-type="float">
            <text:p>312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5" calcext:value-type="float">
            <text:p>292.5</text:p>
          </table:table-cell>
          <table:table-cell office:value-type="float" office:value="313.2" calcext:value-type="float">
            <text:p>31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75" calcext:value-type="float">
            <text:p>292.75</text:p>
          </table:table-cell>
          <table:table-cell office:value-type="float" office:value="313.6" calcext:value-type="float">
            <text:p>313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" calcext:value-type="float">
            <text:p>293</text:p>
          </table:table-cell>
          <table:table-cell office:value-type="float" office:value="313.9" calcext:value-type="float">
            <text:p>31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.25" calcext:value-type="float">
            <text:p>293.25</text:p>
          </table:table-cell>
          <table:table-cell office:value-type="float" office:value="314.3" calcext:value-type="float">
            <text:p>314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.5" calcext:value-type="float">
            <text:p>293.5</text:p>
          </table:table-cell>
          <table:table-cell office:value-type="float" office:value="314.5" calcext:value-type="float">
            <text:p>3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93.75" calcext:value-type="float">
            <text:p>293.75</text:p>
          </table:table-cell>
          <table:table-cell office:value-type="float" office:value="314.7" calcext:value-type="float">
            <text:p>314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314.9" calcext:value-type="float">
            <text:p>314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25" calcext:value-type="float">
            <text:p>294.25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5" calcext:value-type="float">
            <text:p>294.5</text:p>
          </table:table-cell>
          <table:table-cell office:value-type="float" office:value="315.2" calcext:value-type="float">
            <text:p>31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75" calcext:value-type="float">
            <text:p>294.75</text:p>
          </table:table-cell>
          <table:table-cell office:value-type="float" office:value="315.4" calcext:value-type="float">
            <text:p>31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315.6" calcext:value-type="float">
            <text:p>315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25" calcext:value-type="float">
            <text:p>295.25</text:p>
          </table:table-cell>
          <table:table-cell office:value-type="float" office:value="315.7" calcext:value-type="float">
            <text:p>31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5" calcext:value-type="float">
            <text:p>295.5</text:p>
          </table:table-cell>
          <table:table-cell office:value-type="float" office:value="315.9" calcext:value-type="float">
            <text:p>315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75" calcext:value-type="float">
            <text:p>295.75</text:p>
          </table:table-cell>
          <table:table-cell office:value-type="float" office:value="316.1" calcext:value-type="float">
            <text:p>316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316.3" calcext:value-type="float">
            <text:p>316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25" calcext:value-type="float">
            <text:p>296.25</text:p>
          </table:table-cell>
          <table:table-cell office:value-type="float" office:value="316.4" calcext:value-type="float">
            <text:p>316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5" calcext:value-type="float">
            <text:p>296.5</text:p>
          </table:table-cell>
          <table:table-cell office:value-type="float" office:value="316.6" calcext:value-type="float">
            <text:p>31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75" calcext:value-type="float">
            <text:p>296.75</text:p>
          </table:table-cell>
          <table:table-cell office:value-type="float" office:value="316.8" calcext:value-type="float">
            <text:p>31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25" calcext:value-type="float">
            <text:p>297.25</text:p>
          </table:table-cell>
          <table:table-cell office:value-type="float" office:value="317.1" calcext:value-type="float">
            <text:p>31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5" calcext:value-type="float">
            <text:p>297.5</text:p>
          </table:table-cell>
          <table:table-cell office:value-type="float" office:value="317.3" calcext:value-type="float">
            <text:p>317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75" calcext:value-type="float">
            <text:p>297.75</text:p>
          </table:table-cell>
          <table:table-cell office:value-type="float" office:value="317.5" calcext:value-type="float">
            <text:p>31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317.7" calcext:value-type="float">
            <text:p>31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25" calcext:value-type="float">
            <text:p>298.25</text:p>
          </table:table-cell>
          <table:table-cell office:value-type="float" office:value="317.8" calcext:value-type="float">
            <text:p>31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5" calcext:value-type="float">
            <text:p>298.5</text:p>
          </table:table-cell>
          <table:table-cell office:value-type="float" office:value="318" calcext:value-type="float">
            <text:p>31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75" calcext:value-type="float">
            <text:p>298.75</text:p>
          </table:table-cell>
          <table:table-cell office:value-type="float" office:value="318.2" calcext:value-type="float">
            <text:p>318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318.4" calcext:value-type="float">
            <text:p>31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25" calcext:value-type="float">
            <text:p>299.25</text:p>
          </table:table-cell>
          <table:table-cell office:value-type="float" office:value="318.5" calcext:value-type="float">
            <text:p>318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5" calcext:value-type="float">
            <text:p>299.5</text:p>
          </table:table-cell>
          <table:table-cell office:value-type="float" office:value="318.7" calcext:value-type="float">
            <text:p>31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75" calcext:value-type="float">
            <text:p>299.75</text:p>
          </table:table-cell>
          <table:table-cell office:value-type="float" office:value="318.9" calcext:value-type="float">
            <text:p>318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319.1" calcext:value-type="float">
            <text:p>319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25" calcext:value-type="float">
            <text:p>300.25</text:p>
          </table:table-cell>
          <table:table-cell office:value-type="float" office:value="319.3" calcext:value-type="float">
            <text:p>319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5" calcext:value-type="float">
            <text:p>300.5</text:p>
          </table:table-cell>
          <table:table-cell office:value-type="float" office:value="319.4" calcext:value-type="float">
            <text:p>319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75" calcext:value-type="float">
            <text:p>300.75</text:p>
          </table:table-cell>
          <table:table-cell office:value-type="float" office:value="319.6" calcext:value-type="float">
            <text:p>319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319.8" calcext:value-type="float">
            <text:p>319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25" calcext:value-type="float">
            <text:p>301.25</text:p>
          </table:table-cell>
          <table:table-cell office:value-type="float" office:value="320" calcext:value-type="float">
            <text:p>32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5" calcext:value-type="float">
            <text:p>301.5</text:p>
          </table:table-cell>
          <table:table-cell office:value-type="float" office:value="320.1" calcext:value-type="float">
            <text:p>320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75" calcext:value-type="float">
            <text:p>301.75</text:p>
          </table:table-cell>
          <table:table-cell office:value-type="float" office:value="320.3" calcext:value-type="float">
            <text:p>32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320.5" calcext:value-type="float">
            <text:p>32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25" calcext:value-type="float">
            <text:p>302.25</text:p>
          </table:table-cell>
          <table:table-cell office:value-type="float" office:value="320.7" calcext:value-type="float">
            <text:p>32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5" calcext:value-type="float">
            <text:p>302.5</text:p>
          </table:table-cell>
          <table:table-cell office:value-type="float" office:value="320.8" calcext:value-type="float">
            <text:p>32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75" calcext:value-type="float">
            <text:p>302.75</text:p>
          </table:table-cell>
          <table:table-cell office:value-type="float" office:value="321" calcext:value-type="float">
            <text:p>3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321.2" calcext:value-type="float">
            <text:p>321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.25" calcext:value-type="float">
            <text:p>303.25</text:p>
          </table:table-cell>
          <table:table-cell office:value-type="float" office:value="321.4" calcext:value-type="float">
            <text:p>32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.5" calcext:value-type="float">
            <text:p>303.5</text:p>
          </table:table-cell>
          <table:table-cell office:value-type="float" office:value="321.6" calcext:value-type="float">
            <text:p>321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03.75" calcext:value-type="float">
            <text:p>303.75</text:p>
          </table:table-cell>
          <table:table-cell office:value-type="float" office:value="321.9" calcext:value-type="float">
            <text:p>32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322.2" calcext:value-type="float">
            <text:p>322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25" calcext:value-type="float">
            <text:p>304.25</text:p>
          </table:table-cell>
          <table:table-cell office:value-type="float" office:value="322.5" calcext:value-type="float">
            <text:p>32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5" calcext:value-type="float">
            <text:p>304.5</text:p>
          </table:table-cell>
          <table:table-cell office:value-type="float" office:value="322.8" calcext:value-type="float">
            <text:p>32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75" calcext:value-type="float">
            <text:p>304.75</text:p>
          </table:table-cell>
          <table:table-cell office:value-type="float" office:value="323.1" calcext:value-type="float">
            <text:p>32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323.4" calcext:value-type="float">
            <text:p>32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25" calcext:value-type="float">
            <text:p>305.25</text:p>
          </table:table-cell>
          <table:table-cell office:value-type="float" office:value="323.7" calcext:value-type="float">
            <text:p>32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5" calcext:value-type="float">
            <text:p>305.5</text:p>
          </table:table-cell>
          <table:table-cell office:value-type="float" office:value="324" calcext:value-type="float">
            <text:p>32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75" calcext:value-type="float">
            <text:p>305.75</text:p>
          </table:table-cell>
          <table:table-cell office:value-type="float" office:value="324.3" calcext:value-type="float">
            <text:p>32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324.6" calcext:value-type="float">
            <text:p>32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25" calcext:value-type="float">
            <text:p>306.25</text:p>
          </table:table-cell>
          <table:table-cell office:value-type="float" office:value="324.9" calcext:value-type="float">
            <text:p>32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5" calcext:value-type="float">
            <text:p>306.5</text:p>
          </table:table-cell>
          <table:table-cell office:value-type="float" office:value="325.2" calcext:value-type="float">
            <text:p>32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75" calcext:value-type="float">
            <text:p>306.75</text:p>
          </table:table-cell>
          <table:table-cell office:value-type="float" office:value="325.5" calcext:value-type="float">
            <text:p>32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325.7" calcext:value-type="float">
            <text:p>325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25" calcext:value-type="float">
            <text:p>307.25</text:p>
          </table:table-cell>
          <table:table-cell office:value-type="float" office:value="326" calcext:value-type="float">
            <text:p>32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5" calcext:value-type="float">
            <text:p>307.5</text:p>
          </table:table-cell>
          <table:table-cell office:value-type="float" office:value="326.3" calcext:value-type="float">
            <text:p>326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75" calcext:value-type="float">
            <text:p>307.75</text:p>
          </table:table-cell>
          <table:table-cell office:value-type="float" office:value="326.6" calcext:value-type="float">
            <text:p>326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326.9" calcext:value-type="float">
            <text:p>326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25" calcext:value-type="float">
            <text:p>308.25</text:p>
          </table:table-cell>
          <table:table-cell office:value-type="float" office:value="327.2" calcext:value-type="float">
            <text:p>327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5" calcext:value-type="float">
            <text:p>308.5</text:p>
          </table:table-cell>
          <table:table-cell office:value-type="float" office:value="327.5" calcext:value-type="float">
            <text:p>32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75" calcext:value-type="float">
            <text:p>308.75</text:p>
          </table:table-cell>
          <table:table-cell office:value-type="float" office:value="327.8" calcext:value-type="float">
            <text:p>327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328.1" calcext:value-type="float">
            <text:p>328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.25" calcext:value-type="float">
            <text:p>309.25</text:p>
          </table:table-cell>
          <table:table-cell office:value-type="float" office:value="328.4" calcext:value-type="float">
            <text:p>328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.5" calcext:value-type="float">
            <text:p>309.5</text:p>
          </table:table-cell>
          <table:table-cell office:value-type="float" office:value="336.4" calcext:value-type="float">
            <text:p>336.4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table:number-columns-repeated="8"/>
          <table:table-cell office:value-type="float" office:value="309.75" calcext:value-type="float">
            <text:p>309.75</text:p>
          </table:table-cell>
          <table:table-cell office:value-type="float" office:value="338.4" calcext:value-type="float">
            <text:p>338.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340.5" calcext:value-type="float">
            <text:p>340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.25" calcext:value-type="float">
            <text:p>310.25</text:p>
          </table:table-cell>
          <table:table-cell office:value-type="float" office:value="342.5" calcext:value-type="float">
            <text:p>342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.5" calcext:value-type="float">
            <text:p>310.5</text:p>
          </table:table-cell>
          <table:table-cell office:value-type="float" office:value="343.8" calcext:value-type="float">
            <text:p>343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310.75" calcext:value-type="float">
            <text:p>310.75</text:p>
          </table:table-cell>
          <table:table-cell office:value-type="float" office:value="344.9" calcext:value-type="float">
            <text:p>344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346.1" calcext:value-type="float">
            <text:p>346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25" calcext:value-type="float">
            <text:p>311.25</text:p>
          </table:table-cell>
          <table:table-cell office:value-type="float" office:value="347.2" calcext:value-type="float">
            <text:p>347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5" calcext:value-type="float">
            <text:p>311.5</text:p>
          </table:table-cell>
          <table:table-cell office:value-type="float" office:value="348.3" calcext:value-type="float">
            <text:p>348.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75" calcext:value-type="float">
            <text:p>311.75</text:p>
          </table:table-cell>
          <table:table-cell office:value-type="float" office:value="349.5" calcext:value-type="float">
            <text:p>349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350.2" calcext:value-type="float">
            <text:p>350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312.25" calcext:value-type="float">
            <text:p>312.25</text:p>
          </table:table-cell>
          <table:table-cell office:value-type="float" office:value="350.7" calcext:value-type="float">
            <text:p>350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2.5" calcext:value-type="float">
            <text:p>312.5</text:p>
          </table:table-cell>
          <table:table-cell office:value-type="float" office:value="351.1" calcext:value-type="float">
            <text:p>351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2.75" calcext:value-type="float">
            <text:p>312.75</text:p>
          </table:table-cell>
          <table:table-cell office:value-type="float" office:value="351.6" calcext:value-type="float">
            <text:p>35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352" calcext:value-type="float">
            <text:p>35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25" calcext:value-type="float">
            <text:p>313.25</text:p>
          </table:table-cell>
          <table:table-cell office:value-type="float" office:value="352.5" calcext:value-type="float">
            <text:p>352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5" calcext:value-type="float">
            <text:p>313.5</text:p>
          </table:table-cell>
          <table:table-cell office:value-type="float" office:value="353" calcext:value-type="float">
            <text:p>3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75" calcext:value-type="float">
            <text:p>313.75</text:p>
          </table:table-cell>
          <table:table-cell office:value-type="float" office:value="353.4" calcext:value-type="float">
            <text:p>353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353.9" calcext:value-type="float">
            <text:p>353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25" calcext:value-type="float">
            <text:p>314.25</text:p>
          </table:table-cell>
          <table:table-cell office:value-type="float" office:value="354.3" calcext:value-type="float">
            <text:p>354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5" calcext:value-type="float">
            <text:p>314.5</text:p>
          </table:table-cell>
          <table:table-cell office:value-type="float" office:value="354.8" calcext:value-type="float">
            <text:p>354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75" calcext:value-type="float">
            <text:p>314.75</text:p>
          </table:table-cell>
          <table:table-cell office:value-type="float" office:value="355.2" calcext:value-type="float">
            <text:p>355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355.7" calcext:value-type="float">
            <text:p>35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25" calcext:value-type="float">
            <text:p>315.25</text:p>
          </table:table-cell>
          <table:table-cell office:value-type="float" office:value="356.1" calcext:value-type="float">
            <text:p>356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5" calcext:value-type="float">
            <text:p>315.5</text:p>
          </table:table-cell>
          <table:table-cell office:value-type="float" office:value="356.6" calcext:value-type="float">
            <text:p>356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75" calcext:value-type="float">
            <text:p>315.75</text:p>
          </table:table-cell>
          <table:table-cell office:value-type="float" office:value="357" calcext:value-type="float">
            <text:p>35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357.3" calcext:value-type="float">
            <text:p>35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16.25" calcext:value-type="float">
            <text:p>316.25</text:p>
          </table:table-cell>
          <table:table-cell office:value-type="float" office:value="357.5" calcext:value-type="float">
            <text:p>35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6.5" calcext:value-type="float">
            <text:p>316.5</text:p>
          </table:table-cell>
          <table:table-cell office:value-type="float" office:value="357.8" calcext:value-type="float">
            <text:p>357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6.75" calcext:value-type="float">
            <text:p>316.75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358.2" calcext:value-type="float">
            <text:p>358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25" calcext:value-type="float">
            <text:p>317.25</text:p>
          </table:table-cell>
          <table:table-cell office:value-type="float" office:value="358.4" calcext:value-type="float">
            <text:p>35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5" calcext:value-type="float">
            <text:p>317.5</text:p>
          </table:table-cell>
          <table:table-cell office:value-type="float" office:value="358.6" calcext:value-type="float">
            <text:p>35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75" calcext:value-type="float">
            <text:p>317.75</text:p>
          </table:table-cell>
          <table:table-cell office:value-type="float" office:value="358.9" calcext:value-type="float">
            <text:p>358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359.1" calcext:value-type="float">
            <text:p>359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25" calcext:value-type="float">
            <text:p>318.25</text:p>
          </table:table-cell>
          <table:table-cell office:value-type="float" office:value="359.3" calcext:value-type="float">
            <text:p>35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5" calcext:value-type="float">
            <text:p>318.5</text:p>
          </table:table-cell>
          <table:table-cell office:value-type="float" office:value="359.5" calcext:value-type="float">
            <text:p>359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75" calcext:value-type="float">
            <text:p>318.75</text:p>
          </table:table-cell>
          <table:table-cell office:value-type="float" office:value="359.8" calcext:value-type="float">
            <text:p>35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25" calcext:value-type="float">
            <text:p>319.25</text:p>
          </table:table-cell>
          <table:table-cell office:value-type="float" office:value="360.2" calcext:value-type="float">
            <text:p>360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5" calcext:value-type="float">
            <text:p>319.5</text:p>
          </table:table-cell>
          <table:table-cell office:value-type="float" office:value="360.4" calcext:value-type="float">
            <text:p>360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75" calcext:value-type="float">
            <text:p>319.75</text:p>
          </table:table-cell>
          <table:table-cell office:value-type="float" office:value="360.7" calcext:value-type="float">
            <text:p>36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360.9" calcext:value-type="float">
            <text:p>360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25" calcext:value-type="float">
            <text:p>320.25</text:p>
          </table:table-cell>
          <table:table-cell office:value-type="float" office:value="361.1" calcext:value-type="float">
            <text:p>36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5" calcext:value-type="float">
            <text:p>320.5</text:p>
          </table:table-cell>
          <table:table-cell office:value-type="float" office:value="361.3" calcext:value-type="float">
            <text:p>361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75" calcext:value-type="float">
            <text:p>320.75</text:p>
          </table:table-cell>
          <table:table-cell office:value-type="float" office:value="361.5" calcext:value-type="float">
            <text:p>361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361.8" calcext:value-type="float">
            <text:p>361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25" calcext:value-type="float">
            <text:p>321.25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5" calcext:value-type="float">
            <text:p>321.5</text:p>
          </table:table-cell>
          <table:table-cell office:value-type="float" office:value="362.2" calcext:value-type="float">
            <text:p>36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75" calcext:value-type="float">
            <text:p>321.75</text:p>
          </table:table-cell>
          <table:table-cell office:value-type="float" office:value="362.4" calcext:value-type="float">
            <text:p>362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362.7" calcext:value-type="float">
            <text:p>362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25" calcext:value-type="float">
            <text:p>322.25</text:p>
          </table:table-cell>
          <table:table-cell office:value-type="float" office:value="362.9" calcext:value-type="float">
            <text:p>362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5" calcext:value-type="float">
            <text:p>322.5</text:p>
          </table:table-cell>
          <table:table-cell office:value-type="float" office:value="363.1" calcext:value-type="float">
            <text:p>363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75" calcext:value-type="float">
            <text:p>322.75</text:p>
          </table:table-cell>
          <table:table-cell office:value-type="float" office:value="363.3" calcext:value-type="float">
            <text:p>363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363.6" calcext:value-type="float">
            <text:p>36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25" calcext:value-type="float">
            <text:p>323.25</text:p>
          </table:table-cell>
          <table:table-cell office:value-type="float" office:value="363.8" calcext:value-type="float">
            <text:p>36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5" calcext:value-type="float">
            <text:p>323.5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75" calcext:value-type="float">
            <text:p>323.75</text:p>
          </table:table-cell>
          <table:table-cell office:value-type="float" office:value="364.2" calcext:value-type="float">
            <text:p>364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364.5" calcext:value-type="float">
            <text:p>36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24.25" calcext:value-type="float">
            <text:p>324.25</text:p>
          </table:table-cell>
          <table:table-cell office:value-type="float" office:value="364.8" calcext:value-type="float">
            <text:p>36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4.5" calcext:value-type="float">
            <text:p>324.5</text:p>
          </table:table-cell>
          <table:table-cell office:value-type="float" office:value="365" calcext:value-type="float">
            <text:p>3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4.75" calcext:value-type="float">
            <text:p>324.75</text:p>
          </table:table-cell>
          <table:table-cell office:value-type="float" office:value="365.3" calcext:value-type="float">
            <text:p>36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365.6" calcext:value-type="float">
            <text:p>36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25" calcext:value-type="float">
            <text:p>325.25</text:p>
          </table:table-cell>
          <table:table-cell office:value-type="float" office:value="365.9" calcext:value-type="float">
            <text:p>36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5" calcext:value-type="float">
            <text:p>325.5</text:p>
          </table:table-cell>
          <table:table-cell office:value-type="float" office:value="366.2" calcext:value-type="float">
            <text:p>366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75" calcext:value-type="float">
            <text:p>325.75</text:p>
          </table:table-cell>
          <table:table-cell office:value-type="float" office:value="366.4" calcext:value-type="float">
            <text:p>36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366.7" calcext:value-type="float">
            <text:p>36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25" calcext:value-type="float">
            <text:p>326.25</text:p>
          </table:table-cell>
          <table:table-cell office:value-type="float" office:value="367" calcext:value-type="float">
            <text:p>36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5" calcext:value-type="float">
            <text:p>326.5</text:p>
          </table:table-cell>
          <table:table-cell office:value-type="float" office:value="367.3" calcext:value-type="float">
            <text:p>36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75" calcext:value-type="float">
            <text:p>326.75</text:p>
          </table:table-cell>
          <table:table-cell office:value-type="float" office:value="367.6" calcext:value-type="float">
            <text:p>367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367.9" calcext:value-type="float">
            <text:p>367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25" calcext:value-type="float">
            <text:p>327.25</text:p>
          </table:table-cell>
          <table:table-cell office:value-type="float" office:value="368.1" calcext:value-type="float">
            <text:p>368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5" calcext:value-type="float">
            <text:p>327.5</text:p>
          </table:table-cell>
          <table:table-cell office:value-type="float" office:value="368.4" calcext:value-type="float">
            <text:p>368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75" calcext:value-type="float">
            <text:p>327.75</text:p>
          </table:table-cell>
          <table:table-cell office:value-type="float" office:value="368.7" calcext:value-type="float">
            <text:p>36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25" calcext:value-type="float">
            <text:p>328.25</text:p>
          </table:table-cell>
          <table:table-cell office:value-type="float" office:value="369.3" calcext:value-type="float">
            <text:p>369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5" calcext:value-type="float">
            <text:p>328.5</text:p>
          </table:table-cell>
          <table:table-cell office:value-type="float" office:value="369.5" calcext:value-type="float">
            <text:p>36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75" calcext:value-type="float">
            <text:p>328.75</text:p>
          </table:table-cell>
          <table:table-cell office:value-type="float" office:value="369.8" calcext:value-type="float">
            <text:p>36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370.1" calcext:value-type="float">
            <text:p>37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25" calcext:value-type="float">
            <text:p>329.25</text:p>
          </table:table-cell>
          <table:table-cell office:value-type="float" office:value="370.4" calcext:value-type="float">
            <text:p>370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5" calcext:value-type="float">
            <text:p>329.5</text:p>
          </table:table-cell>
          <table:table-cell office:value-type="float" office:value="370.7" calcext:value-type="float">
            <text:p>370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75" calcext:value-type="float">
            <text:p>329.75</text:p>
          </table:table-cell>
          <table:table-cell office:value-type="float" office:value="370.9" calcext:value-type="float">
            <text:p>37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371.2" calcext:value-type="float">
            <text:p>37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.25" calcext:value-type="float">
            <text:p>330.25</text:p>
          </table:table-cell>
          <table:table-cell office:value-type="float" office:value="371.5" calcext:value-type="float">
            <text:p>371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.5" calcext:value-type="float">
            <text:p>330.5</text:p>
          </table:table-cell>
          <table:table-cell office:value-type="float" office:value="372.1" calcext:value-type="float">
            <text:p>372.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0.75" calcext:value-type="float">
            <text:p>330.75</text:p>
          </table:table-cell>
          <table:table-cell office:value-type="float" office:value="372.7" calcext:value-type="float">
            <text:p>372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373.2" calcext:value-type="float">
            <text:p>373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25" calcext:value-type="float">
            <text:p>331.25</text:p>
          </table:table-cell>
          <table:table-cell office:value-type="float" office:value="373.8" calcext:value-type="float">
            <text:p>373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5" calcext:value-type="float">
            <text:p>331.5</text:p>
          </table:table-cell>
          <table:table-cell office:value-type="float" office:value="374.4" calcext:value-type="float">
            <text:p>374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75" calcext:value-type="float">
            <text:p>331.75</text:p>
          </table:table-cell>
          <table:table-cell office:value-type="float" office:value="374.9" calcext:value-type="float">
            <text:p>374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375.5" calcext:value-type="float">
            <text:p>375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25" calcext:value-type="float">
            <text:p>332.25</text:p>
          </table:table-cell>
          <table:table-cell office:value-type="float" office:value="376.1" calcext:value-type="float">
            <text:p>376.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5" calcext:value-type="float">
            <text:p>332.5</text:p>
          </table:table-cell>
          <table:table-cell office:value-type="float" office:value="376.7" calcext:value-type="float">
            <text:p>376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75" calcext:value-type="float">
            <text:p>332.75</text:p>
          </table:table-cell>
          <table:table-cell office:value-type="float" office:value="377.2" calcext:value-type="float">
            <text:p>377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377.8" calcext:value-type="float">
            <text:p>37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.25" calcext:value-type="float">
            <text:p>333.25</text:p>
          </table:table-cell>
          <table:table-cell office:value-type="float" office:value="378.4" calcext:value-type="float">
            <text:p>378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.5" calcext:value-type="float">
            <text:p>333.5</text:p>
          </table:table-cell>
          <table:table-cell office:value-type="float" office:value="386.4" calcext:value-type="float">
            <text:p>386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office:value-type="float" office:value="333.75" calcext:value-type="float">
            <text:p>333.75</text:p>
          </table:table-cell>
          <table:table-cell office:value-type="float" office:value="388.1" calcext:value-type="float">
            <text:p>388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389.8" calcext:value-type="float">
            <text:p>389.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.25" calcext:value-type="float">
            <text:p>334.25</text:p>
          </table:table-cell>
          <table:table-cell office:value-type="float" office:value="391.6" calcext:value-type="float">
            <text:p>391.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.5" calcext:value-type="float">
            <text:p>334.5</text:p>
          </table:table-cell>
          <table:table-cell office:value-type="float" office:value="393.1" calcext:value-type="float">
            <text:p>393.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8"/>
          <table:table-cell office:value-type="float" office:value="334.75" calcext:value-type="float">
            <text:p>334.75</text:p>
          </table:table-cell>
          <table:table-cell office:value-type="float" office:value="393.2" calcext:value-type="float">
            <text:p>393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393.3" calcext:value-type="float">
            <text:p>393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25" calcext:value-type="float">
            <text:p>335.25</text:p>
          </table:table-cell>
          <table:table-cell office:value-type="float" office:value="393.4" calcext:value-type="float">
            <text:p>393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5" calcext:value-type="float">
            <text:p>335.5</text:p>
          </table:table-cell>
          <table:table-cell office:value-type="float" office:value="393.5" calcext:value-type="float">
            <text:p>393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75" calcext:value-type="float">
            <text:p>335.75</text:p>
          </table:table-cell>
          <table:table-cell office:value-type="float" office:value="393.6" calcext:value-type="float">
            <text:p>393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393.7" calcext:value-type="float">
            <text:p>39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25" calcext:value-type="float">
            <text:p>336.25</text:p>
          </table:table-cell>
          <table:table-cell office:value-type="float" office:value="393.8" calcext:value-type="float">
            <text:p>39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5" calcext:value-type="float">
            <text:p>336.5</text:p>
          </table:table-cell>
          <table:table-cell office:value-type="float" office:value="393.9" calcext:value-type="float">
            <text:p>393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75" calcext:value-type="float">
            <text:p>336.75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25" calcext:value-type="float">
            <text:p>337.25</text:p>
          </table:table-cell>
          <table:table-cell office:value-type="float" office:value="394.1" calcext:value-type="float">
            <text:p>39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5" calcext:value-type="float">
            <text:p>337.5</text:p>
          </table:table-cell>
          <table:table-cell office:value-type="float" office:value="394.2" calcext:value-type="float">
            <text:p>39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75" calcext:value-type="float">
            <text:p>337.75</text:p>
          </table:table-cell>
          <table:table-cell office:value-type="float" office:value="394.3" calcext:value-type="float">
            <text:p>39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394.4" calcext:value-type="float">
            <text:p>39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25" calcext:value-type="float">
            <text:p>338.25</text:p>
          </table:table-cell>
          <table:table-cell office:value-type="float" office:value="394.5" calcext:value-type="float">
            <text:p>39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5" calcext:value-type="float">
            <text:p>338.5</text:p>
          </table:table-cell>
          <table:table-cell office:value-type="float" office:value="394.6" calcext:value-type="float">
            <text:p>39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75" calcext:value-type="float">
            <text:p>338.75</text:p>
          </table:table-cell>
          <table:table-cell office:value-type="float" office:value="394.7" calcext:value-type="float">
            <text:p>39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394.8" calcext:value-type="float">
            <text:p>39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25" calcext:value-type="float">
            <text:p>339.25</text:p>
          </table:table-cell>
          <table:table-cell office:value-type="float" office:value="394.9" calcext:value-type="float">
            <text:p>39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5" calcext:value-type="float">
            <text:p>339.5</text:p>
          </table:table-cell>
          <table:table-cell office:value-type="float" office:value="395" calcext:value-type="float">
            <text:p>3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75" calcext:value-type="float">
            <text:p>339.75</text:p>
          </table:table-cell>
          <table:table-cell office:value-type="float" office:value="395.1" calcext:value-type="float">
            <text:p>39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395.2" calcext:value-type="float">
            <text:p>39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25" calcext:value-type="float">
            <text:p>340.25</text:p>
          </table:table-cell>
          <table:table-cell office:value-type="float" office:value="395.3" calcext:value-type="float">
            <text:p>39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5" calcext:value-type="float">
            <text:p>340.5</text:p>
          </table:table-cell>
          <table:table-cell office:value-type="float" office:value="395.4" calcext:value-type="float">
            <text:p>39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75" calcext:value-type="float">
            <text:p>340.75</text:p>
          </table:table-cell>
          <table:table-cell office:value-type="float" office:value="395.4" calcext:value-type="float">
            <text:p>39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395.5" calcext:value-type="float">
            <text:p>39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25" calcext:value-type="float">
            <text:p>341.25</text:p>
          </table:table-cell>
          <table:table-cell office:value-type="float" office:value="395.6" calcext:value-type="float">
            <text:p>39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5" calcext:value-type="float">
            <text:p>341.5</text:p>
          </table:table-cell>
          <table:table-cell office:value-type="float" office:value="395.7" calcext:value-type="float">
            <text:p>39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75" calcext:value-type="float">
            <text:p>341.75</text:p>
          </table:table-cell>
          <table:table-cell office:value-type="float" office:value="395.8" calcext:value-type="float">
            <text:p>395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395.9" calcext:value-type="float">
            <text:p>395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25" calcext:value-type="float">
            <text:p>342.25</text:p>
          </table:table-cell>
          <table:table-cell office:value-type="float" office:value="396" calcext:value-type="float">
            <text:p>39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5" calcext:value-type="float">
            <text:p>342.5</text:p>
          </table:table-cell>
          <table:table-cell office:value-type="float" office:value="396.1" calcext:value-type="float">
            <text:p>396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75" calcext:value-type="float">
            <text:p>342.75</text:p>
          </table:table-cell>
          <table:table-cell office:value-type="float" office:value="396.2" calcext:value-type="float">
            <text:p>396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396.3" calcext:value-type="float">
            <text:p>396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25" calcext:value-type="float">
            <text:p>343.25</text:p>
          </table:table-cell>
          <table:table-cell office:value-type="float" office:value="396.4" calcext:value-type="float">
            <text:p>396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5" calcext:value-type="float">
            <text:p>343.5</text:p>
          </table:table-cell>
          <table:table-cell office:value-type="float" office:value="396.5" calcext:value-type="float">
            <text:p>396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75" calcext:value-type="float">
            <text:p>343.75</text:p>
          </table:table-cell>
          <table:table-cell office:value-type="float" office:value="396.6" calcext:value-type="float">
            <text:p>396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25" calcext:value-type="float">
            <text:p>344.25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5" calcext:value-type="float">
            <text:p>344.5</text:p>
          </table:table-cell>
          <table:table-cell office:value-type="float" office:value="396.8" calcext:value-type="float">
            <text:p>396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75" calcext:value-type="float">
            <text:p>344.75</text:p>
          </table:table-cell>
          <table:table-cell office:value-type="float" office:value="396.9" calcext:value-type="float">
            <text:p>396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25" calcext:value-type="float">
            <text:p>345.25</text:p>
          </table:table-cell>
          <table:table-cell office:value-type="float" office:value="397.1" calcext:value-type="float">
            <text:p>397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5" calcext:value-type="float">
            <text:p>345.5</text:p>
          </table:table-cell>
          <table:table-cell office:value-type="float" office:value="397.2" calcext:value-type="float">
            <text:p>39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75" calcext:value-type="float">
            <text:p>345.75</text:p>
          </table:table-cell>
          <table:table-cell office:value-type="float" office:value="397.3" calcext:value-type="float">
            <text:p>397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397.4" calcext:value-type="float">
            <text:p>397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25" calcext:value-type="float">
            <text:p>346.25</text:p>
          </table:table-cell>
          <table:table-cell office:value-type="float" office:value="397.5" calcext:value-type="float">
            <text:p>397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5" calcext:value-type="float">
            <text:p>346.5</text:p>
          </table:table-cell>
          <table:table-cell office:value-type="float" office:value="397.6" calcext:value-type="float">
            <text:p>397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75" calcext:value-type="float">
            <text:p>346.75</text:p>
          </table:table-cell>
          <table:table-cell office:value-type="float" office:value="397.7" calcext:value-type="float">
            <text:p>397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397.8" calcext:value-type="float">
            <text:p>397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25" calcext:value-type="float">
            <text:p>347.25</text:p>
          </table:table-cell>
          <table:table-cell office:value-type="float" office:value="397.9" calcext:value-type="float">
            <text:p>397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5" calcext:value-type="float">
            <text:p>347.5</text:p>
          </table:table-cell>
          <table:table-cell office:value-type="float" office:value="398" calcext:value-type="float">
            <text:p>39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75" calcext:value-type="float">
            <text:p>347.75</text:p>
          </table:table-cell>
          <table:table-cell office:value-type="float" office:value="398" calcext:value-type="float">
            <text:p>39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398.1" calcext:value-type="float">
            <text:p>398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25" calcext:value-type="float">
            <text:p>348.25</text:p>
          </table:table-cell>
          <table:table-cell office:value-type="float" office:value="398.2" calcext:value-type="float">
            <text:p>398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5" calcext:value-type="float">
            <text:p>348.5</text:p>
          </table:table-cell>
          <table:table-cell office:value-type="float" office:value="398.3" calcext:value-type="float">
            <text:p>398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75" calcext:value-type="float">
            <text:p>348.75</text:p>
          </table:table-cell>
          <table:table-cell office:value-type="float" office:value="398.4" calcext:value-type="float">
            <text:p>398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398.5" calcext:value-type="float">
            <text:p>398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25" calcext:value-type="float">
            <text:p>349.25</text:p>
          </table:table-cell>
          <table:table-cell office:value-type="float" office:value="398.6" calcext:value-type="float">
            <text:p>398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5" calcext:value-type="float">
            <text:p>349.5</text:p>
          </table:table-cell>
          <table:table-cell office:value-type="float" office:value="398.7" calcext:value-type="float">
            <text:p>398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75" calcext:value-type="float">
            <text:p>349.75</text:p>
          </table:table-cell>
          <table:table-cell office:value-type="float" office:value="398.8" calcext:value-type="float">
            <text:p>398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398.9" calcext:value-type="float">
            <text:p>398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25" calcext:value-type="float">
            <text:p>350.25</text:p>
          </table:table-cell>
          <table:table-cell office:value-type="float" office:value="399" calcext:value-type="float">
            <text:p>39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5" calcext:value-type="float">
            <text:p>350.5</text:p>
          </table:table-cell>
          <table:table-cell office:value-type="float" office:value="399.1" calcext:value-type="float">
            <text:p>399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75" calcext:value-type="float">
            <text:p>350.75</text:p>
          </table:table-cell>
          <table:table-cell office:value-type="float" office:value="399.2" calcext:value-type="float">
            <text:p>399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25" calcext:value-type="float">
            <text:p>351.25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5" calcext:value-type="float">
            <text:p>351.5</text:p>
          </table:table-cell>
          <table:table-cell office:value-type="float" office:value="399.4" calcext:value-type="float">
            <text:p>399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75" calcext:value-type="float">
            <text:p>351.75</text:p>
          </table:table-cell>
          <table:table-cell office:value-type="float" office:value="399.5" calcext:value-type="float">
            <text:p>399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399.6" calcext:value-type="float">
            <text:p>399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25" calcext:value-type="float">
            <text:p>352.25</text:p>
          </table:table-cell>
          <table:table-cell office:value-type="float" office:value="399.7" calcext:value-type="float">
            <text:p>399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5" calcext:value-type="float">
            <text:p>352.5</text:p>
          </table:table-cell>
          <table:table-cell office:value-type="float" office:value="399.8" calcext:value-type="float">
            <text:p>399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75" calcext:value-type="float">
            <text:p>352.75</text:p>
          </table:table-cell>
          <table:table-cell office:value-type="float" office:value="399.9" calcext:value-type="float">
            <text:p>399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25" calcext:value-type="float">
            <text:p>353.25</text:p>
          </table:table-cell>
          <table:table-cell office:value-type="float" office:value="400.1" calcext:value-type="float">
            <text:p>40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5" calcext:value-type="float">
            <text:p>353.5</text:p>
          </table:table-cell>
          <table:table-cell office:value-type="float" office:value="400.2" calcext:value-type="float">
            <text:p>40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75" calcext:value-type="float">
            <text:p>353.75</text:p>
          </table:table-cell>
          <table:table-cell office:value-type="float" office:value="400.3" calcext:value-type="float">
            <text:p>40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400.4" calcext:value-type="float">
            <text:p>40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8"/>
          <table:table-cell office:value-type="float" office:value="354.25" calcext:value-type="float">
            <text:p>354.25</text:p>
          </table:table-cell>
          <table:table-cell office:value-type="float" office:value="401" calcext:value-type="float">
            <text:p>40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4.5" calcext:value-type="float">
            <text:p>354.5</text:p>
          </table:table-cell>
          <table:table-cell office:value-type="float" office:value="401.5" calcext:value-type="float">
            <text:p>40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4.75" calcext:value-type="float">
            <text:p>354.75</text:p>
          </table:table-cell>
          <table:table-cell office:value-type="float" office:value="402" calcext:value-type="float">
            <text:p>40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402.6" calcext:value-type="float">
            <text:p>402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25" calcext:value-type="float">
            <text:p>355.25</text:p>
          </table:table-cell>
          <table:table-cell office:value-type="float" office:value="403.1" calcext:value-type="float">
            <text:p>403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5" calcext:value-type="float">
            <text:p>355.5</text:p>
          </table:table-cell>
          <table:table-cell office:value-type="float" office:value="403.6" calcext:value-type="float">
            <text:p>403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75" calcext:value-type="float">
            <text:p>355.75</text:p>
          </table:table-cell>
          <table:table-cell office:value-type="float" office:value="404.1" calcext:value-type="float">
            <text:p>404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404.7" calcext:value-type="float">
            <text:p>404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25" calcext:value-type="float">
            <text:p>356.25</text:p>
          </table:table-cell>
          <table:table-cell office:value-type="float" office:value="405.2" calcext:value-type="float">
            <text:p>405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5" calcext:value-type="float">
            <text:p>356.5</text:p>
          </table:table-cell>
          <table:table-cell office:value-type="float" office:value="405.7" calcext:value-type="float">
            <text:p>405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75" calcext:value-type="float">
            <text:p>356.75</text:p>
          </table:table-cell>
          <table:table-cell office:value-type="float" office:value="406.3" calcext:value-type="float">
            <text:p>406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406.8" calcext:value-type="float">
            <text:p>406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.25" calcext:value-type="float">
            <text:p>357.25</text:p>
          </table:table-cell>
          <table:table-cell office:value-type="float" office:value="407.3" calcext:value-type="float">
            <text:p>407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.5" calcext:value-type="float">
            <text:p>357.5</text:p>
          </table:table-cell>
          <table:table-cell office:value-type="float" office:value="415.6" calcext:value-type="float">
            <text:p>415.6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number-columns-repeated="8"/>
          <table:table-cell office:value-type="float" office:value="357.75" calcext:value-type="float">
            <text:p>357.75</text:p>
          </table:table-cell>
          <table:table-cell office:value-type="float" office:value="417.9" calcext:value-type="float">
            <text:p>417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420.1" calcext:value-type="float">
            <text:p>420.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358.25" calcext:value-type="float">
            <text:p>358.25</text:p>
          </table:table-cell>
          <table:table-cell office:value-type="float" office:value="422.3" calcext:value-type="float">
            <text:p>422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8"/>
          <table:table-cell office:value-type="float" office:value="358.5" calcext:value-type="float">
            <text:p>358.5</text:p>
          </table:table-cell>
          <table:table-cell office:value-type="float" office:value="423.8" calcext:value-type="float">
            <text:p>423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8.75" calcext:value-type="float">
            <text:p>358.75</text:p>
          </table:table-cell>
          <table:table-cell office:value-type="float" office:value="425.3" calcext:value-type="float">
            <text:p>425.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426.9" calcext:value-type="float">
            <text:p>426.9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.25" calcext:value-type="float">
            <text:p>359.25</text:p>
          </table:table-cell>
          <table:table-cell office:value-type="float" office:value="428.4" calcext:value-type="float">
            <text:p>428.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.5" calcext:value-type="float">
            <text:p>359.5</text:p>
          </table:table-cell>
          <table:table-cell office:value-type="float" office:value="429.6" calcext:value-type="float">
            <text:p>429.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8"/>
          <table:table-cell office:value-type="float" office:value="359.75" calcext:value-type="float">
            <text:p>359.75</text:p>
          </table:table-cell>
          <table:table-cell office:value-type="float" office:value="430.2" calcext:value-type="float">
            <text:p>430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430.7" calcext:value-type="float">
            <text:p>430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25" calcext:value-type="float">
            <text:p>360.25</text:p>
          </table:table-cell>
          <table:table-cell office:value-type="float" office:value="431.2" calcext:value-type="float">
            <text:p>431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5" calcext:value-type="float">
            <text:p>360.5</text:p>
          </table:table-cell>
          <table:table-cell office:value-type="float" office:value="431.8" calcext:value-type="float">
            <text:p>431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75" calcext:value-type="float">
            <text:p>360.75</text:p>
          </table:table-cell>
          <table:table-cell office:value-type="float" office:value="432.3" calcext:value-type="float">
            <text:p>43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432.8" calcext:value-type="float">
            <text:p>432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25" calcext:value-type="float">
            <text:p>361.25</text:p>
          </table:table-cell>
          <table:table-cell office:value-type="float" office:value="433.4" calcext:value-type="float">
            <text:p>433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5" calcext:value-type="float">
            <text:p>361.5</text:p>
          </table:table-cell>
          <table:table-cell office:value-type="float" office:value="433.9" calcext:value-type="float">
            <text:p>433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75" calcext:value-type="float">
            <text:p>361.75</text:p>
          </table:table-cell>
          <table:table-cell office:value-type="float" office:value="434.4" calcext:value-type="float">
            <text:p>434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434.9" calcext:value-type="float">
            <text:p>434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25" calcext:value-type="float">
            <text:p>362.25</text:p>
          </table:table-cell>
          <table:table-cell office:value-type="float" office:value="435.5" calcext:value-type="float">
            <text:p>435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5" calcext:value-type="float">
            <text:p>362.5</text:p>
          </table:table-cell>
          <table:table-cell office:value-type="float" office:value="436" calcext:value-type="float">
            <text:p>43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75" calcext:value-type="float">
            <text:p>362.75</text:p>
          </table:table-cell>
          <table:table-cell office:value-type="float" office:value="436.5" calcext:value-type="float">
            <text:p>436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436.9" calcext:value-type="float">
            <text:p>43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363.25" calcext:value-type="float">
            <text:p>363.25</text:p>
          </table:table-cell>
          <table:table-cell office:value-type="float" office:value="437.2" calcext:value-type="float">
            <text:p>437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3.5" calcext:value-type="float">
            <text:p>363.5</text:p>
          </table:table-cell>
          <table:table-cell office:value-type="float" office:value="437.5" calcext:value-type="float">
            <text:p>43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3.75" calcext:value-type="float">
            <text:p>363.75</text:p>
          </table:table-cell>
          <table:table-cell office:value-type="float" office:value="437.8" calcext:value-type="float">
            <text:p>437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438.1" calcext:value-type="float">
            <text:p>438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25" calcext:value-type="float">
            <text:p>364.25</text:p>
          </table:table-cell>
          <table:table-cell office:value-type="float" office:value="438.5" calcext:value-type="float">
            <text:p>43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5" calcext:value-type="float">
            <text:p>364.5</text:p>
          </table:table-cell>
          <table:table-cell office:value-type="float" office:value="438.8" calcext:value-type="float">
            <text:p>438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75" calcext:value-type="float">
            <text:p>364.75</text:p>
          </table:table-cell>
          <table:table-cell office:value-type="float" office:value="439.1" calcext:value-type="float">
            <text:p>439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439.4" calcext:value-type="float">
            <text:p>439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25" calcext:value-type="float">
            <text:p>365.25</text:p>
          </table:table-cell>
          <table:table-cell office:value-type="float" office:value="439.7" calcext:value-type="float">
            <text:p>439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5" calcext:value-type="float">
            <text:p>365.5</text:p>
          </table:table-cell>
          <table:table-cell office:value-type="float" office:value="440" calcext:value-type="float">
            <text:p>44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75" calcext:value-type="float">
            <text:p>365.75</text:p>
          </table:table-cell>
          <table:table-cell office:value-type="float" office:value="440.3" calcext:value-type="float">
            <text:p>440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" calcext:value-type="float">
            <text:p>366</text:p>
          </table:table-cell>
          <table:table-cell office:value-type="float" office:value="440.6" calcext:value-type="float">
            <text:p>44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25" calcext:value-type="float">
            <text:p>366.25</text:p>
          </table:table-cell>
          <table:table-cell office:value-type="float" office:value="440.9" calcext:value-type="float">
            <text:p>44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5" calcext:value-type="float">
            <text:p>366.5</text:p>
          </table:table-cell>
          <table:table-cell office:value-type="float" office:value="441.2" calcext:value-type="float">
            <text:p>44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75" calcext:value-type="float">
            <text:p>366.75</text:p>
          </table:table-cell>
          <table:table-cell office:value-type="float" office:value="441.5" calcext:value-type="float">
            <text:p>441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441.8" calcext:value-type="float">
            <text:p>441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25" calcext:value-type="float">
            <text:p>367.25</text:p>
          </table:table-cell>
          <table:table-cell office:value-type="float" office:value="442.1" calcext:value-type="float">
            <text:p>44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5" calcext:value-type="float">
            <text:p>367.5</text:p>
          </table:table-cell>
          <table:table-cell office:value-type="float" office:value="442.4" calcext:value-type="float">
            <text:p>442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75" calcext:value-type="float">
            <text:p>367.75</text:p>
          </table:table-cell>
          <table:table-cell office:value-type="float" office:value="442.7" calcext:value-type="float">
            <text:p>44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25" calcext:value-type="float">
            <text:p>368.25</text:p>
          </table:table-cell>
          <table:table-cell office:value-type="float" office:value="443.3" calcext:value-type="float">
            <text:p>44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5" calcext:value-type="float">
            <text:p>368.5</text:p>
          </table:table-cell>
          <table:table-cell office:value-type="float" office:value="443.6" calcext:value-type="float">
            <text:p>443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75" calcext:value-type="float">
            <text:p>368.75</text:p>
          </table:table-cell>
          <table:table-cell office:value-type="float" office:value="443.9" calcext:value-type="float">
            <text:p>443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444.2" calcext:value-type="float">
            <text:p>444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25" calcext:value-type="float">
            <text:p>369.25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5" calcext:value-type="float">
            <text:p>369.5</text:p>
          </table:table-cell>
          <table:table-cell office:value-type="float" office:value="444.8" calcext:value-type="float">
            <text:p>44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75" calcext:value-type="float">
            <text:p>369.75</text:p>
          </table:table-cell>
          <table:table-cell office:value-type="float" office:value="445.1" calcext:value-type="float">
            <text:p>445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445.3" calcext:value-type="float">
            <text:p>4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25" calcext:value-type="float">
            <text:p>370.25</text:p>
          </table:table-cell>
          <table:table-cell office:value-type="float" office:value="445.6" calcext:value-type="float">
            <text:p>44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5" calcext:value-type="float">
            <text:p>370.5</text:p>
          </table:table-cell>
          <table:table-cell office:value-type="float" office:value="445.9" calcext:value-type="float">
            <text:p>44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75" calcext:value-type="float">
            <text:p>370.75</text:p>
          </table:table-cell>
          <table:table-cell office:value-type="float" office:value="446.2" calcext:value-type="float">
            <text:p>446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446.4" calcext:value-type="float">
            <text:p>44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25" calcext:value-type="float">
            <text:p>371.25</text:p>
          </table:table-cell>
          <table:table-cell office:value-type="float" office:value="446.7" calcext:value-type="float">
            <text:p>44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5" calcext:value-type="float">
            <text:p>371.5</text:p>
          </table:table-cell>
          <table:table-cell office:value-type="float" office:value="447" calcext:value-type="float">
            <text:p>44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75" calcext:value-type="float">
            <text:p>371.75</text:p>
          </table:table-cell>
          <table:table-cell office:value-type="float" office:value="447.3" calcext:value-type="float">
            <text:p>44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447.6" calcext:value-type="float">
            <text:p>447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25" calcext:value-type="float">
            <text:p>372.25</text:p>
          </table:table-cell>
          <table:table-cell office:value-type="float" office:value="447.8" calcext:value-type="float">
            <text:p>447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5" calcext:value-type="float">
            <text:p>372.5</text:p>
          </table:table-cell>
          <table:table-cell office:value-type="float" office:value="448.1" calcext:value-type="float">
            <text:p>448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75" calcext:value-type="float">
            <text:p>372.75</text:p>
          </table:table-cell>
          <table:table-cell office:value-type="float" office:value="448.4" calcext:value-type="float">
            <text:p>448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448.7" calcext:value-type="float">
            <text:p>44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25" calcext:value-type="float">
            <text:p>373.25</text:p>
          </table:table-cell>
          <table:table-cell office:value-type="float" office:value="448.9" calcext:value-type="float">
            <text:p>448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5" calcext:value-type="float">
            <text:p>373.5</text:p>
          </table:table-cell>
          <table:table-cell office:value-type="float" office:value="449.2" calcext:value-type="float">
            <text:p>449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75" calcext:value-type="float">
            <text:p>373.75</text:p>
          </table:table-cell>
          <table:table-cell office:value-type="float" office:value="449.5" calcext:value-type="float">
            <text:p>44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" calcext:value-type="float">
            <text:p>374</text:p>
          </table:table-cell>
          <table:table-cell office:value-type="float" office:value="449.8" calcext:value-type="float">
            <text:p>44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25" calcext:value-type="float">
            <text:p>374.25</text:p>
          </table:table-cell>
          <table:table-cell office:value-type="float" office:value="450.1" calcext:value-type="float">
            <text:p>45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5" calcext:value-type="float">
            <text:p>374.5</text:p>
          </table:table-cell>
          <table:table-cell office:value-type="float" office:value="450.3" calcext:value-type="float">
            <text:p>45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75" calcext:value-type="float">
            <text:p>374.75</text:p>
          </table:table-cell>
          <table:table-cell office:value-type="float" office:value="450.6" calcext:value-type="float">
            <text:p>45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450.9" calcext:value-type="float">
            <text:p>45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25" calcext:value-type="float">
            <text:p>375.25</text:p>
          </table:table-cell>
          <table:table-cell office:value-type="float" office:value="451.2" calcext:value-type="float">
            <text:p>45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5" calcext:value-type="float">
            <text:p>375.5</text:p>
          </table:table-cell>
          <table:table-cell office:value-type="float" office:value="451.5" calcext:value-type="float">
            <text:p>451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75" calcext:value-type="float">
            <text:p>375.75</text:p>
          </table:table-cell>
          <table:table-cell office:value-type="float" office:value="451.8" calcext:value-type="float">
            <text:p>45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452.1" calcext:value-type="float">
            <text:p>452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25" calcext:value-type="float">
            <text:p>376.25</text:p>
          </table:table-cell>
          <table:table-cell office:value-type="float" office:value="452.5" calcext:value-type="float">
            <text:p>45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5" calcext:value-type="float">
            <text:p>376.5</text:p>
          </table:table-cell>
          <table:table-cell office:value-type="float" office:value="452.8" calcext:value-type="float">
            <text:p>452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75" calcext:value-type="float">
            <text:p>376.75</text:p>
          </table:table-cell>
          <table:table-cell office:value-type="float" office:value="453.2" calcext:value-type="float">
            <text:p>45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453.5" calcext:value-type="float">
            <text:p>453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25" calcext:value-type="float">
            <text:p>377.25</text:p>
          </table:table-cell>
          <table:table-cell office:value-type="float" office:value="453.9" calcext:value-type="float">
            <text:p>45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5" calcext:value-type="float">
            <text:p>377.5</text:p>
          </table:table-cell>
          <table:table-cell office:value-type="float" office:value="454.2" calcext:value-type="float">
            <text:p>454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75" calcext:value-type="float">
            <text:p>377.75</text:p>
          </table:table-cell>
          <table:table-cell office:value-type="float" office:value="454.6" calcext:value-type="float">
            <text:p>454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454.9" calcext:value-type="float">
            <text:p>454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25" calcext:value-type="float">
            <text:p>378.25</text:p>
          </table:table-cell>
          <table:table-cell office:value-type="float" office:value="455.2" calcext:value-type="float">
            <text:p>455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5" calcext:value-type="float">
            <text:p>378.5</text:p>
          </table:table-cell>
          <table:table-cell office:value-type="float" office:value="455.6" calcext:value-type="float">
            <text:p>455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75" calcext:value-type="float">
            <text:p>378.75</text:p>
          </table:table-cell>
          <table:table-cell office:value-type="float" office:value="455.9" calcext:value-type="float">
            <text:p>455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456.3" calcext:value-type="float">
            <text:p>456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25" calcext:value-type="float">
            <text:p>379.25</text:p>
          </table:table-cell>
          <table:table-cell office:value-type="float" office:value="456.6" calcext:value-type="float">
            <text:p>456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5" calcext:value-type="float">
            <text:p>379.5</text:p>
          </table:table-cell>
          <table:table-cell office:value-type="float" office:value="457" calcext:value-type="float">
            <text:p>45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75" calcext:value-type="float">
            <text:p>379.75</text:p>
          </table:table-cell>
          <table:table-cell office:value-type="float" office:value="457.3" calcext:value-type="float">
            <text:p>457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457.7" calcext:value-type="float">
            <text:p>457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25" calcext:value-type="float">
            <text:p>380.25</text:p>
          </table:table-cell>
          <table:table-cell office:value-type="float" office:value="458" calcext:value-type="float">
            <text:p>45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5" calcext:value-type="float">
            <text:p>380.5</text:p>
          </table:table-cell>
          <table:table-cell office:value-type="float" office:value="458.3" calcext:value-type="float">
            <text:p>458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75" calcext:value-type="float">
            <text:p>380.75</text:p>
          </table:table-cell>
          <table:table-cell office:value-type="float" office:value="458.7" calcext:value-type="float">
            <text:p>458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461.2" calcext:value-type="float">
            <text:p>461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number-columns-repeated="8"/>
          <table:table-cell office:value-type="float" office:value="381.25" calcext:value-type="float">
            <text:p>381.25</text:p>
          </table:table-cell>
          <table:table-cell office:value-type="float" office:value="464.3" calcext:value-type="float">
            <text:p>464.3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table:number-columns-repeated="8"/>
          <table:table-cell office:value-type="float" office:value="381.5" calcext:value-type="float">
            <text:p>381.5</text:p>
          </table:table-cell>
          <table:table-cell office:value-type="float" office:value="467" calcext:value-type="float">
            <text:p>46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8"/>
          <table:table-cell office:value-type="float" office:value="381.75" calcext:value-type="float">
            <text:p>381.75</text:p>
          </table:table-cell>
          <table:table-cell office:value-type="float" office:value="469.1" calcext:value-type="float">
            <text:p>469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471.3" calcext:value-type="float">
            <text:p>471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382.25" calcext:value-type="float">
            <text:p>382.25</text:p>
          </table:table-cell>
          <table:table-cell office:value-type="float" office:value="473.5" calcext:value-type="float">
            <text:p>473.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number-columns-repeated="8"/>
          <table:table-cell office:value-type="float" office:value="382.5" calcext:value-type="float">
            <text:p>382.5</text:p>
          </table:table-cell>
          <table:table-cell office:value-type="float" office:value="474.2" calcext:value-type="float">
            <text:p>474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2.75" calcext:value-type="float">
            <text:p>382.75</text:p>
          </table:table-cell>
          <table:table-cell office:value-type="float" office:value="474.9" calcext:value-type="float">
            <text:p>474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475.6" calcext:value-type="float">
            <text:p>475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25" calcext:value-type="float">
            <text:p>383.25</text:p>
          </table:table-cell>
          <table:table-cell office:value-type="float" office:value="476.3" calcext:value-type="float">
            <text:p>476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5" calcext:value-type="float">
            <text:p>383.5</text:p>
          </table:table-cell>
          <table:table-cell office:value-type="float" office:value="477" calcext:value-type="float">
            <text:p>47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75" calcext:value-type="float">
            <text:p>383.75</text:p>
          </table:table-cell>
          <table:table-cell office:value-type="float" office:value="477.7" calcext:value-type="float">
            <text:p>477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478.4" calcext:value-type="float">
            <text:p>478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25" calcext:value-type="float">
            <text:p>384.25</text:p>
          </table:table-cell>
          <table:table-cell office:value-type="float" office:value="479.1" calcext:value-type="float">
            <text:p>479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5" calcext:value-type="float">
            <text:p>384.5</text:p>
          </table:table-cell>
          <table:table-cell office:value-type="float" office:value="479.8" calcext:value-type="float">
            <text:p>479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75" calcext:value-type="float">
            <text:p>384.75</text:p>
          </table:table-cell>
          <table:table-cell office:value-type="float" office:value="480.6" calcext:value-type="float">
            <text:p>480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8"/>
          <table:table-cell office:value-type="float" office:value="385.25" calcext:value-type="float">
            <text:p>385.25</text:p>
          </table:table-cell>
          <table:table-cell office:value-type="float" office:value="481.3" calcext:value-type="float">
            <text:p>48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5.5" calcext:value-type="float">
            <text:p>385.5</text:p>
          </table:table-cell>
          <table:table-cell office:value-type="float" office:value="481.6" calcext:value-type="float">
            <text:p>48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5.75" calcext:value-type="float">
            <text:p>385.75</text:p>
          </table:table-cell>
          <table:table-cell office:value-type="float" office:value="481.9" calcext:value-type="float">
            <text:p>48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482.2" calcext:value-type="float">
            <text:p>482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25" calcext:value-type="float">
            <text:p>386.25</text:p>
          </table:table-cell>
          <table:table-cell office:value-type="float" office:value="482.5" calcext:value-type="float">
            <text:p>48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5" calcext:value-type="float">
            <text:p>386.5</text:p>
          </table:table-cell>
          <table:table-cell office:value-type="float" office:value="482.8" calcext:value-type="float">
            <text:p>48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75" calcext:value-type="float">
            <text:p>386.75</text:p>
          </table:table-cell>
          <table:table-cell office:value-type="float" office:value="483.1" calcext:value-type="float">
            <text:p>48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483.4" calcext:value-type="float">
            <text:p>48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25" calcext:value-type="float">
            <text:p>387.25</text:p>
          </table:table-cell>
          <table:table-cell office:value-type="float" office:value="483.7" calcext:value-type="float">
            <text:p>48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5" calcext:value-type="float">
            <text:p>387.5</text:p>
          </table:table-cell>
          <table:table-cell office:value-type="float" office:value="484" calcext:value-type="float">
            <text:p>48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75" calcext:value-type="float">
            <text:p>387.75</text:p>
          </table:table-cell>
          <table:table-cell office:value-type="float" office:value="484.3" calcext:value-type="float">
            <text:p>48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484.6" calcext:value-type="float">
            <text:p>48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25" calcext:value-type="float">
            <text:p>388.25</text:p>
          </table:table-cell>
          <table:table-cell office:value-type="float" office:value="484.9" calcext:value-type="float">
            <text:p>48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5" calcext:value-type="float">
            <text:p>388.5</text:p>
          </table:table-cell>
          <table:table-cell office:value-type="float" office:value="485.2" calcext:value-type="float">
            <text:p>48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75" calcext:value-type="float">
            <text:p>388.75</text:p>
          </table:table-cell>
          <table:table-cell office:value-type="float" office:value="485.5" calcext:value-type="float">
            <text:p>48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485.8" calcext:value-type="float">
            <text:p>48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25" calcext:value-type="float">
            <text:p>389.25</text:p>
          </table:table-cell>
          <table:table-cell office:value-type="float" office:value="486.1" calcext:value-type="float">
            <text:p>48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5" calcext:value-type="float">
            <text:p>389.5</text:p>
          </table:table-cell>
          <table:table-cell office:value-type="float" office:value="486.4" calcext:value-type="float">
            <text:p>48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75" calcext:value-type="float">
            <text:p>389.75</text:p>
          </table:table-cell>
          <table:table-cell office:value-type="float" office:value="486.7" calcext:value-type="float">
            <text:p>4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487" calcext:value-type="float">
            <text:p>48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25" calcext:value-type="float">
            <text:p>390.25</text:p>
          </table:table-cell>
          <table:table-cell office:value-type="float" office:value="487.3" calcext:value-type="float">
            <text:p>487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5" calcext:value-type="float">
            <text:p>390.5</text:p>
          </table:table-cell>
          <table:table-cell office:value-type="float" office:value="487.6" calcext:value-type="float">
            <text:p>48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75" calcext:value-type="float">
            <text:p>390.75</text:p>
          </table:table-cell>
          <table:table-cell office:value-type="float" office:value="487.9" calcext:value-type="float">
            <text:p>487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488.2" calcext:value-type="float">
            <text:p>488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1.25" calcext:value-type="float">
            <text:p>391.25</text:p>
          </table:table-cell>
          <table:table-cell office:value-type="float" office:value="488.5" calcext:value-type="float">
            <text:p>488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1.5" calcext:value-type="float">
            <text:p>391.5</text:p>
          </table:table-cell>
          <table:table-cell office:value-type="float" office:value="488.7" calcext:value-type="float">
            <text:p>48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1.75" calcext:value-type="float">
            <text:p>391.75</text:p>
          </table:table-cell>
          <table:table-cell office:value-type="float" office:value="489" calcext:value-type="float">
            <text:p>48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489.3" calcext:value-type="float">
            <text:p>489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25" calcext:value-type="float">
            <text:p>392.25</text:p>
          </table:table-cell>
          <table:table-cell office:value-type="float" office:value="489.5" calcext:value-type="float">
            <text:p>48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5" calcext:value-type="float">
            <text:p>392.5</text:p>
          </table:table-cell>
          <table:table-cell office:value-type="float" office:value="489.8" calcext:value-type="float">
            <text:p>48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75" calcext:value-type="float">
            <text:p>392.75</text:p>
          </table:table-cell>
          <table:table-cell office:value-type="float" office:value="490.1" calcext:value-type="float">
            <text:p>49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490.3" calcext:value-type="float">
            <text:p>49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25" calcext:value-type="float">
            <text:p>393.25</text:p>
          </table:table-cell>
          <table:table-cell office:value-type="float" office:value="490.6" calcext:value-type="float">
            <text:p>49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5" calcext:value-type="float">
            <text:p>393.5</text:p>
          </table:table-cell>
          <table:table-cell office:value-type="float" office:value="490.9" calcext:value-type="float">
            <text:p>49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75" calcext:value-type="float">
            <text:p>393.75</text:p>
          </table:table-cell>
          <table:table-cell office:value-type="float" office:value="491.2" calcext:value-type="float">
            <text:p>49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491.4" calcext:value-type="float">
            <text:p>491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25" calcext:value-type="float">
            <text:p>394.25</text:p>
          </table:table-cell>
          <table:table-cell office:value-type="float" office:value="491.7" calcext:value-type="float">
            <text:p>491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5" calcext:value-type="float">
            <text:p>394.5</text:p>
          </table:table-cell>
          <table:table-cell office:value-type="float" office:value="492" calcext:value-type="float">
            <text:p>49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75" calcext:value-type="float">
            <text:p>394.75</text:p>
          </table:table-cell>
          <table:table-cell office:value-type="float" office:value="492.2" calcext:value-type="float">
            <text:p>492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492.5" calcext:value-type="float">
            <text:p>492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25" calcext:value-type="float">
            <text:p>395.25</text:p>
          </table:table-cell>
          <table:table-cell office:value-type="float" office:value="492.8" calcext:value-type="float">
            <text:p>492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5" calcext:value-type="float">
            <text:p>395.5</text:p>
          </table:table-cell>
          <table:table-cell office:value-type="float" office:value="493" calcext:value-type="float">
            <text:p>49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75" calcext:value-type="float">
            <text:p>395.75</text:p>
          </table:table-cell>
          <table:table-cell office:value-type="float" office:value="493.3" calcext:value-type="float">
            <text:p>493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493.6" calcext:value-type="float">
            <text:p>493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25" calcext:value-type="float">
            <text:p>396.25</text:p>
          </table:table-cell>
          <table:table-cell office:value-type="float" office:value="493.9" calcext:value-type="float">
            <text:p>493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5" calcext:value-type="float">
            <text:p>396.5</text:p>
          </table:table-cell>
          <table:table-cell office:value-type="float" office:value="494.1" calcext:value-type="float">
            <text:p>494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75" calcext:value-type="float">
            <text:p>396.75</text:p>
          </table:table-cell>
          <table:table-cell office:value-type="float" office:value="494.4" calcext:value-type="float">
            <text:p>494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494.7" calcext:value-type="float">
            <text:p>494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25" calcext:value-type="float">
            <text:p>397.25</text:p>
          </table:table-cell>
          <table:table-cell office:value-type="float" office:value="494.9" calcext:value-type="float">
            <text:p>49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5" calcext:value-type="float">
            <text:p>397.5</text:p>
          </table:table-cell>
          <table:table-cell office:value-type="float" office:value="495.2" calcext:value-type="float">
            <text:p>495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75" calcext:value-type="float">
            <text:p>397.75</text:p>
          </table:table-cell>
          <table:table-cell office:value-type="float" office:value="495.5" calcext:value-type="float">
            <text:p>495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495.8" calcext:value-type="float">
            <text:p>49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25" calcext:value-type="float">
            <text:p>398.25</text:p>
          </table:table-cell>
          <table:table-cell office:value-type="float" office:value="496.1" calcext:value-type="float">
            <text:p>49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5" calcext:value-type="float">
            <text:p>398.5</text:p>
          </table:table-cell>
          <table:table-cell office:value-type="float" office:value="496.4" calcext:value-type="float">
            <text:p>49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75" calcext:value-type="float">
            <text:p>398.75</text:p>
          </table:table-cell>
          <table:table-cell office:value-type="float" office:value="496.7" calcext:value-type="float">
            <text:p>49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25" calcext:value-type="float">
            <text:p>399.25</text:p>
          </table:table-cell>
          <table:table-cell office:value-type="float" office:value="497.3" calcext:value-type="float">
            <text:p>497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5" calcext:value-type="float">
            <text:p>399.5</text:p>
          </table:table-cell>
          <table:table-cell office:value-type="float" office:value="497.6" calcext:value-type="float">
            <text:p>49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75" calcext:value-type="float">
            <text:p>399.75</text:p>
          </table:table-cell>
          <table:table-cell office:value-type="float" office:value="497.9" calcext:value-type="float">
            <text:p>497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498.3" calcext:value-type="float">
            <text:p>498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25" calcext:value-type="float">
            <text:p>400.25</text:p>
          </table:table-cell>
          <table:table-cell office:value-type="float" office:value="498.6" calcext:value-type="float">
            <text:p>498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5" calcext:value-type="float">
            <text:p>400.5</text:p>
          </table:table-cell>
          <table:table-cell office:value-type="float" office:value="498.9" calcext:value-type="float">
            <text:p>498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75" calcext:value-type="float">
            <text:p>400.75</text:p>
          </table:table-cell>
          <table:table-cell office:value-type="float" office:value="499.2" calcext:value-type="float">
            <text:p>499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" calcext:value-type="float">
            <text:p>401</text:p>
          </table:table-cell>
          <table:table-cell office:value-type="float" office:value="499.5" calcext:value-type="float">
            <text:p>499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25" calcext:value-type="float">
            <text:p>40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5" calcext:value-type="float">
            <text:p>401.5</text:p>
          </table:table-cell>
          <table:table-cell office:value-type="float" office:value="500.1" calcext:value-type="float">
            <text:p>50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75" calcext:value-type="float">
            <text:p>401.75</text:p>
          </table:table-cell>
          <table:table-cell office:value-type="float" office:value="500.4" calcext:value-type="float">
            <text:p>50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" calcext:value-type="float">
            <text:p>402</text:p>
          </table:table-cell>
          <table:table-cell office:value-type="float" office:value="500.7" calcext:value-type="float">
            <text:p>500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25" calcext:value-type="float">
            <text:p>402.25</text:p>
          </table:table-cell>
          <table:table-cell office:value-type="float" office:value="501" calcext:value-type="float">
            <text:p>50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5" calcext:value-type="float">
            <text:p>402.5</text:p>
          </table:table-cell>
          <table:table-cell office:value-type="float" office:value="501.3" calcext:value-type="float">
            <text:p>50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75" calcext:value-type="float">
            <text:p>402.75</text:p>
          </table:table-cell>
          <table:table-cell office:value-type="float" office:value="501.6" calcext:value-type="float">
            <text:p>50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502" calcext:value-type="float">
            <text:p>50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25" calcext:value-type="float">
            <text:p>403.25</text:p>
          </table:table-cell>
          <table:table-cell office:value-type="float" office:value="502.3" calcext:value-type="float">
            <text:p>502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5" calcext:value-type="float">
            <text:p>403.5</text:p>
          </table:table-cell>
          <table:table-cell office:value-type="float" office:value="502.6" calcext:value-type="float">
            <text:p>502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75" calcext:value-type="float">
            <text:p>403.75</text:p>
          </table:table-cell>
          <table:table-cell office:value-type="float" office:value="502.9" calcext:value-type="float">
            <text:p>502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504" calcext:value-type="float">
            <text:p>50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8"/>
          <table:table-cell office:value-type="float" office:value="404.25" calcext:value-type="float">
            <text:p>404.25</text:p>
          </table:table-cell>
          <table:table-cell office:value-type="float" office:value="505.1" calcext:value-type="float">
            <text:p>505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4.5" calcext:value-type="float">
            <text:p>404.5</text:p>
          </table:table-cell>
          <table:table-cell office:value-type="float" office:value="506.2" calcext:value-type="float">
            <text:p>506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4.75" calcext:value-type="float">
            <text:p>404.75</text:p>
          </table:table-cell>
          <table:table-cell office:value-type="float" office:value="507.4" calcext:value-type="float">
            <text:p>507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508.5" calcext:value-type="float">
            <text:p>508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.25" calcext:value-type="float">
            <text:p>405.25</text:p>
          </table:table-cell>
          <table:table-cell office:value-type="float" office:value="509.7" calcext:value-type="float">
            <text:p>509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.5" calcext:value-type="float">
            <text:p>405.5</text:p>
          </table:table-cell>
          <table:table-cell office:value-type="float" office:value="511.9" calcext:value-type="float">
            <text:p>511.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405.75" calcext:value-type="float">
            <text:p>405.75</text:p>
          </table:table-cell>
          <table:table-cell office:value-type="float" office:value="515.5" calcext:value-type="float">
            <text:p>515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number-columns-repeated="8"/>
          <table:table-cell office:value-type="float" office:value="406" calcext:value-type="float">
            <text:p>406</text:p>
          </table:table-cell>
          <table:table-cell office:value-type="float" office:value="518" calcext:value-type="float">
            <text:p>51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8"/>
          <table:table-cell office:value-type="float" office:value="406.25" calcext:value-type="float">
            <text:p>406.25</text:p>
          </table:table-cell>
          <table:table-cell office:value-type="float" office:value="518.6" calcext:value-type="float">
            <text:p>518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6.5" calcext:value-type="float">
            <text:p>406.5</text:p>
          </table:table-cell>
          <table:table-cell office:value-type="float" office:value="519.2" calcext:value-type="float">
            <text:p>519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6.75" calcext:value-type="float">
            <text:p>406.75</text:p>
          </table:table-cell>
          <table:table-cell office:value-type="float" office:value="519.8" calcext:value-type="float">
            <text:p>519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520.4" calcext:value-type="float">
            <text:p>520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25" calcext:value-type="float">
            <text:p>407.25</text:p>
          </table:table-cell>
          <table:table-cell office:value-type="float" office:value="521" calcext:value-type="float">
            <text:p>52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5" calcext:value-type="float">
            <text:p>407.5</text:p>
          </table:table-cell>
          <table:table-cell office:value-type="float" office:value="521.7" calcext:value-type="float">
            <text:p>521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75" calcext:value-type="float">
            <text:p>407.75</text:p>
          </table:table-cell>
          <table:table-cell office:value-type="float" office:value="522.3" calcext:value-type="float">
            <text:p>522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522.9" calcext:value-type="float">
            <text:p>522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25" calcext:value-type="float">
            <text:p>408.25</text:p>
          </table:table-cell>
          <table:table-cell office:value-type="float" office:value="523.5" calcext:value-type="float">
            <text:p>52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5" calcext:value-type="float">
            <text:p>408.5</text:p>
          </table:table-cell>
          <table:table-cell office:value-type="float" office:value="524.1" calcext:value-type="float">
            <text:p>52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75" calcext:value-type="float">
            <text:p>408.75</text:p>
          </table:table-cell>
          <table:table-cell office:value-type="float" office:value="524.7" calcext:value-type="float">
            <text:p>524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9" calcext:value-type="float">
            <text:p>409</text:p>
          </table:table-cell>
          <table:table-cell office:value-type="float" office:value="525.3" calcext:value-type="float">
            <text:p>525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409.25" calcext:value-type="float">
            <text:p>409.25</text:p>
          </table:table-cell>
          <table:table-cell office:value-type="float" office:value="525.6" calcext:value-type="float">
            <text:p>525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09.5" calcext:value-type="float">
            <text:p>409.5</text:p>
          </table:table-cell>
          <table:table-cell office:value-type="float" office:value="526" calcext:value-type="float">
            <text:p>52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09.75" calcext:value-type="float">
            <text:p>409.75</text:p>
          </table:table-cell>
          <table:table-cell office:value-type="float" office:value="526.4" calcext:value-type="float">
            <text:p>526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office:value-type="float" office:value="526.8" calcext:value-type="float">
            <text:p>526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25" calcext:value-type="float">
            <text:p>410.25</text:p>
          </table:table-cell>
          <table:table-cell office:value-type="float" office:value="527.1" calcext:value-type="float">
            <text:p>527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5" calcext:value-type="float">
            <text:p>410.5</text:p>
          </table:table-cell>
          <table:table-cell office:value-type="float" office:value="527.5" calcext:value-type="float">
            <text:p>527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75" calcext:value-type="float">
            <text:p>410.75</text:p>
          </table:table-cell>
          <table:table-cell office:value-type="float" office:value="527.9" calcext:value-type="float">
            <text:p>527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528.3" calcext:value-type="float">
            <text:p>528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25" calcext:value-type="float">
            <text:p>411.25</text:p>
          </table:table-cell>
          <table:table-cell office:value-type="float" office:value="528.7" calcext:value-type="float">
            <text:p>52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5" calcext:value-type="float">
            <text:p>411.5</text:p>
          </table:table-cell>
          <table:table-cell office:value-type="float" office:value="529" calcext:value-type="float">
            <text:p>52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75" calcext:value-type="float">
            <text:p>411.75</text:p>
          </table:table-cell>
          <table:table-cell office:value-type="float" office:value="529.4" calcext:value-type="float">
            <text:p>529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" calcext:value-type="float">
            <text:p>412</text:p>
          </table:table-cell>
          <table:table-cell office:value-type="float" office:value="529.8" calcext:value-type="float">
            <text:p>529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25" calcext:value-type="float">
            <text:p>412.25</text:p>
          </table:table-cell>
          <table:table-cell office:value-type="float" office:value="530.2" calcext:value-type="float">
            <text:p>53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5" calcext:value-type="float">
            <text:p>412.5</text:p>
          </table:table-cell>
          <table:table-cell office:value-type="float" office:value="530.5" calcext:value-type="float">
            <text:p>530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75" calcext:value-type="float">
            <text:p>412.75</text:p>
          </table:table-cell>
          <table:table-cell office:value-type="float" office:value="530.9" calcext:value-type="float">
            <text:p>530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531.3" calcext:value-type="float">
            <text:p>53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25" calcext:value-type="float">
            <text:p>413.25</text:p>
          </table:table-cell>
          <table:table-cell office:value-type="float" office:value="531.7" calcext:value-type="float">
            <text:p>531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5" calcext:value-type="float">
            <text:p>413.5</text:p>
          </table:table-cell>
          <table:table-cell office:value-type="float" office:value="532" calcext:value-type="float">
            <text:p>53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75" calcext:value-type="float">
            <text:p>413.75</text:p>
          </table:table-cell>
          <table:table-cell office:value-type="float" office:value="532.4" calcext:value-type="float">
            <text:p>532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4" calcext:value-type="float">
            <text:p>414</text:p>
          </table:table-cell>
          <table:table-cell office:value-type="float" office:value="532.7" calcext:value-type="float">
            <text:p>532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414.25" calcext:value-type="float">
            <text:p>414.25</text:p>
          </table:table-cell>
          <table:table-cell office:value-type="float" office:value="532.9" calcext:value-type="float">
            <text:p>532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4.5" calcext:value-type="float">
            <text:p>414.5</text:p>
          </table:table-cell>
          <table:table-cell office:value-type="float" office:value="533.2" calcext:value-type="float">
            <text:p>533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4.75" calcext:value-type="float">
            <text:p>414.75</text:p>
          </table:table-cell>
          <table:table-cell office:value-type="float" office:value="533.4" calcext:value-type="float">
            <text:p>533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" calcext:value-type="float">
            <text:p>415</text:p>
          </table:table-cell>
          <table:table-cell office:value-type="float" office:value="533.6" calcext:value-type="float">
            <text:p>53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25" calcext:value-type="float">
            <text:p>415.25</text:p>
          </table:table-cell>
          <table:table-cell office:value-type="float" office:value="533.8" calcext:value-type="float">
            <text:p>53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5" calcext:value-type="float">
            <text:p>415.5</text:p>
          </table:table-cell>
          <table:table-cell office:value-type="float" office:value="534.1" calcext:value-type="float">
            <text:p>534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75" calcext:value-type="float">
            <text:p>415.75</text:p>
          </table:table-cell>
          <table:table-cell office:value-type="float" office:value="534.3" calcext:value-type="float">
            <text:p>534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534.5" calcext:value-type="float">
            <text:p>534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25" calcext:value-type="float">
            <text:p>416.25</text:p>
          </table:table-cell>
          <table:table-cell office:value-type="float" office:value="534.8" calcext:value-type="float">
            <text:p>534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5" calcext:value-type="float">
            <text:p>416.5</text:p>
          </table:table-cell>
          <table:table-cell office:value-type="float" office:value="535" calcext:value-type="float">
            <text:p>5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75" calcext:value-type="float">
            <text:p>416.75</text:p>
          </table:table-cell>
          <table:table-cell office:value-type="float" office:value="535.2" calcext:value-type="float">
            <text:p>53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" calcext:value-type="float">
            <text:p>417</text:p>
          </table:table-cell>
          <table:table-cell office:value-type="float" office:value="535.4" calcext:value-type="float">
            <text:p>53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25" calcext:value-type="float">
            <text:p>417.25</text:p>
          </table:table-cell>
          <table:table-cell office:value-type="float" office:value="535.7" calcext:value-type="float">
            <text:p>535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5" calcext:value-type="float">
            <text:p>417.5</text:p>
          </table:table-cell>
          <table:table-cell office:value-type="float" office:value="535.9" calcext:value-type="float">
            <text:p>535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75" calcext:value-type="float">
            <text:p>417.75</text:p>
          </table:table-cell>
          <table:table-cell office:value-type="float" office:value="536.1" calcext:value-type="float">
            <text:p>536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536.4" calcext:value-type="float">
            <text:p>536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25" calcext:value-type="float">
            <text:p>418.25</text:p>
          </table:table-cell>
          <table:table-cell office:value-type="float" office:value="536.6" calcext:value-type="float">
            <text:p>536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5" calcext:value-type="float">
            <text:p>418.5</text:p>
          </table:table-cell>
          <table:table-cell office:value-type="float" office:value="536.8" calcext:value-type="float">
            <text:p>536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75" calcext:value-type="float">
            <text:p>418.75</text:p>
          </table:table-cell>
          <table:table-cell office:value-type="float" office:value="537.1" calcext:value-type="float">
            <text:p>53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537.3" calcext:value-type="float">
            <text:p>53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25" calcext:value-type="float">
            <text:p>419.25</text:p>
          </table:table-cell>
          <table:table-cell office:value-type="float" office:value="537.5" calcext:value-type="float">
            <text:p>53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5" calcext:value-type="float">
            <text:p>419.5</text:p>
          </table:table-cell>
          <table:table-cell office:value-type="float" office:value="537.7" calcext:value-type="float">
            <text:p>537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75" calcext:value-type="float">
            <text:p>419.75</text:p>
          </table:table-cell>
          <table:table-cell office:value-type="float" office:value="538" calcext:value-type="float">
            <text:p>53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538.2" calcext:value-type="float">
            <text:p>538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25" calcext:value-type="float">
            <text:p>420.25</text:p>
          </table:table-cell>
          <table:table-cell office:value-type="float" office:value="538.4" calcext:value-type="float">
            <text:p>53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5" calcext:value-type="float">
            <text:p>420.5</text:p>
          </table:table-cell>
          <table:table-cell office:value-type="float" office:value="538.7" calcext:value-type="float">
            <text:p>538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75" calcext:value-type="float">
            <text:p>420.75</text:p>
          </table:table-cell>
          <table:table-cell office:value-type="float" office:value="538.9" calcext:value-type="float">
            <text:p>538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" calcext:value-type="float">
            <text:p>421</text:p>
          </table:table-cell>
          <table:table-cell office:value-type="float" office:value="539.1" calcext:value-type="float">
            <text:p>539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25" calcext:value-type="float">
            <text:p>421.25</text:p>
          </table:table-cell>
          <table:table-cell office:value-type="float" office:value="539.4" calcext:value-type="float">
            <text:p>53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5" calcext:value-type="float">
            <text:p>421.5</text:p>
          </table:table-cell>
          <table:table-cell office:value-type="float" office:value="539.6" calcext:value-type="float">
            <text:p>53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75" calcext:value-type="float">
            <text:p>421.75</text:p>
          </table:table-cell>
          <table:table-cell office:value-type="float" office:value="539.8" calcext:value-type="float">
            <text:p>53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2" calcext:value-type="float">
            <text:p>422</text:p>
          </table:table-cell>
          <table:table-cell office:value-type="float" office:value="540.1" calcext:value-type="float">
            <text:p>54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422.25" calcext:value-type="float">
            <text:p>422.25</text:p>
          </table:table-cell>
          <table:table-cell office:value-type="float" office:value="540.4" calcext:value-type="float">
            <text:p>54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2.5" calcext:value-type="float">
            <text:p>422.5</text:p>
          </table:table-cell>
          <table:table-cell office:value-type="float" office:value="540.8" calcext:value-type="float">
            <text:p>540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2.75" calcext:value-type="float">
            <text:p>422.75</text:p>
          </table:table-cell>
          <table:table-cell office:value-type="float" office:value="541.1" calcext:value-type="float">
            <text:p>54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" calcext:value-type="float">
            <text:p>423</text:p>
          </table:table-cell>
          <table:table-cell office:value-type="float" office:value="541.5" calcext:value-type="float">
            <text:p>541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25" calcext:value-type="float">
            <text:p>423.25</text:p>
          </table:table-cell>
          <table:table-cell office:value-type="float" office:value="541.8" calcext:value-type="float">
            <text:p>54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5" calcext:value-type="float">
            <text:p>423.5</text:p>
          </table:table-cell>
          <table:table-cell office:value-type="float" office:value="542.2" calcext:value-type="float">
            <text:p>542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75" calcext:value-type="float">
            <text:p>423.75</text:p>
          </table:table-cell>
          <table:table-cell office:value-type="float" office:value="542.5" calcext:value-type="float">
            <text:p>54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542.9" calcext:value-type="float">
            <text:p>542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25" calcext:value-type="float">
            <text:p>424.25</text:p>
          </table:table-cell>
          <table:table-cell office:value-type="float" office:value="543.2" calcext:value-type="float">
            <text:p>54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5" calcext:value-type="float">
            <text:p>424.5</text:p>
          </table:table-cell>
          <table:table-cell office:value-type="float" office:value="543.6" calcext:value-type="float">
            <text:p>543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75" calcext:value-type="float">
            <text:p>424.75</text:p>
          </table:table-cell>
          <table:table-cell office:value-type="float" office:value="543.9" calcext:value-type="float">
            <text:p>54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544.3" calcext:value-type="float">
            <text:p>544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25" calcext:value-type="float">
            <text:p>425.25</text:p>
          </table:table-cell>
          <table:table-cell office:value-type="float" office:value="544.6" calcext:value-type="float">
            <text:p>544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5" calcext:value-type="float">
            <text:p>425.5</text:p>
          </table:table-cell>
          <table:table-cell office:value-type="float" office:value="545" calcext:value-type="float">
            <text:p>54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75" calcext:value-type="float">
            <text:p>425.75</text:p>
          </table:table-cell>
          <table:table-cell office:value-type="float" office:value="545.3" calcext:value-type="float">
            <text:p>54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" calcext:value-type="float">
            <text:p>426</text:p>
          </table:table-cell>
          <table:table-cell office:value-type="float" office:value="545.7" calcext:value-type="float">
            <text:p>54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25" calcext:value-type="float">
            <text:p>426.25</text:p>
          </table:table-cell>
          <table:table-cell office:value-type="float" office:value="546" calcext:value-type="float">
            <text:p>54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5" calcext:value-type="float">
            <text:p>426.5</text:p>
          </table:table-cell>
          <table:table-cell office:value-type="float" office:value="546.4" calcext:value-type="float">
            <text:p>546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75" calcext:value-type="float">
            <text:p>426.75</text:p>
          </table:table-cell>
          <table:table-cell office:value-type="float" office:value="546.7" calcext:value-type="float">
            <text:p>546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547.1" calcext:value-type="float">
            <text:p>547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.25" calcext:value-type="float">
            <text:p>427.25</text:p>
          </table:table-cell>
          <table:table-cell office:value-type="float" office:value="547.4" calcext:value-type="float">
            <text:p>547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.5" calcext:value-type="float">
            <text:p>427.5</text:p>
          </table:table-cell>
          <table:table-cell office:value-type="float" office:value="548.2" calcext:value-type="float">
            <text:p>548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427.75" calcext:value-type="float">
            <text:p>427.75</text:p>
          </table:table-cell>
          <table:table-cell office:value-type="float" office:value="549.1" calcext:value-type="float">
            <text:p>549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" calcext:value-type="float">
            <text:p>428</text:p>
          </table:table-cell>
          <table:table-cell office:value-type="float" office:value="550" calcext:value-type="float">
            <text:p>55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25" calcext:value-type="float">
            <text:p>428.25</text:p>
          </table:table-cell>
          <table:table-cell office:value-type="float" office:value="550.9" calcext:value-type="float">
            <text:p>550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5" calcext:value-type="float">
            <text:p>428.5</text:p>
          </table:table-cell>
          <table:table-cell office:value-type="float" office:value="551.8" calcext:value-type="float">
            <text:p>551.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75" calcext:value-type="float">
            <text:p>428.75</text:p>
          </table:table-cell>
          <table:table-cell office:value-type="float" office:value="552.7" calcext:value-type="float">
            <text:p>552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553.6" calcext:value-type="float">
            <text:p>553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.25" calcext:value-type="float">
            <text:p>429.25</text:p>
          </table:table-cell>
          <table:table-cell office:value-type="float" office:value="554.5" calcext:value-type="float">
            <text:p>554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.5" calcext:value-type="float">
            <text:p>429.5</text:p>
          </table:table-cell>
          <table:table-cell office:value-type="float" office:value="555" calcext:value-type="float">
            <text:p>555</text:p>
          </table:table-cell>
          <table:table-cell office:value-type="float" office:value="3.6" calcext:value-type="float">
            <text:p>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date-style style:name="N146">
      <number:month/>
      <number:text>/</number:text>
      <number:day/>
      <number:text>/</number:text>
      <number:year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day/>
      <number:text>-</number:text>
      <number:month number:textual="true"/>
    </number:date-style>
    <number:date-style style:name="N149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 loext:blank-width-char=")1">-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minutes number:style="long"/>
      <number:text>:</number:text>
      <number:seconds number:style="long"/>
    </number:time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number-style style:name="N181">
      <number:number number:decimal-places="13" number:min-decimal-places="13" number:min-integer-digits="1"/>
    </number:number-style>
    <number:number-style style:name="N182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7:09:20.029031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7:11:55.065721344</meta:creation-date>
    <dc:date>2026-06-09T17:09:53.411495751</dc:date>
    <meta:editing-duration>PT17H1M36S</meta:editing-duration>
    <meta:editing-cycles>200</meta:editing-cycles>
    <meta:generator>LibreOffice/25.8.7.3$Linux_X86_64 LibreOffice_project/fa62c01a44f84ad74d4904d2c894664e98fd27c1</meta:generator>
    <meta:document-statistic meta:table-count="7" meta:cell-count="8497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68cm" svg:height="9.114cm" xlink:href=".." xlink:type="simple" chart:class="chart:scatter" chart:style-name="ch1">
        <chart:legend chart:legend-position="end" svg:x="9.032cm" svg:y="4.009cm" style:legend-expansion="high" chart:style-name="ch2"/>
        <chart:plot-area chart:style-name="ch3" svg:x="1.298cm" svg:y="0.182cm" svg:width="7.447cm" svg:height="7.769cm">
          <chart:coordinate-region svg:x="2.123cm" svg:y="0.382cm" svg:width="6.333cm" svg:height="6.922cm"/>
          <chart:axis chart:dimension="x" chart:name="primary-x" chart:style-name="ch4">
            <chart:title svg:x="4.082cm" svg:y="8.133cm" chart:style-name="ch5">
              <text:p><text:span text:style-name="T1">volume (mL)</text:span></text:p>
            </chart:title>
            <chart:grid chart:style-name="ch6" chart:class="major"/>
          </chart:axis>
          <chart:axis chart:dimension="y" chart:name="primary-y" chart:style-name="ch4">
            <chart:title svg:x="0.451cm" svg:y="4.397cm" chart:style-name="ch7">
              <text:p><text:span text:style-name="T1">rpm</text:span></text:p>
            </chart:title>
            <chart:grid chart:style-name="ch6" chart:class="major"/>
          </chart:axis>
          <chart:series chart:style-name="ch8" chart:values-cell-range-address="'Calibracao Bombas'.M2:'Calibracao Bombas'.M12" chart:label-cell-address="'Calibracao Bombas'.M1:'Calibracao Bombas'.M1" chart:class="chart:scatter">
            <chart:domain table:cell-range-address="'Calibracao Bombas'.L2:'Calibracao Bombas'.L12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volume (mL)</text:p>
                <draw:g>
                  <svg:desc>'Calibracao Bombas'.M1:'Calibracao Bomba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libracao Bombas'.L2:'Calibracao Bombas'.L12</svg:desc>
                </draw:g>
              </table:table-cell>
              <table:table-cell office:value-type="float" office:value="1.5">
                <text:p>1.5</text:p>
                <draw:g>
                  <svg:desc>'Calibracao Bombas'.M2:'Calibracao Bombas'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17cm" svg:height="8.957cm" xlink:href=".." xlink:type="simple" chart:class="chart:scatter" chart:style-name="ch1">
        <chart:legend chart:legend-position="end" svg:x="8.981cm" svg:y="3.93cm" style:legend-expansion="high" chart:style-name="ch2"/>
        <chart:plot-area chart:style-name="ch3" svg:x="1.297cm" svg:y="0.179cm" svg:width="7.398cm" svg:height="7.618cm">
          <chart:coordinate-region svg:x="2.026cm" svg:y="0.379cm" svg:width="6.428cm" svg:height="6.771cm"/>
          <chart:axis chart:dimension="x" chart:name="primary-x" chart:style-name="ch4">
            <chart:title svg:x="4.057cm" svg:y="7.976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19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D2:'Calibracao Bombas'.D12" chart:label-cell-address="'Calibracao Bombas'.D1:'Calibracao Bombas'.D1" chart:class="chart:scatter">
            <chart:domain table:cell-range-address="'Calibracao Bombas'.C2:'Calibracao Bombas'.C12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ume (mL)</text:p>
                <draw:g>
                  <svg:desc>'Calibracao Bombas'.D1:'Calibracao Bomba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alibracao Bombas'.C2:'Calibracao Bombas'.C12</svg:desc>
                </draw:g>
              </table:table-cell>
              <table:table-cell office:value-type="float" office:value="0.3">
                <text:p>0.3</text:p>
                <draw:g>
                  <svg:desc>'Calibracao Bombas'.D2:'Calibracao Bombas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">
                <text:p>0.1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1">
                <text:p>0.19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">
                <text:p>0.23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5">
                <text:p>0.25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7">
                <text:p>0.28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9">
                <text:p>0.3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">
                <text:p>0.39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">
                <text:p>0.47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9">
                <text:p>0.559</text:p>
              </table:table-cell>
              <table:table-cell office:value-type="float" office:value="1.67">
                <text:p>1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11cm" svg:height="8.957cm" xlink:href=".." xlink:type="simple" chart:class="chart:scatter" chart:style-name="ch1">
        <chart:legend chart:legend-position="end" svg:x="8.975cm" svg:y="3.93cm" style:legend-expansion="high" chart:style-name="ch2"/>
        <chart:plot-area chart:style-name="ch3" svg:x="1.297cm" svg:y="0.179cm" svg:width="7.392cm" svg:height="7.618cm">
          <chart:coordinate-region svg:x="1.739cm" svg:y="0.378cm" svg:width="6.709cm" svg:height="6.772cm"/>
          <chart:axis chart:dimension="x" chart:name="primary-x" chart:style-name="ch4">
            <chart:title svg:x="4.054cm" svg:y="7.976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19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D26:'Calibracao Bombas'.D36" chart:label-cell-address="'Calibracao Bombas'.D25:'Calibracao Bombas'.D25" chart:class="chart:scatter">
            <chart:domain table:cell-range-address="'Calibracao Bombas'.C26:'Calibracao Bombas'.C36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ume (mL)</text:p>
                <draw:g>
                  <svg:desc>'Calibracao Bombas'.D25:'Calibracao Bombas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'Calibracao Bombas'.C26:'Calibracao Bombas'.C36</svg:desc>
                </draw:g>
              </table:table-cell>
              <table:table-cell office:value-type="float" office:value="1.8">
                <text:p>1.8</text:p>
                <draw:g>
                  <svg:desc>'Calibracao Bombas'.D26:'Calibracao Bombas'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7">
                <text:p>0.83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">
                <text:p>0.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4">
                <text:p>1.00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2">
                <text:p>1.17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9">
                <text:p>1.3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7">
                <text:p>1.50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4">
                <text:p>1.67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2">
                <text:p>1.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9">
                <text:p>2.00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6">
                <text:p>2.176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224cm" svg:height="8.959cm" xlink:href=".." xlink:type="simple" chart:class="chart:scatter" chart:style-name="ch1">
        <chart:legend chart:legend-position="end" svg:x="9.672cm" svg:y="3.931cm" style:legend-expansion="high" chart:style-name="ch2"/>
        <chart:plot-area chart:style-name="ch3" svg:x="1.295cm" svg:y="0.179cm" svg:width="8.093cm" svg:height="7.62cm">
          <chart:coordinate-region svg:x="1.737cm" svg:y="0.378cm" svg:width="7.458cm" svg:height="6.774cm"/>
          <chart:axis chart:dimension="x" chart:name="primary-x" chart:style-name="ch4">
            <chart:title svg:x="4.402cm" svg:y="7.978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2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K26:'Calibracao Bombas'.K36" chart:label-cell-address="'Calibracao Bombas'.K25:'Calibracao Bombas'.K25" chart:class="chart:scatter">
            <chart:domain table:cell-range-address="'Calibracao Bombas'.J26:'Calibracao Bombas'.J36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mL/min</text:p>
                <draw:g>
                  <svg:desc>'Calibracao Bombas'.K25:'Calibracao Bombas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libracao Bombas'.J26:'Calibracao Bombas'.J36</svg:desc>
                </draw:g>
              </table:table-cell>
              <table:table-cell office:value-type="float" office:value="1">
                <text:p>1</text:p>
                <draw:g>
                  <svg:desc>'Calibracao Bombas'.K26:'Calibracao Bombas'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794cm"/>
          <chart:axis chart:dimension="x" chart:name="primary-x" chart:style-name="ch4" chartooo:axis-type="auto">
            <chartooo:date-scale/>
            <chart:categories table:cell-range-address="Production.A3:Productio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B3:Production.B21" chart:label-cell-address="Production.B2:Production.B2" chart:class="chart:bar">
            <chart:data-point chart:repeated="19"/>
          </chart:series>
          <chart:series chart:style-name="ch8" chart:values-cell-range-address="Production.C3:Production.C21" chart:label-cell-address="Production.C2:Production.C2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B2:Production.B2</svg:desc>
                </draw:g>
              </table:table-cell>
              <table:table-cell office:value-type="string">
                <text:p>Flow (nML/d)</text:p>
                <draw:g>
                  <svg:desc>Production.C2:Production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A3:Production.A21</svg:desc>
                </draw:g>
              </table:table-cell>
              <table:table-cell office:value-type="float" office:value="0">
                <text:p>0</text:p>
                <draw:g>
                  <svg:desc>Production.B3:Production.B21</svg:desc>
                </draw:g>
              </table:table-cell>
              <table:table-cell office:value-type="float" office:value="0">
                <text:p>0</text:p>
                <draw:g>
                  <svg:desc>Production.C3:Production.C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4">
                <text:p>13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8">
                <text:p>29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.8">
                <text:p>55.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4.6">
                <text:p>124.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.1">
                <text:p>149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7.4">
                <text:p>217.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7.9">
                <text:p>267.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5.8">
                <text:p>305.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0.2">
                <text:p>350.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93.7">
                <text:p>393.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0.7">
                <text:p>430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8.4">
                <text:p>478.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2.9">
                <text:p>522.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5">
                <text:p>555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505cm"/>
          <chart:axis chart:dimension="x" chart:name="primary-x" chart:style-name="ch4" chartooo:axis-type="auto">
            <chartooo:date-scale/>
            <chart:categories table:cell-range-address="Production.E3:Production.E4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F3:Production.F433" chart:label-cell-address="Production.F2:Production.F2" chart:class="chart:bar">
            <chart:data-point chart:repeated="431"/>
          </chart:series>
          <chart:series chart:style-name="ch8" chart:values-cell-range-address="Production.G3:Production.G433" chart:label-cell-address="Production.G2:Production.G2" chart:class="chart:line">
            <chart:data-point chart:repeated="4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F2:Production.F2</svg:desc>
                </draw:g>
              </table:table-cell>
              <table:table-cell office:value-type="string">
                <text:p>Flow (nML/h)</text:p>
                <draw:g>
                  <svg:desc>Production.G2:Production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E3:Production.E433</svg:desc>
                </draw:g>
              </table:table-cell>
              <table:table-cell office:value-type="float" office:value="0">
                <text:p>0</text:p>
                <draw:g>
                  <svg:desc>Production.F3:Production.F433</svg:desc>
                </draw:g>
              </table:table-cell>
              <table:table-cell office:value-type="float" office:value="0">
                <text:p>0</text:p>
                <draw:g>
                  <svg:desc>Production.G3:Production.G4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.1">
                <text:p>9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.4">
                <text:p>1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.3">
                <text:p>15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6.9">
                <text:p>1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4.7">
                <text:p>2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.2">
                <text:p>27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9.8">
                <text:p>29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2.8">
                <text:p>3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4.3">
                <text:p>3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8.9">
                <text:p>3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9.5">
                <text:p>49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5.8">
                <text:p>55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2">
                <text:p>5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.9">
                <text:p>56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7.2">
                <text:p>57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9">
                <text:p>5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">
                <text:p>5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8.5">
                <text:p>5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9.2">
                <text:p>5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.5">
                <text:p>5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0.2">
                <text:p>6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0.5">
                <text:p>6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1.7">
                <text:p>61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2.4">
                <text:p>6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3.2">
                <text:p>63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3.9">
                <text:p>6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4.6">
                <text:p>6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5.3">
                <text:p>65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.1">
                <text:p>74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6.8">
                <text:p>116.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4.6">
                <text:p>12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28.6">
                <text:p>12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9.2">
                <text:p>12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9.5">
                <text:p>12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30.9">
                <text:p>13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1.2">
                <text:p>13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32.6">
                <text:p>13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32.9">
                <text:p>132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4">
                <text:p>1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34.3">
                <text:p>134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36.7">
                <text:p>136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3.7">
                <text:p>143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9.1">
                <text:p>149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3.8">
                <text:p>153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7.3">
                <text:p>15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60.5">
                <text:p>160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3.1">
                <text:p>16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5.7">
                <text:p>165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7.5">
                <text:p>167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9.4">
                <text:p>169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1.2">
                <text:p>17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2.4">
                <text:p>17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73.1">
                <text:p>17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73.9">
                <text:p>17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4.6">
                <text:p>17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75.4">
                <text:p>17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6.1">
                <text:p>17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6.9">
                <text:p>17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7.6">
                <text:p>177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8.4">
                <text:p>17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9.8">
                <text:p>17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.3">
                <text:p>18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2.8">
                <text:p>182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4.3">
                <text:p>18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98.3">
                <text:p>19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07.8">
                <text:p>207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7.4">
                <text:p>217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2.8">
                <text:p>222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26.8">
                <text:p>22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30.2">
                <text:p>230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2.8">
                <text:p>232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37.3">
                <text:p>23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38.7">
                <text:p>238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39.6">
                <text:p>23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0.6">
                <text:p>2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1.6">
                <text:p>24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42.5">
                <text:p>24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3.5">
                <text:p>24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4.4">
                <text:p>2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45.4">
                <text:p>24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46.2">
                <text:p>2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7.1">
                <text:p>2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47.9">
                <text:p>247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48.8">
                <text:p>24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49.6">
                <text:p>2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50.5">
                <text:p>25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51.4">
                <text:p>251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56.9">
                <text:p>25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5.6">
                <text:p>265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7.9">
                <text:p>26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70.2">
                <text:p>27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72.4">
                <text:p>272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72.9">
                <text:p>272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73.4">
                <text:p>27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73.9">
                <text:p>273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4.4">
                <text:p>27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4.9">
                <text:p>274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5.4">
                <text:p>275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5.9">
                <text:p>27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6.4">
                <text:p>27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6.9">
                <text:p>27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7.5">
                <text:p>27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.5">
                <text:p>27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9.7">
                <text:p>279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0.9">
                <text:p>28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.1">
                <text:p>28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.4">
                <text:p>2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.6">
                <text:p>2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.8">
                <text:p>2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96.4">
                <text:p>296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01.4">
                <text:p>301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05.8">
                <text:p>30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8.3">
                <text:p>308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.7">
                <text:p>309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11.1">
                <text:p>31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13.9">
                <text:p>31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14.9">
                <text:p>31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5.6">
                <text:p>315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16.3">
                <text:p>31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17.7">
                <text:p>31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18.4">
                <text:p>31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.1">
                <text:p>31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19.8">
                <text:p>31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20.5">
                <text:p>32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21.2">
                <text:p>32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22.2">
                <text:p>32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23.4">
                <text:p>32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4.6">
                <text:p>32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25.7">
                <text:p>325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26.9">
                <text:p>326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28.1">
                <text:p>32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40.5">
                <text:p>340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46.1">
                <text:p>34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50.2">
                <text:p>350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52">
                <text:p>3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53.9">
                <text:p>353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55.7">
                <text:p>35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57.3">
                <text:p>357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58.2">
                <text:p>35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59.1">
                <text:p>35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60">
                <text:p>3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0.9">
                <text:p>36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61.8">
                <text:p>36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62.7">
                <text:p>362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63.6">
                <text:p>36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4.5">
                <text:p>36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65.6">
                <text:p>36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66.7">
                <text:p>36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67.9">
                <text:p>367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9">
                <text:p>3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70.1">
                <text:p>37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71.2">
                <text:p>37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73.2">
                <text:p>37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75.5">
                <text:p>375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77.8">
                <text:p>37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89.8">
                <text:p>38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93.3">
                <text:p>393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93.7">
                <text:p>39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94.4">
                <text:p>3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94.8">
                <text:p>39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95.2">
                <text:p>39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95.5">
                <text:p>39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95.9">
                <text:p>395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96.3">
                <text:p>396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97">
                <text:p>3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97.4">
                <text:p>39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97.8">
                <text:p>39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98.1">
                <text:p>39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98.5">
                <text:p>398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98.9">
                <text:p>398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99.6">
                <text:p>39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00">
                <text:p>4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00.4">
                <text:p>40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02.6">
                <text:p>402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04.7">
                <text:p>404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06.8">
                <text:p>406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20.1">
                <text:p>420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26.9">
                <text:p>426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0.7">
                <text:p>43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32.8">
                <text:p>43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34.9">
                <text:p>434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36.9">
                <text:p>436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38.1">
                <text:p>43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39.4">
                <text:p>439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40.6">
                <text:p>44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41.8">
                <text:p>44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43">
                <text:p>4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44.2">
                <text:p>444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45.3">
                <text:p>4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46.4">
                <text:p>44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47.6">
                <text:p>44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48.7">
                <text:p>44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49.8">
                <text:p>44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50.9">
                <text:p>45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52.1">
                <text:p>452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53.5">
                <text:p>45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54.9">
                <text:p>454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56.3">
                <text:p>456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57.7">
                <text:p>457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61.2">
                <text:p>461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1.3">
                <text:p>471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75.6">
                <text:p>475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78.4">
                <text:p>478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82.2">
                <text:p>48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83.4">
                <text:p>4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84.6">
                <text:p>4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85.8">
                <text:p>4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7">
                <text:p>4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88.2">
                <text:p>48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89.3">
                <text:p>48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90.3">
                <text:p>49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91.4">
                <text:p>49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92.5">
                <text:p>49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93.6">
                <text:p>493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94.7">
                <text:p>494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95.8">
                <text:p>49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97">
                <text:p>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.3">
                <text:p>498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99.5">
                <text:p>49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0.7">
                <text:p>50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02">
                <text:p>5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4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08.5">
                <text:p>508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18">
                <text:p>51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20.4">
                <text:p>52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22.9">
                <text:p>52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25.3">
                <text:p>525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26.8">
                <text:p>526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28.3">
                <text:p>528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29.8">
                <text:p>52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31.3">
                <text:p>53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32.7">
                <text:p>532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33.6">
                <text:p>53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34.5">
                <text:p>53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35.4">
                <text:p>53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36.4">
                <text:p>53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37.3">
                <text:p>53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38.2">
                <text:p>53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39.1">
                <text:p>53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40.1">
                <text:p>54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41.5">
                <text:p>54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42.9">
                <text:p>542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44.3">
                <text:p>54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45.7">
                <text:p>54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47.1">
                <text:p>54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50">
                <text:p>5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53.6">
                <text:p>55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55">
                <text:p>555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167cm"/>
          <chart:axis chart:dimension="x" chart:name="primary-x" chart:style-name="ch4" chartooo:axis-type="auto">
            <chartooo:date-scale/>
            <chart:categories table:cell-range-address="Production.I3:Production.I17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J3:Production.J1721" chart:label-cell-address="Production.J2:Production.J2" chart:class="chart:bar">
            <chart:data-point chart:repeated="1719"/>
          </chart:series>
          <chart:series chart:style-name="ch8" chart:values-cell-range-address="Production.K3:Production.K1721" chart:label-cell-address="Production.K2:Production.K2" chart:class="chart:line">
            <chart:data-point chart:repeated="17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J2:Production.J2</svg:desc>
                </draw:g>
              </table:table-cell>
              <table:table-cell office:value-type="string">
                <text:p>Flow (nML/h)</text:p>
                <draw:g>
                  <svg:desc>Production.K2:Production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I3:Production.I1721</svg:desc>
                </draw:g>
              </table:table-cell>
              <table:table-cell office:value-type="float" office:value="0">
                <text:p>0</text:p>
                <draw:g>
                  <svg:desc>Production.J3:Production.J1721</svg:desc>
                </draw:g>
              </table:table-cell>
              <table:table-cell office:value-type="float" office:value="0">
                <text:p>0</text:p>
                <draw:g>
                  <svg:desc>Production.K3:Production.K172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25">
                <text:p>5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75">
                <text:p>5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5">
                <text:p>5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75">
                <text:p>5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25">
                <text:p>5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75">
                <text:p>5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25">
                <text:p>5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75">
                <text:p>5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25">
                <text:p>5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75">
                <text:p>5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75">
                <text:p>5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25">
                <text:p>5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75">
                <text:p>5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75">
                <text:p>5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25">
                <text:p>5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75">
                <text:p>5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25">
                <text:p>6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75">
                <text:p>6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25">
                <text:p>6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75">
                <text:p>6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25">
                <text:p>6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75">
                <text:p>6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25">
                <text:p>6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75">
                <text:p>6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25">
                <text:p>6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75">
                <text:p>6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25">
                <text:p>6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75">
                <text:p>6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25">
                <text:p>6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75">
                <text:p>6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25">
                <text:p>6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75">
                <text:p>6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.25">
                <text:p>6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9.75">
                <text:p>69.7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0.25">
                <text:p>70.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.75">
                <text:p>70.7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.25">
                <text:p>71.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1.75">
                <text:p>71.7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25">
                <text:p>72.2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75">
                <text:p>72.7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25">
                <text:p>73.2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75">
                <text:p>73.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25">
                <text:p>74.2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75">
                <text:p>74.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25">
                <text:p>75.2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75">
                <text:p>75.7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25">
                <text:p>76.2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75">
                <text:p>76.7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25">
                <text:p>77.2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75">
                <text:p>77.7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25">
                <text:p>78.2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75">
                <text:p>78.7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25">
                <text:p>79.2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25">
                <text:p>80.2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75">
                <text:p>80.7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25">
                <text:p>81.2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75">
                <text:p>81.7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25">
                <text:p>82.2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75">
                <text:p>82.7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25">
                <text:p>83.2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75">
                <text:p>83.7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25">
                <text:p>84.2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75">
                <text:p>84.7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25">
                <text:p>85.2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75">
                <text:p>85.7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25">
                <text:p>86.2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75">
                <text:p>86.7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25">
                <text:p>87.2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75">
                <text:p>87.7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25">
                <text:p>88.2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75">
                <text:p>88.7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25">
                <text:p>89.2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75">
                <text:p>89.7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25">
                <text:p>90.2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75">
                <text:p>90.7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.25">
                <text:p>91.25</text:p>
              </table:table-cell>
              <table:table-cell office:value-type="float" office:value="2.1">
                <text:p>2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1.75">
                <text:p>91.75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25">
                <text:p>92.25</text:p>
              </table:table-cell>
              <table:table-cell office:value-type="float" office:value="2.7">
                <text:p>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.8">
                <text:p>2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75">
                <text:p>92.75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.25">
                <text:p>93.25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5.1">
                <text:p>5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3.75">
                <text:p>93.75</text:p>
              </table:table-cell>
              <table:table-cell office:value-type="float" office:value="5.3">
                <text:p>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25">
                <text:p>94.25</text:p>
              </table:table-cell>
              <table:table-cell office:value-type="float" office:value="5.9">
                <text:p>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6.1">
                <text:p>6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75">
                <text:p>94.75</text:p>
              </table:table-cell>
              <table:table-cell office:value-type="float" office:value="6.4">
                <text:p>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">
                <text:p>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5.75">
                <text:p>95.75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25">
                <text:p>96.2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75">
                <text:p>96.7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25">
                <text:p>97.2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75">
                <text:p>97.7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25">
                <text:p>98.2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75">
                <text:p>98.7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25">
                <text:p>99.2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75">
                <text:p>99.7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25">
                <text:p>100.2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75">
                <text:p>100.7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25">
                <text:p>101.2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75">
                <text:p>101.7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75">
                <text:p>102.7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25">
                <text:p>103.2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75">
                <text:p>103.7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25">
                <text:p>104.2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75">
                <text:p>104.7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25">
                <text:p>105.2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75">
                <text:p>105.7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25">
                <text:p>106.2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75">
                <text:p>106.7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25">
                <text:p>107.2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75">
                <text:p>107.7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25">
                <text:p>108.2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75">
                <text:p>108.7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25">
                <text:p>109.2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75">
                <text:p>109.7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25">
                <text:p>110.2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75">
                <text:p>110.7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25">
                <text:p>111.2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75">
                <text:p>111.7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25">
                <text:p>112.25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75">
                <text:p>112.7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25">
                <text:p>113.2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75">
                <text:p>113.7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25">
                <text:p>114.2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75">
                <text:p>114.7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25">
                <text:p>115.2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75">
                <text:p>115.7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25">
                <text:p>116.2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75">
                <text:p>116.7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25">
                <text:p>117.2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75">
                <text:p>117.7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25">
                <text:p>118.2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75">
                <text:p>118.75</text:p>
              </table:table-cell>
              <table:table-cell office:value-type="float" office:value="11.4">
                <text:p>1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.25">
                <text:p>119.2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.75">
                <text:p>119.7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.4">
                <text:p>1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.25">
                <text:p>120.25</text:p>
              </table:table-cell>
              <table:table-cell office:value-type="float" office:value="13.9">
                <text:p>13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14.4">
                <text:p>14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0.75">
                <text:p>120.75</text:p>
              </table:table-cell>
              <table:table-cell office:value-type="float" office:value="14.8">
                <text:p>1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.3">
                <text:p>15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25">
                <text:p>121.25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16.2">
                <text:p>1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75">
                <text:p>121.75</text:p>
              </table:table-cell>
              <table:table-cell office:value-type="float" office:value="16.7">
                <text:p>16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6.9">
                <text:p>16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2.25">
                <text:p>122.25</text:p>
              </table:table-cell>
              <table:table-cell office:value-type="float" office:value="16.9">
                <text:p>1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16.9">
                <text:p>1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2.75">
                <text:p>122.75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25">
                <text:p>123.2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75">
                <text:p>123.7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25">
                <text:p>124.25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25">
                <text:p>125.25</text:p>
              </table:table-cell>
              <table:table-cell office:value-type="float" office:value="17.4">
                <text:p>1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17.4">
                <text:p>1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75">
                <text:p>125.75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25">
                <text:p>126.25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75">
                <text:p>126.7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25">
                <text:p>127.2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75">
                <text:p>127.75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25">
                <text:p>128.25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75">
                <text:p>128.75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25">
                <text:p>129.25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75">
                <text:p>129.75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25">
                <text:p>130.2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75">
                <text:p>130.7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25">
                <text:p>131.25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75">
                <text:p>131.75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25">
                <text:p>132.25</text:p>
              </table:table-cell>
              <table:table-cell office:value-type="float" office:value="18.5">
                <text:p>18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18.5">
                <text:p>18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75">
                <text:p>132.75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25">
                <text:p>133.25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18.7">
                <text:p>18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75">
                <text:p>133.75</text:p>
              </table:table-cell>
              <table:table-cell office:value-type="float" office:value="18.7">
                <text:p>18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25">
                <text:p>134.25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75">
                <text:p>134.7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25">
                <text:p>135.2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75">
                <text:p>135.75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25">
                <text:p>136.25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75">
                <text:p>136.75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25">
                <text:p>137.2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75">
                <text:p>137.7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25">
                <text:p>138.25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75">
                <text:p>138.75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25">
                <text:p>139.25</text:p>
              </table:table-cell>
              <table:table-cell office:value-type="float" office:value="19.6">
                <text:p>1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19.6">
                <text:p>1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75">
                <text:p>139.75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25">
                <text:p>140.25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75">
                <text:p>140.75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.25">
                <text:p>141.25</text:p>
              </table:table-cell>
              <table:table-cell office:value-type="float" office:value="19.9">
                <text:p>19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23.4">
                <text:p>23.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41.75">
                <text:p>141.75</text:p>
              </table:table-cell>
              <table:table-cell office:value-type="float" office:value="24.1">
                <text:p>24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4.7">
                <text:p>24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25">
                <text:p>142.25</text:p>
              </table:table-cell>
              <table:table-cell office:value-type="float" office:value="25.3">
                <text:p>25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75">
                <text:p>142.75</text:p>
              </table:table-cell>
              <table:table-cell office:value-type="float" office:value="26.6">
                <text:p>26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.2">
                <text:p>27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25">
                <text:p>143.25</text:p>
              </table:table-cell>
              <table:table-cell office:value-type="float" office:value="27.9">
                <text:p>27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28.5">
                <text:p>28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75">
                <text:p>143.75</text:p>
              </table:table-cell>
              <table:table-cell office:value-type="float" office:value="29.2">
                <text:p>29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9.8">
                <text:p>29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.25">
                <text:p>144.25</text:p>
              </table:table-cell>
              <table:table-cell office:value-type="float" office:value="30.5">
                <text:p>3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31.3">
                <text:p>31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4.75">
                <text:p>144.75</text:p>
              </table:table-cell>
              <table:table-cell office:value-type="float" office:value="32.1">
                <text:p>32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2.8">
                <text:p>32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.25">
                <text:p>145.25</text:p>
              </table:table-cell>
              <table:table-cell office:value-type="float" office:value="33.6">
                <text:p>33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34.2">
                <text:p>34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5.75">
                <text:p>145.75</text:p>
              </table:table-cell>
              <table:table-cell office:value-type="float" office:value="34.3">
                <text:p>34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4.3">
                <text:p>34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25">
                <text:p>146.25</text:p>
              </table:table-cell>
              <table:table-cell office:value-type="float" office:value="34.4">
                <text:p>34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34.4">
                <text:p>34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75">
                <text:p>146.75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34.6">
                <text:p>34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34.6">
                <text:p>34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75">
                <text:p>147.75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25">
                <text:p>148.25</text:p>
              </table:table-cell>
              <table:table-cell office:value-type="float" office:value="34.8">
                <text:p>34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34.8">
                <text:p>34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75">
                <text:p>148.75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25">
                <text:p>149.2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75">
                <text:p>149.75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25">
                <text:p>150.25</text:p>
              </table:table-cell>
              <table:table-cell office:value-type="float" office:value="35.2">
                <text:p>35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35.2">
                <text:p>35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75">
                <text:p>150.75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25">
                <text:p>151.25</text:p>
              </table:table-cell>
              <table:table-cell office:value-type="float" office:value="35.4">
                <text:p>3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35.5">
                <text:p>3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75">
                <text:p>151.75</text:p>
              </table:table-cell>
              <table:table-cell office:value-type="float" office:value="35.5">
                <text:p>3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25">
                <text:p>152.25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35.7">
                <text:p>35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75">
                <text:p>152.75</text:p>
              </table:table-cell>
              <table:table-cell office:value-type="float" office:value="35.7">
                <text:p>35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25">
                <text:p>153.25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35.9">
                <text:p>35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75">
                <text:p>153.75</text:p>
              </table:table-cell>
              <table:table-cell office:value-type="float" office:value="35.9">
                <text:p>35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25">
                <text:p>154.25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36.1">
                <text:p>3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75">
                <text:p>154.75</text:p>
              </table:table-cell>
              <table:table-cell office:value-type="float" office:value="36.1">
                <text:p>3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25">
                <text:p>155.2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36.3">
                <text:p>36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75">
                <text:p>155.75</text:p>
              </table:table-cell>
              <table:table-cell office:value-type="float" office:value="36.3">
                <text:p>36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25">
                <text:p>156.25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36.5">
                <text:p>3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75">
                <text:p>156.75</text:p>
              </table:table-cell>
              <table:table-cell office:value-type="float" office:value="36.5">
                <text:p>3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25">
                <text:p>157.25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36.7">
                <text:p>3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75">
                <text:p>157.75</text:p>
              </table:table-cell>
              <table:table-cell office:value-type="float" office:value="36.7">
                <text:p>3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25">
                <text:p>158.25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36.9">
                <text:p>3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75">
                <text:p>158.75</text:p>
              </table:table-cell>
              <table:table-cell office:value-type="float" office:value="36.9">
                <text:p>3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25">
                <text:p>159.25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37.1">
                <text:p>3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75">
                <text:p>159.75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25">
                <text:p>160.25</text:p>
              </table:table-cell>
              <table:table-cell office:value-type="float" office:value="37.3">
                <text:p>3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37.3">
                <text:p>3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75">
                <text:p>160.75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25">
                <text:p>161.25</text:p>
              </table:table-cell>
              <table:table-cell office:value-type="float" office:value="37.5">
                <text:p>3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37.5">
                <text:p>3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75">
                <text:p>161.75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25">
                <text:p>162.25</text:p>
              </table:table-cell>
              <table:table-cell office:value-type="float" office:value="37.7">
                <text:p>3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37.7">
                <text:p>3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75">
                <text:p>162.75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25">
                <text:p>163.25</text:p>
              </table:table-cell>
              <table:table-cell office:value-type="float" office:value="37.9">
                <text:p>3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37.9">
                <text:p>3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75">
                <text:p>163.75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25">
                <text:p>164.25</text:p>
              </table:table-cell>
              <table:table-cell office:value-type="float" office:value="38.1">
                <text:p>3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38.1">
                <text:p>3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75">
                <text:p>164.7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8.9">
                <text:p>38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65.25">
                <text:p>165.25</text:p>
              </table:table-cell>
              <table:table-cell office:value-type="float" office:value="41.1">
                <text:p>41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47.2">
                <text:p>47.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165.75">
                <text:p>165.75</text:p>
              </table:table-cell>
              <table:table-cell office:value-type="float" office:value="48.3">
                <text:p>48.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9.5">
                <text:p>49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.25">
                <text:p>166.25</text:p>
              </table:table-cell>
              <table:table-cell office:value-type="float" office:value="50.7">
                <text:p>50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51.6">
                <text:p>51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66.75">
                <text:p>166.75</text:p>
              </table:table-cell>
              <table:table-cell office:value-type="float" office:value="52.3">
                <text:p>52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25">
                <text:p>167.25</text:p>
              </table:table-cell>
              <table:table-cell office:value-type="float" office:value="53.7">
                <text:p>53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54.4">
                <text:p>54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75">
                <text:p>167.75</text:p>
              </table:table-cell>
              <table:table-cell office:value-type="float" office:value="55.1">
                <text:p>55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5.8">
                <text:p>55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8.25">
                <text:p>168.25</text:p>
              </table:table-cell>
              <table:table-cell office:value-type="float" office:value="56">
                <text:p>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56.1">
                <text:p>5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8.75">
                <text:p>168.75</text:p>
              </table:table-cell>
              <table:table-cell office:value-type="float" office:value="56.1">
                <text:p>5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2">
                <text:p>5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25">
                <text:p>169.25</text:p>
              </table:table-cell>
              <table:table-cell office:value-type="float" office:value="56.3">
                <text:p>56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56.4">
                <text:p>56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56.5">
                <text:p>5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25">
                <text:p>170.25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56.7">
                <text:p>56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75">
                <text:p>170.75</text:p>
              </table:table-cell>
              <table:table-cell office:value-type="float" office:value="56.8">
                <text:p>56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.9">
                <text:p>56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25">
                <text:p>171.25</text:p>
              </table:table-cell>
              <table:table-cell office:value-type="float" office:value="57">
                <text:p>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57">
                <text:p>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75">
                <text:p>171.75</text:p>
              </table:table-cell>
              <table:table-cell office:value-type="float" office:value="57.1">
                <text:p>57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7.2">
                <text:p>57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25">
                <text:p>172.25</text:p>
              </table:table-cell>
              <table:table-cell office:value-type="float" office:value="57.3">
                <text:p>57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57.4">
                <text:p>5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75">
                <text:p>172.75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25">
                <text:p>173.25</text:p>
              </table:table-cell>
              <table:table-cell office:value-type="float" office:value="57.6">
                <text:p>5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57.7">
                <text:p>57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75">
                <text:p>173.75</text:p>
              </table:table-cell>
              <table:table-cell office:value-type="float" office:value="57.8">
                <text:p>57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9">
                <text:p>5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25">
                <text:p>174.25</text:p>
              </table:table-cell>
              <table:table-cell office:value-type="float" office:value="58">
                <text:p>5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58">
                <text:p>5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75">
                <text:p>174.75</text:p>
              </table:table-cell>
              <table:table-cell office:value-type="float" office:value="58.1">
                <text:p>58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">
                <text:p>5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25">
                <text:p>175.25</text:p>
              </table:table-cell>
              <table:table-cell office:value-type="float" office:value="58.3">
                <text:p>58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58.4">
                <text:p>5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75">
                <text:p>175.75</text:p>
              </table:table-cell>
              <table:table-cell office:value-type="float" office:value="58.4">
                <text:p>5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8.5">
                <text:p>5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25">
                <text:p>176.25</text:p>
              </table:table-cell>
              <table:table-cell office:value-type="float" office:value="58.6">
                <text:p>5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58.7">
                <text:p>58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75">
                <text:p>176.75</text:p>
              </table:table-cell>
              <table:table-cell office:value-type="float" office:value="58.8">
                <text:p>5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25">
                <text:p>177.25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59">
                <text:p>5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75">
                <text:p>177.75</text:p>
              </table:table-cell>
              <table:table-cell office:value-type="float" office:value="59.1">
                <text:p>5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9.2">
                <text:p>5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25">
                <text:p>178.25</text:p>
              </table:table-cell>
              <table:table-cell office:value-type="float" office:value="59.3">
                <text:p>5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59.4">
                <text:p>5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75">
                <text:p>178.75</text:p>
              </table:table-cell>
              <table:table-cell office:value-type="float" office:value="59.4">
                <text:p>5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.5">
                <text:p>5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25">
                <text:p>179.25</text:p>
              </table:table-cell>
              <table:table-cell office:value-type="float" office:value="59.6">
                <text:p>5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59.7">
                <text:p>59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75">
                <text:p>179.75</text:p>
              </table:table-cell>
              <table:table-cell office:value-type="float" office:value="59.8">
                <text:p>5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25">
                <text:p>180.25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75">
                <text:p>180.75</text:p>
              </table:table-cell>
              <table:table-cell office:value-type="float" office:value="60.1">
                <text:p>6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0.2">
                <text:p>6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25">
                <text:p>181.25</text:p>
              </table:table-cell>
              <table:table-cell office:value-type="float" office:value="60.3">
                <text:p>6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5">
                <text:p>181.5</text:p>
              </table:table-cell>
              <table:table-cell office:value-type="float" office:value="60.3">
                <text:p>6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75">
                <text:p>181.75</text:p>
              </table:table-cell>
              <table:table-cell office:value-type="float" office:value="60.4">
                <text:p>6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0.5">
                <text:p>6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25">
                <text:p>182.25</text:p>
              </table:table-cell>
              <table:table-cell office:value-type="float" office:value="60.6">
                <text:p>6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5">
                <text:p>182.5</text:p>
              </table:table-cell>
              <table:table-cell office:value-type="float" office:value="60.7">
                <text:p>6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75">
                <text:p>182.75</text:p>
              </table:table-cell>
              <table:table-cell office:value-type="float" office:value="60.9">
                <text:p>6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25">
                <text:p>183.25</text:p>
              </table:table-cell>
              <table:table-cell office:value-type="float" office:value="61.2">
                <text:p>6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5">
                <text:p>183.5</text:p>
              </table:table-cell>
              <table:table-cell office:value-type="float" office:value="61.4">
                <text:p>6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75">
                <text:p>183.75</text:p>
              </table:table-cell>
              <table:table-cell office:value-type="float" office:value="61.6">
                <text:p>61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1.7">
                <text:p>61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25">
                <text:p>184.25</text:p>
              </table:table-cell>
              <table:table-cell office:value-type="float" office:value="61.9">
                <text:p>61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5">
                <text:p>184.5</text:p>
              </table:table-cell>
              <table:table-cell office:value-type="float" office:value="62.1">
                <text:p>6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75">
                <text:p>184.75</text:p>
              </table:table-cell>
              <table:table-cell office:value-type="float" office:value="62.3">
                <text:p>62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2.4">
                <text:p>6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25">
                <text:p>185.25</text:p>
              </table:table-cell>
              <table:table-cell office:value-type="float" office:value="62.6">
                <text:p>62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5">
                <text:p>185.5</text:p>
              </table:table-cell>
              <table:table-cell office:value-type="float" office:value="62.8">
                <text:p>62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75">
                <text:p>185.75</text:p>
              </table:table-cell>
              <table:table-cell office:value-type="float" office:value="63">
                <text:p>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3.2">
                <text:p>63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25">
                <text:p>186.25</text:p>
              </table:table-cell>
              <table:table-cell office:value-type="float" office:value="63.3">
                <text:p>63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5">
                <text:p>186.5</text:p>
              </table:table-cell>
              <table:table-cell office:value-type="float" office:value="63.5">
                <text:p>63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75">
                <text:p>186.75</text:p>
              </table:table-cell>
              <table:table-cell office:value-type="float" office:value="63.7">
                <text:p>63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3.9">
                <text:p>6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25">
                <text:p>187.25</text:p>
              </table:table-cell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5">
                <text:p>187.5</text:p>
              </table:table-cell>
              <table:table-cell office:value-type="float" office:value="64.2">
                <text:p>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75">
                <text:p>187.75</text:p>
              </table:table-cell>
              <table:table-cell office:value-type="float" office:value="64.4">
                <text:p>6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4.6">
                <text:p>6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25">
                <text:p>188.25</text:p>
              </table:table-cell>
              <table:table-cell office:value-type="float" office:value="64.7">
                <text:p>64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5">
                <text:p>188.5</text:p>
              </table:table-cell>
              <table:table-cell office:value-type="float" office:value="64.9">
                <text:p>64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75">
                <text:p>188.75</text:p>
              </table:table-cell>
              <table:table-cell office:value-type="float" office:value="65.1">
                <text:p>65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5.3">
                <text:p>65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.25">
                <text:p>189.25</text:p>
              </table:table-cell>
              <table:table-cell office:value-type="float" office:value="65.4">
                <text:p>6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.5">
                <text:p>189.5</text:p>
              </table:table-cell>
              <table:table-cell office:value-type="float" office:value="71.1">
                <text:p>71.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89.75">
                <text:p>189.75</text:p>
              </table:table-cell>
              <table:table-cell office:value-type="float" office:value="72.6">
                <text:p>72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.1">
                <text:p>74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.25">
                <text:p>190.25</text:p>
              </table:table-cell>
              <table:table-cell office:value-type="float" office:value="75.7">
                <text:p>7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.5">
                <text:p>190.5</text:p>
              </table:table-cell>
              <table:table-cell office:value-type="float" office:value="107.8">
                <text:p>107.8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190.75">
                <text:p>190.75</text:p>
              </table:table-cell>
              <table:table-cell office:value-type="float" office:value="111.8">
                <text:p>111.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6.8">
                <text:p>116.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91.25">
                <text:p>191.25</text:p>
              </table:table-cell>
              <table:table-cell office:value-type="float" office:value="118.8">
                <text:p>118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1.5">
                <text:p>191.5</text:p>
              </table:table-cell>
              <table:table-cell office:value-type="float" office:value="120.7">
                <text:p>120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1.75">
                <text:p>191.75</text:p>
              </table:table-cell>
              <table:table-cell office:value-type="float" office:value="122.7">
                <text:p>12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4.6">
                <text:p>124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126.6">
                <text:p>126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92.5">
                <text:p>192.5</text:p>
              </table:table-cell>
              <table:table-cell office:value-type="float" office:value="128.5">
                <text:p>128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2.75">
                <text:p>192.75</text:p>
              </table:table-cell>
              <table:table-cell office:value-type="float" office:value="128.6">
                <text:p>12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28.6">
                <text:p>12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25">
                <text:p>193.25</text:p>
              </table:table-cell>
              <table:table-cell office:value-type="float" office:value="128.7">
                <text:p>128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5">
                <text:p>193.5</text:p>
              </table:table-cell>
              <table:table-cell office:value-type="float" office:value="128.8">
                <text:p>12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75">
                <text:p>193.75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25">
                <text:p>194.25</text:p>
              </table:table-cell>
              <table:table-cell office:value-type="float" office:value="129">
                <text:p>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5">
                <text:p>194.5</text:p>
              </table:table-cell>
              <table:table-cell office:value-type="float" office:value="129.1">
                <text:p>12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75">
                <text:p>194.75</text:p>
              </table:table-cell>
              <table:table-cell office:value-type="float" office:value="129.1">
                <text:p>12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9.2">
                <text:p>12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25">
                <text:p>195.25</text:p>
              </table:table-cell>
              <table:table-cell office:value-type="float" office:value="129.3">
                <text:p>12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5">
                <text:p>195.5</text:p>
              </table:table-cell>
              <table:table-cell office:value-type="float" office:value="129.3">
                <text:p>12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75">
                <text:p>195.75</text:p>
              </table:table-cell>
              <table:table-cell office:value-type="float" office:value="129.4">
                <text:p>12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9.5">
                <text:p>12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25">
                <text:p>196.25</text:p>
              </table:table-cell>
              <table:table-cell office:value-type="float" office:value="129.6">
                <text:p>12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5">
                <text:p>196.5</text:p>
              </table:table-cell>
              <table:table-cell office:value-type="float" office:value="129.6">
                <text:p>12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75">
                <text:p>196.75</text:p>
              </table:table-cell>
              <table:table-cell office:value-type="float" office:value="129.7">
                <text:p>129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25">
                <text:p>197.25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5">
                <text:p>197.5</text:p>
              </table:table-cell>
              <table:table-cell office:value-type="float" office:value="129.9">
                <text:p>12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75">
                <text:p>197.75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25">
                <text:p>198.25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5">
                <text:p>198.5</text:p>
              </table:table-cell>
              <table:table-cell office:value-type="float" office:value="130.2">
                <text:p>13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75">
                <text:p>198.75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25">
                <text:p>199.25</text:p>
              </table:table-cell>
              <table:table-cell office:value-type="float" office:value="130.4">
                <text:p>13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5">
                <text:p>199.5</text:p>
              </table:table-cell>
              <table:table-cell office:value-type="float" office:value="130.5">
                <text:p>13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75">
                <text:p>199.75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25">
                <text:p>200.25</text:p>
              </table:table-cell>
              <table:table-cell office:value-type="float" office:value="130.7">
                <text:p>13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5">
                <text:p>200.5</text:p>
              </table:table-cell>
              <table:table-cell office:value-type="float" office:value="130.8">
                <text:p>1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75">
                <text:p>200.75</text:p>
              </table:table-cell>
              <table:table-cell office:value-type="float" office:value="130.8">
                <text:p>1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30.9">
                <text:p>13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25">
                <text:p>201.25</text:p>
              </table:table-cell>
              <table:table-cell office:value-type="float" office:value="131">
                <text:p>1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5">
                <text:p>201.5</text:p>
              </table:table-cell>
              <table:table-cell office:value-type="float" office:value="131">
                <text:p>1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75">
                <text:p>201.75</text:p>
              </table:table-cell>
              <table:table-cell office:value-type="float" office:value="131.1">
                <text:p>131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1.2">
                <text:p>13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25">
                <text:p>202.25</text:p>
              </table:table-cell>
              <table:table-cell office:value-type="float" office:value="131.3">
                <text:p>13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5">
                <text:p>202.5</text:p>
              </table:table-cell>
              <table:table-cell office:value-type="float" office:value="131.3">
                <text:p>13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75">
                <text:p>202.75</text:p>
              </table:table-cell>
              <table:table-cell office:value-type="float" office:value="131.4">
                <text:p>13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25">
                <text:p>203.25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131.6">
                <text:p>131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75">
                <text:p>203.75</text:p>
              </table:table-cell>
              <table:table-cell office:value-type="float" office:value="131.7">
                <text:p>131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25">
                <text:p>204.25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131.9">
                <text:p>13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75">
                <text:p>204.7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25">
                <text:p>205.25</text:p>
              </table:table-cell>
              <table:table-cell office:value-type="float" office:value="132.1">
                <text:p>132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5">
                <text:p>205.5</text:p>
              </table:table-cell>
              <table:table-cell office:value-type="float" office:value="132.2">
                <text:p>132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75">
                <text:p>205.75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25">
                <text:p>206.25</text:p>
              </table:table-cell>
              <table:table-cell office:value-type="float" office:value="132.4">
                <text:p>132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5">
                <text:p>206.5</text:p>
              </table:table-cell>
              <table:table-cell office:value-type="float" office:value="132.5">
                <text:p>13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75">
                <text:p>206.75</text:p>
              </table:table-cell>
              <table:table-cell office:value-type="float" office:value="132.5">
                <text:p>13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32.6">
                <text:p>13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25">
                <text:p>207.25</text:p>
              </table:table-cell>
              <table:table-cell office:value-type="float" office:value="132.7">
                <text:p>1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5">
                <text:p>207.5</text:p>
              </table:table-cell>
              <table:table-cell office:value-type="float" office:value="132.7">
                <text:p>1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75">
                <text:p>207.75</text:p>
              </table:table-cell>
              <table:table-cell office:value-type="float" office:value="132.8">
                <text:p>13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32.9">
                <text:p>132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25">
                <text:p>208.25</text:p>
              </table:table-cell>
              <table:table-cell office:value-type="float" office:value="133">
                <text:p>1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133">
                <text:p>1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75">
                <text:p>208.75</text:p>
              </table:table-cell>
              <table:table-cell office:value-type="float" office:value="133.1">
                <text:p>133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25">
                <text:p>209.25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5">
                <text:p>209.5</text:p>
              </table:table-cell>
              <table:table-cell office:value-type="float" office:value="133.3">
                <text:p>133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75">
                <text:p>209.75</text:p>
              </table:table-cell>
              <table:table-cell office:value-type="float" office:value="133.4">
                <text:p>133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25">
                <text:p>210.25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5">
                <text:p>210.5</text:p>
              </table:table-cell>
              <table:table-cell office:value-type="float" office:value="133.6">
                <text:p>133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75">
                <text:p>210.75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25">
                <text:p>211.25</text:p>
              </table:table-cell>
              <table:table-cell office:value-type="float" office:value="133.8">
                <text:p>13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5">
                <text:p>211.5</text:p>
              </table:table-cell>
              <table:table-cell office:value-type="float" office:value="133.9">
                <text:p>13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75">
                <text:p>211.75</text:p>
              </table:table-cell>
              <table:table-cell office:value-type="float" office:value="133.9">
                <text:p>13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4">
                <text:p>1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25">
                <text:p>212.25</text:p>
              </table:table-cell>
              <table:table-cell office:value-type="float" office:value="134.1">
                <text:p>134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5">
                <text:p>212.5</text:p>
              </table:table-cell>
              <table:table-cell office:value-type="float" office:value="134.2">
                <text:p>13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75">
                <text:p>212.75</text:p>
              </table:table-cell>
              <table:table-cell office:value-type="float" office:value="134.2">
                <text:p>13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34.3">
                <text:p>134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25">
                <text:p>213.25</text:p>
              </table:table-cell>
              <table:table-cell office:value-type="float" office:value="134.4">
                <text:p>134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5">
                <text:p>213.5</text:p>
              </table:table-cell>
              <table:table-cell office:value-type="float" office:value="134.4">
                <text:p>134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75">
                <text:p>213.75</text:p>
              </table:table-cell>
              <table:table-cell office:value-type="float" office:value="134.5">
                <text:p>134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36.7">
                <text:p>136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14.25">
                <text:p>214.25</text:p>
              </table:table-cell>
              <table:table-cell office:value-type="float" office:value="139">
                <text:p>13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14.5">
                <text:p>214.5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142.3">
                <text:p>142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3.7">
                <text:p>143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25">
                <text:p>215.25</text:p>
              </table:table-cell>
              <table:table-cell office:value-type="float" office:value="145.1">
                <text:p>145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5">
                <text:p>215.5</text:p>
              </table:table-cell>
              <table:table-cell office:value-type="float" office:value="146.5">
                <text:p>14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75">
                <text:p>215.75</text:p>
              </table:table-cell>
              <table:table-cell office:value-type="float" office:value="147.8">
                <text:p>147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9.1">
                <text:p>149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25">
                <text:p>216.25</text:p>
              </table:table-cell>
              <table:table-cell office:value-type="float" office:value="150.4">
                <text:p>150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5">
                <text:p>216.5</text:p>
              </table:table-cell>
              <table:table-cell office:value-type="float" office:value="151.7">
                <text:p>151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75">
                <text:p>216.75</text:p>
              </table:table-cell>
              <table:table-cell office:value-type="float" office:value="153">
                <text:p>15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3.8">
                <text:p>153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25">
                <text:p>217.25</text:p>
              </table:table-cell>
              <table:table-cell office:value-type="float" office:value="154.7">
                <text:p>154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5">
                <text:p>217.5</text:p>
              </table:table-cell>
              <table:table-cell office:value-type="float" office:value="155.6">
                <text:p>155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75">
                <text:p>217.75</text:p>
              </table:table-cell>
              <table:table-cell office:value-type="float" office:value="156.5">
                <text:p>15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7.3">
                <text:p>15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25">
                <text:p>218.25</text:p>
              </table:table-cell>
              <table:table-cell office:value-type="float" office:value="158.2">
                <text:p>158.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5">
                <text:p>218.5</text:p>
              </table:table-cell>
              <table:table-cell office:value-type="float" office:value="159.1">
                <text:p>159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75">
                <text:p>218.75</text:p>
              </table:table-cell>
              <table:table-cell office:value-type="float" office:value="159.8">
                <text:p>159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60.5">
                <text:p>16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25">
                <text:p>219.25</text:p>
              </table:table-cell>
              <table:table-cell office:value-type="float" office:value="161.1">
                <text:p>161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5">
                <text:p>219.5</text:p>
              </table:table-cell>
              <table:table-cell office:value-type="float" office:value="161.8">
                <text:p>161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75">
                <text:p>219.75</text:p>
              </table:table-cell>
              <table:table-cell office:value-type="float" office:value="162.5">
                <text:p>162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3.1">
                <text:p>16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25">
                <text:p>220.25</text:p>
              </table:table-cell>
              <table:table-cell office:value-type="float" office:value="163.8">
                <text:p>163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5">
                <text:p>220.5</text:p>
              </table:table-cell>
              <table:table-cell office:value-type="float" office:value="164.5">
                <text:p>164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75">
                <text:p>220.75</text:p>
              </table:table-cell>
              <table:table-cell office:value-type="float" office:value="165.2">
                <text:p>165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5.7">
                <text:p>165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21.25">
                <text:p>221.25</text:p>
              </table:table-cell>
              <table:table-cell office:value-type="float" office:value="166.2">
                <text:p>16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1.5">
                <text:p>221.5</text:p>
              </table:table-cell>
              <table:table-cell office:value-type="float" office:value="166.6">
                <text:p>166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1.75">
                <text:p>221.75</text:p>
              </table:table-cell>
              <table:table-cell office:value-type="float" office:value="167.1">
                <text:p>167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7.5">
                <text:p>167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25">
                <text:p>222.25</text:p>
              </table:table-cell>
              <table:table-cell office:value-type="float" office:value="168">
                <text:p>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5">
                <text:p>222.5</text:p>
              </table:table-cell>
              <table:table-cell office:value-type="float" office:value="168.5">
                <text:p>168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75">
                <text:p>222.75</text:p>
              </table:table-cell>
              <table:table-cell office:value-type="float" office:value="168.9">
                <text:p>16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9.4">
                <text:p>169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25">
                <text:p>223.25</text:p>
              </table:table-cell>
              <table:table-cell office:value-type="float" office:value="169.8">
                <text:p>169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5">
                <text:p>223.5</text:p>
              </table:table-cell>
              <table:table-cell office:value-type="float" office:value="170.3">
                <text:p>17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75">
                <text:p>223.75</text:p>
              </table:table-cell>
              <table:table-cell office:value-type="float" office:value="170.7">
                <text:p>170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1.2">
                <text:p>17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.25">
                <text:p>224.25</text:p>
              </table:table-cell>
              <table:table-cell office:value-type="float" office:value="171.6">
                <text:p>17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.5">
                <text:p>224.5</text:p>
              </table:table-cell>
              <table:table-cell office:value-type="float" office:value="172">
                <text:p>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24.75">
                <text:p>224.75</text:p>
              </table:table-cell>
              <table:table-cell office:value-type="float" office:value="172.2">
                <text:p>172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2.4">
                <text:p>17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25">
                <text:p>225.25</text:p>
              </table:table-cell>
              <table:table-cell office:value-type="float" office:value="172.5">
                <text:p>172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5">
                <text:p>225.5</text:p>
              </table:table-cell>
              <table:table-cell office:value-type="float" office:value="172.7">
                <text:p>172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75">
                <text:p>225.75</text:p>
              </table:table-cell>
              <table:table-cell office:value-type="float" office:value="172.9">
                <text:p>172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73.1">
                <text:p>17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25">
                <text:p>226.25</text:p>
              </table:table-cell>
              <table:table-cell office:value-type="float" office:value="173.3">
                <text:p>173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5">
                <text:p>226.5</text:p>
              </table:table-cell>
              <table:table-cell office:value-type="float" office:value="173.5">
                <text:p>173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75">
                <text:p>226.75</text:p>
              </table:table-cell>
              <table:table-cell office:value-type="float" office:value="173.7">
                <text:p>173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73.9">
                <text:p>17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25">
                <text:p>227.25</text:p>
              </table:table-cell>
              <table:table-cell office:value-type="float" office:value="174">
                <text:p>1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5">
                <text:p>227.5</text:p>
              </table:table-cell>
              <table:table-cell office:value-type="float" office:value="174.2">
                <text:p>17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75">
                <text:p>227.75</text:p>
              </table:table-cell>
              <table:table-cell office:value-type="float" office:value="174.4">
                <text:p>17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4.6">
                <text:p>17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25">
                <text:p>228.25</text:p>
              </table:table-cell>
              <table:table-cell office:value-type="float" office:value="174.8">
                <text:p>174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5">
                <text:p>228.5</text:p>
              </table:table-cell>
              <table:table-cell office:value-type="float" office:value="175">
                <text:p>1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75">
                <text:p>228.75</text:p>
              </table:table-cell>
              <table:table-cell office:value-type="float" office:value="175.2">
                <text:p>175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75.4">
                <text:p>17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25">
                <text:p>229.25</text:p>
              </table:table-cell>
              <table:table-cell office:value-type="float" office:value="175.5">
                <text:p>175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5">
                <text:p>229.5</text:p>
              </table:table-cell>
              <table:table-cell office:value-type="float" office:value="175.7">
                <text:p>17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75">
                <text:p>229.75</text:p>
              </table:table-cell>
              <table:table-cell office:value-type="float" office:value="175.9">
                <text:p>175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6.1">
                <text:p>17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25">
                <text:p>230.25</text:p>
              </table:table-cell>
              <table:table-cell office:value-type="float" office:value="176.3">
                <text:p>17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5">
                <text:p>230.5</text:p>
              </table:table-cell>
              <table:table-cell office:value-type="float" office:value="176.5">
                <text:p>17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75">
                <text:p>230.75</text:p>
              </table:table-cell>
              <table:table-cell office:value-type="float" office:value="176.7">
                <text:p>17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6.9">
                <text:p>17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25">
                <text:p>231.25</text:p>
              </table:table-cell>
              <table:table-cell office:value-type="float" office:value="177">
                <text:p>1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5">
                <text:p>231.5</text:p>
              </table:table-cell>
              <table:table-cell office:value-type="float" office:value="177.2">
                <text:p>17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75">
                <text:p>231.75</text:p>
              </table:table-cell>
              <table:table-cell office:value-type="float" office:value="177.4">
                <text:p>17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7.6">
                <text:p>177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25">
                <text:p>232.25</text:p>
              </table:table-cell>
              <table:table-cell office:value-type="float" office:value="177.8">
                <text:p>17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5">
                <text:p>232.5</text:p>
              </table:table-cell>
              <table:table-cell office:value-type="float" office:value="178">
                <text:p>1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75">
                <text:p>232.75</text:p>
              </table:table-cell>
              <table:table-cell office:value-type="float" office:value="178.2">
                <text:p>178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8.4">
                <text:p>17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3.25">
                <text:p>233.25</text:p>
              </table:table-cell>
              <table:table-cell office:value-type="float" office:value="178.7">
                <text:p>178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3.5">
                <text:p>233.5</text:p>
              </table:table-cell>
              <table:table-cell office:value-type="float" office:value="179.1">
                <text:p>179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3.75">
                <text:p>233.75</text:p>
              </table:table-cell>
              <table:table-cell office:value-type="float" office:value="179.5">
                <text:p>179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9.8">
                <text:p>17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25">
                <text:p>234.25</text:p>
              </table:table-cell>
              <table:table-cell office:value-type="float" office:value="180.2">
                <text:p>18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5">
                <text:p>234.5</text:p>
              </table:table-cell>
              <table:table-cell office:value-type="float" office:value="180.6">
                <text:p>18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75">
                <text:p>234.75</text:p>
              </table:table-cell>
              <table:table-cell office:value-type="float" office:value="180.9">
                <text:p>18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.3">
                <text:p>18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25">
                <text:p>235.25</text:p>
              </table:table-cell>
              <table:table-cell office:value-type="float" office:value="181.7">
                <text:p>18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5">
                <text:p>235.5</text:p>
              </table:table-cell>
              <table:table-cell office:value-type="float" office:value="182">
                <text:p>18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75">
                <text:p>235.75</text:p>
              </table:table-cell>
              <table:table-cell office:value-type="float" office:value="182.4">
                <text:p>18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2.8">
                <text:p>182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25">
                <text:p>236.25</text:p>
              </table:table-cell>
              <table:table-cell office:value-type="float" office:value="183.2">
                <text:p>183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5">
                <text:p>236.5</text:p>
              </table:table-cell>
              <table:table-cell office:value-type="float" office:value="183.5">
                <text:p>183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75">
                <text:p>236.75</text:p>
              </table:table-cell>
              <table:table-cell office:value-type="float" office:value="183.9">
                <text:p>183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4.3">
                <text:p>18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184.6">
                <text:p>184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.5">
                <text:p>237.5</text:p>
              </table:table-cell>
              <table:table-cell office:value-type="float" office:value="192.4">
                <text:p>192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7.75">
                <text:p>237.75</text:p>
              </table:table-cell>
              <table:table-cell office:value-type="float" office:value="195.4">
                <text:p>195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98.3">
                <text:p>198.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38.25">
                <text:p>238.25</text:p>
              </table:table-cell>
              <table:table-cell office:value-type="float" office:value="200.6">
                <text:p>20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38.5">
                <text:p>238.5</text:p>
              </table:table-cell>
              <table:table-cell office:value-type="float" office:value="203">
                <text:p>20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38.75">
                <text:p>238.75</text:p>
              </table:table-cell>
              <table:table-cell office:value-type="float" office:value="205.4">
                <text:p>205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07.8">
                <text:p>207.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39.25">
                <text:p>239.25</text:p>
              </table:table-cell>
              <table:table-cell office:value-type="float" office:value="210.2">
                <text:p>210.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39.5">
                <text:p>239.5</text:p>
              </table:table-cell>
              <table:table-cell office:value-type="float" office:value="212.6">
                <text:p>212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39.75">
                <text:p>239.75</text:p>
              </table:table-cell>
              <table:table-cell office:value-type="float" office:value="215">
                <text:p>2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7.4">
                <text:p>217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.25">
                <text:p>240.25</text:p>
              </table:table-cell>
              <table:table-cell office:value-type="float" office:value="218.9">
                <text:p>21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40.5">
                <text:p>240.5</text:p>
              </table:table-cell>
              <table:table-cell office:value-type="float" office:value="220.2">
                <text:p>220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0.75">
                <text:p>240.75</text:p>
              </table:table-cell>
              <table:table-cell office:value-type="float" office:value="221.5">
                <text:p>221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2.8">
                <text:p>222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.25">
                <text:p>241.25</text:p>
              </table:table-cell>
              <table:table-cell office:value-type="float" office:value="224.2">
                <text:p>224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.5">
                <text:p>241.5</text:p>
              </table:table-cell>
              <table:table-cell office:value-type="float" office:value="225.1">
                <text:p>225.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41.75">
                <text:p>241.75</text:p>
              </table:table-cell>
              <table:table-cell office:value-type="float" office:value="226">
                <text:p>2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26.8">
                <text:p>226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25">
                <text:p>242.25</text:p>
              </table:table-cell>
              <table:table-cell office:value-type="float" office:value="227.7">
                <text:p>227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5">
                <text:p>242.5</text:p>
              </table:table-cell>
              <table:table-cell office:value-type="float" office:value="228.5">
                <text:p>228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75">
                <text:p>242.75</text:p>
              </table:table-cell>
              <table:table-cell office:value-type="float" office:value="229.3">
                <text:p>229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30.2">
                <text:p>230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.25">
                <text:p>243.25</text:p>
              </table:table-cell>
              <table:table-cell office:value-type="float" office:value="231">
                <text:p>2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.5">
                <text:p>243.5</text:p>
              </table:table-cell>
              <table:table-cell office:value-type="float" office:value="231.7">
                <text:p>231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43.75">
                <text:p>243.75</text:p>
              </table:table-cell>
              <table:table-cell office:value-type="float" office:value="232.2">
                <text:p>23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2.8">
                <text:p>232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25">
                <text:p>244.25</text:p>
              </table:table-cell>
              <table:table-cell office:value-type="float" office:value="233.3">
                <text:p>233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5">
                <text:p>244.5</text:p>
              </table:table-cell>
              <table:table-cell office:value-type="float" office:value="233.9">
                <text:p>233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75">
                <text:p>244.75</text:p>
              </table:table-cell>
              <table:table-cell office:value-type="float" office:value="234.5">
                <text:p>23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25">
                <text:p>245.25</text:p>
              </table:table-cell>
              <table:table-cell office:value-type="float" office:value="235.6">
                <text:p>235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5">
                <text:p>245.5</text:p>
              </table:table-cell>
              <table:table-cell office:value-type="float" office:value="236.2">
                <text:p>236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75">
                <text:p>245.75</text:p>
              </table:table-cell>
              <table:table-cell office:value-type="float" office:value="236.7">
                <text:p>23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37.3">
                <text:p>23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.25">
                <text:p>246.25</text:p>
              </table:table-cell>
              <table:table-cell office:value-type="float" office:value="237.8">
                <text:p>23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.5">
                <text:p>246.5</text:p>
              </table:table-cell>
              <table:table-cell office:value-type="float" office:value="238.2">
                <text:p>238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46.75">
                <text:p>246.75</text:p>
              </table:table-cell>
              <table:table-cell office:value-type="float" office:value="238.4">
                <text:p>23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38.7">
                <text:p>238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25">
                <text:p>247.25</text:p>
              </table:table-cell>
              <table:table-cell office:value-type="float" office:value="238.9">
                <text:p>23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5">
                <text:p>247.5</text:p>
              </table:table-cell>
              <table:table-cell office:value-type="float" office:value="239.2">
                <text:p>23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75">
                <text:p>247.75</text:p>
              </table:table-cell>
              <table:table-cell office:value-type="float" office:value="239.4">
                <text:p>23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39.6">
                <text:p>23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25">
                <text:p>248.25</text:p>
              </table:table-cell>
              <table:table-cell office:value-type="float" office:value="239.9">
                <text:p>23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240.1">
                <text:p>24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75">
                <text:p>248.75</text:p>
              </table:table-cell>
              <table:table-cell office:value-type="float" office:value="240.4">
                <text:p>24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0.6">
                <text:p>2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25">
                <text:p>249.25</text:p>
              </table:table-cell>
              <table:table-cell office:value-type="float" office:value="240.8">
                <text:p>24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5">
                <text:p>249.5</text:p>
              </table:table-cell>
              <table:table-cell office:value-type="float" office:value="241.1">
                <text:p>24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75">
                <text:p>249.75</text:p>
              </table:table-cell>
              <table:table-cell office:value-type="float" office:value="241.3">
                <text:p>24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1.6">
                <text:p>24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25">
                <text:p>250.25</text:p>
              </table:table-cell>
              <table:table-cell office:value-type="float" office:value="241.8">
                <text:p>24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5">
                <text:p>250.5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75">
                <text:p>250.75</text:p>
              </table:table-cell>
              <table:table-cell office:value-type="float" office:value="242.3">
                <text:p>24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42.5">
                <text:p>24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25">
                <text:p>251.25</text:p>
              </table:table-cell>
              <table:table-cell office:value-type="float" office:value="242.8">
                <text:p>24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5">
                <text:p>251.5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75">
                <text:p>251.75</text:p>
              </table:table-cell>
              <table:table-cell office:value-type="float" office:value="243.2">
                <text:p>24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3.5">
                <text:p>24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25">
                <text:p>252.25</text:p>
              </table:table-cell>
              <table:table-cell office:value-type="float" office:value="243.7">
                <text:p>24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5">
                <text:p>252.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75">
                <text:p>252.75</text:p>
              </table:table-cell>
              <table:table-cell office:value-type="float" office:value="244.2">
                <text:p>2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4.4">
                <text:p>2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.25">
                <text:p>253.25</text:p>
              </table:table-cell>
              <table:table-cell office:value-type="float" office:value="244.7">
                <text:p>24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.5">
                <text:p>253.5</text:p>
              </table:table-cell>
              <table:table-cell office:value-type="float" office:value="244.9">
                <text:p>24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3.75">
                <text:p>253.75</text:p>
              </table:table-cell>
              <table:table-cell office:value-type="float" office:value="245.1">
                <text:p>245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45.4">
                <text:p>24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25">
                <text:p>254.25</text:p>
              </table:table-cell>
              <table:table-cell office:value-type="float" office:value="245.6">
                <text:p>245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5">
                <text:p>254.5</text:p>
              </table:table-cell>
              <table:table-cell office:value-type="float" office:value="245.8">
                <text:p>245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75">
                <text:p>254.75</text:p>
              </table:table-cell>
              <table:table-cell office:value-type="float" office:value="246">
                <text:p>2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46.2">
                <text:p>2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25">
                <text:p>255.25</text:p>
              </table:table-cell>
              <table:table-cell office:value-type="float" office:value="246.4">
                <text:p>24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5">
                <text:p>255.5</text:p>
              </table:table-cell>
              <table:table-cell office:value-type="float" office:value="246.6">
                <text:p>246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75">
                <text:p>255.75</text:p>
              </table:table-cell>
              <table:table-cell office:value-type="float" office:value="246.9">
                <text:p>246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7.1">
                <text:p>2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25">
                <text:p>256.25</text:p>
              </table:table-cell>
              <table:table-cell office:value-type="float" office:value="247.3">
                <text:p>24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5">
                <text:p>256.5</text:p>
              </table:table-cell>
              <table:table-cell office:value-type="float" office:value="247.5">
                <text:p>24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75">
                <text:p>256.75</text:p>
              </table:table-cell>
              <table:table-cell office:value-type="float" office:value="247.7">
                <text:p>247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47.9">
                <text:p>247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25">
                <text:p>257.25</text:p>
              </table:table-cell>
              <table:table-cell office:value-type="float" office:value="248.1">
                <text:p>248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5">
                <text:p>257.5</text:p>
              </table:table-cell>
              <table:table-cell office:value-type="float" office:value="248.4">
                <text:p>24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75">
                <text:p>257.75</text:p>
              </table:table-cell>
              <table:table-cell office:value-type="float" office:value="248.6">
                <text:p>24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48.8">
                <text:p>24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25">
                <text:p>258.25</text:p>
              </table:table-cell>
              <table:table-cell office:value-type="float" office:value="249">
                <text:p>2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5">
                <text:p>258.5</text:p>
              </table:table-cell>
              <table:table-cell office:value-type="float" office:value="249.2">
                <text:p>2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75">
                <text:p>258.75</text:p>
              </table:table-cell>
              <table:table-cell office:value-type="float" office:value="249.4">
                <text:p>24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49.6">
                <text:p>2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25">
                <text:p>259.25</text:p>
              </table:table-cell>
              <table:table-cell office:value-type="float" office:value="249.9">
                <text:p>24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5">
                <text:p>259.5</text:p>
              </table:table-cell>
              <table:table-cell office:value-type="float" office:value="250.1">
                <text:p>25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250.3">
                <text:p>25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50.5">
                <text:p>25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25">
                <text:p>260.25</text:p>
              </table:table-cell>
              <table:table-cell office:value-type="float" office:value="250.7">
                <text:p>25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5">
                <text:p>260.5</text:p>
              </table:table-cell>
              <table:table-cell office:value-type="float" office:value="250.9">
                <text:p>25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75">
                <text:p>260.75</text:p>
              </table:table-cell>
              <table:table-cell office:value-type="float" office:value="251.1">
                <text:p>25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51.4">
                <text:p>251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.25">
                <text:p>261.25</text:p>
              </table:table-cell>
              <table:table-cell office:value-type="float" office:value="251.6">
                <text:p>25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.5">
                <text:p>261.5</text:p>
              </table:table-cell>
              <table:table-cell office:value-type="float" office:value="252.5">
                <text:p>252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61.75">
                <text:p>261.75</text:p>
              </table:table-cell>
              <table:table-cell office:value-type="float" office:value="254.7">
                <text:p>254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56.9">
                <text:p>256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2.25">
                <text:p>262.25</text:p>
              </table:table-cell>
              <table:table-cell office:value-type="float" office:value="259.2">
                <text:p>25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2.5">
                <text:p>262.5</text:p>
              </table:table-cell>
              <table:table-cell office:value-type="float" office:value="261.5">
                <text:p>261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2.75">
                <text:p>262.75</text:p>
              </table:table-cell>
              <table:table-cell office:value-type="float" office:value="263.8">
                <text:p>263.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5.6">
                <text:p>265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63.25">
                <text:p>263.25</text:p>
              </table:table-cell>
              <table:table-cell office:value-type="float" office:value="266.2">
                <text:p>266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3.5">
                <text:p>263.5</text:p>
              </table:table-cell>
              <table:table-cell office:value-type="float" office:value="266.8">
                <text:p>266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3.75">
                <text:p>263.75</text:p>
              </table:table-cell>
              <table:table-cell office:value-type="float" office:value="267.3">
                <text:p>267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7.9">
                <text:p>26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25">
                <text:p>264.25</text:p>
              </table:table-cell>
              <table:table-cell office:value-type="float" office:value="268.5">
                <text:p>26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5">
                <text:p>264.5</text:p>
              </table:table-cell>
              <table:table-cell office:value-type="float" office:value="269">
                <text:p>26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75">
                <text:p>264.75</text:p>
              </table:table-cell>
              <table:table-cell office:value-type="float" office:value="269.6">
                <text:p>269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70.2">
                <text:p>27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25">
                <text:p>265.25</text:p>
              </table:table-cell>
              <table:table-cell office:value-type="float" office:value="270.7">
                <text:p>270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5">
                <text:p>265.5</text:p>
              </table:table-cell>
              <table:table-cell office:value-type="float" office:value="271.3">
                <text:p>271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75">
                <text:p>265.75</text:p>
              </table:table-cell>
              <table:table-cell office:value-type="float" office:value="271.8">
                <text:p>271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72.4">
                <text:p>272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6.25">
                <text:p>266.25</text:p>
              </table:table-cell>
              <table:table-cell office:value-type="float" office:value="272.5">
                <text:p>27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6.5">
                <text:p>266.5</text:p>
              </table:table-cell>
              <table:table-cell office:value-type="float" office:value="272.6">
                <text:p>272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6.75">
                <text:p>266.75</text:p>
              </table:table-cell>
              <table:table-cell office:value-type="float" office:value="272.8">
                <text:p>272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72.9">
                <text:p>272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25">
                <text:p>267.25</text:p>
              </table:table-cell>
              <table:table-cell office:value-type="float" office:value="273">
                <text:p>2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5">
                <text:p>267.5</text:p>
              </table:table-cell>
              <table:table-cell office:value-type="float" office:value="273.2">
                <text:p>27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75">
                <text:p>267.75</text:p>
              </table:table-cell>
              <table:table-cell office:value-type="float" office:value="273.3">
                <text:p>273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73.4">
                <text:p>27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25">
                <text:p>268.25</text:p>
              </table:table-cell>
              <table:table-cell office:value-type="float" office:value="273.5">
                <text:p>273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5">
                <text:p>268.5</text:p>
              </table:table-cell>
              <table:table-cell office:value-type="float" office:value="273.7">
                <text:p>27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75">
                <text:p>268.75</text:p>
              </table:table-cell>
              <table:table-cell office:value-type="float" office:value="273.8">
                <text:p>273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73.9">
                <text:p>273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25">
                <text:p>269.25</text:p>
              </table:table-cell>
              <table:table-cell office:value-type="float" office:value="274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5">
                <text:p>269.5</text:p>
              </table:table-cell>
              <table:table-cell office:value-type="float" office:value="274.2">
                <text:p>274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75">
                <text:p>269.75</text:p>
              </table:table-cell>
              <table:table-cell office:value-type="float" office:value="274.3">
                <text:p>274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4.4">
                <text:p>27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25">
                <text:p>270.25</text:p>
              </table:table-cell>
              <table:table-cell office:value-type="float" office:value="274.5">
                <text:p>27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5">
                <text:p>270.5</text:p>
              </table:table-cell>
              <table:table-cell office:value-type="float" office:value="274.7">
                <text:p>274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75">
                <text:p>270.75</text:p>
              </table:table-cell>
              <table:table-cell office:value-type="float" office:value="274.8">
                <text:p>274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4.9">
                <text:p>274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25">
                <text:p>271.25</text:p>
              </table:table-cell>
              <table:table-cell office:value-type="float" office:value="275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5">
                <text:p>271.5</text:p>
              </table:table-cell>
              <table:table-cell office:value-type="float" office:value="275.2">
                <text:p>27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75">
                <text:p>271.75</text:p>
              </table:table-cell>
              <table:table-cell office:value-type="float" office:value="275.3">
                <text:p>275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5.4">
                <text:p>275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25">
                <text:p>272.25</text:p>
              </table:table-cell>
              <table:table-cell office:value-type="float" office:value="275.6">
                <text:p>275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5">
                <text:p>272.5</text:p>
              </table:table-cell>
              <table:table-cell office:value-type="float" office:value="275.7">
                <text:p>275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75">
                <text:p>272.75</text:p>
              </table:table-cell>
              <table:table-cell office:value-type="float" office:value="275.8">
                <text:p>275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5.9">
                <text:p>27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25">
                <text:p>273.25</text:p>
              </table:table-cell>
              <table:table-cell office:value-type="float" office:value="276.1">
                <text:p>276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5">
                <text:p>273.5</text:p>
              </table:table-cell>
              <table:table-cell office:value-type="float" office:value="276.2">
                <text:p>27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75">
                <text:p>273.75</text:p>
              </table:table-cell>
              <table:table-cell office:value-type="float" office:value="276.3">
                <text:p>27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6.4">
                <text:p>27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25">
                <text:p>274.25</text:p>
              </table:table-cell>
              <table:table-cell office:value-type="float" office:value="276.6">
                <text:p>27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5">
                <text:p>274.5</text:p>
              </table:table-cell>
              <table:table-cell office:value-type="float" office:value="276.7">
                <text:p>27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75">
                <text:p>274.75</text:p>
              </table:table-cell>
              <table:table-cell office:value-type="float" office:value="276.8">
                <text:p>276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6.9">
                <text:p>27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25">
                <text:p>275.25</text:p>
              </table:table-cell>
              <table:table-cell office:value-type="float" office:value="277.1">
                <text:p>277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5">
                <text:p>275.5</text:p>
              </table:table-cell>
              <table:table-cell office:value-type="float" office:value="277.2">
                <text:p>27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75">
                <text:p>275.75</text:p>
              </table:table-cell>
              <table:table-cell office:value-type="float" office:value="277.3">
                <text:p>277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7.5">
                <text:p>27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25">
                <text:p>276.25</text:p>
              </table:table-cell>
              <table:table-cell office:value-type="float" office:value="277.6">
                <text:p>277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5">
                <text:p>276.5</text:p>
              </table:table-cell>
              <table:table-cell office:value-type="float" office:value="277.7">
                <text:p>277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75">
                <text:p>276.75</text:p>
              </table:table-cell>
              <table:table-cell office:value-type="float" office:value="277.8">
                <text:p>27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25">
                <text:p>277.25</text:p>
              </table:table-cell>
              <table:table-cell office:value-type="float" office:value="278.1">
                <text:p>27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5">
                <text:p>277.5</text:p>
              </table:table-cell>
              <table:table-cell office:value-type="float" office:value="278.2">
                <text:p>27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75">
                <text:p>277.75</text:p>
              </table:table-cell>
              <table:table-cell office:value-type="float" office:value="278.3">
                <text:p>278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.5">
                <text:p>27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25">
                <text:p>278.25</text:p>
              </table:table-cell>
              <table:table-cell office:value-type="float" office:value="278.6">
                <text:p>278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5">
                <text:p>278.5</text:p>
              </table:table-cell>
              <table:table-cell office:value-type="float" office:value="278.7">
                <text:p>278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75">
                <text:p>278.75</text:p>
              </table:table-cell>
              <table:table-cell office:value-type="float" office:value="278.8">
                <text:p>27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25">
                <text:p>279.25</text:p>
              </table:table-cell>
              <table:table-cell office:value-type="float" office:value="279.1">
                <text:p>279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5">
                <text:p>279.5</text:p>
              </table:table-cell>
              <table:table-cell office:value-type="float" office:value="279.2">
                <text:p>27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75">
                <text:p>279.75</text:p>
              </table:table-cell>
              <table:table-cell office:value-type="float" office:value="279.4">
                <text:p>27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9.7">
                <text:p>279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25">
                <text:p>280.25</text:p>
              </table:table-cell>
              <table:table-cell office:value-type="float" office:value="280">
                <text:p>2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5">
                <text:p>280.5</text:p>
              </table:table-cell>
              <table:table-cell office:value-type="float" office:value="280.3">
                <text:p>28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75">
                <text:p>280.75</text:p>
              </table:table-cell>
              <table:table-cell office:value-type="float" office:value="280.6">
                <text:p>28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0.9">
                <text:p>28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25">
                <text:p>281.25</text:p>
              </table:table-cell>
              <table:table-cell office:value-type="float" office:value="281.2">
                <text:p>2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5">
                <text:p>281.5</text:p>
              </table:table-cell>
              <table:table-cell office:value-type="float" office:value="281.5">
                <text:p>28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75">
                <text:p>281.75</text:p>
              </table:table-cell>
              <table:table-cell office:value-type="float" office:value="281.8">
                <text:p>28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.1">
                <text:p>28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282.4">
                <text:p>28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5">
                <text:p>282.5</text:p>
              </table:table-cell>
              <table:table-cell office:value-type="float" office:value="282.8">
                <text:p>28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75">
                <text:p>282.75</text:p>
              </table:table-cell>
              <table:table-cell office:value-type="float" office:value="283.1">
                <text:p>28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.4">
                <text:p>2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25">
                <text:p>283.25</text:p>
              </table:table-cell>
              <table:table-cell office:value-type="float" office:value="283.7">
                <text:p>28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5">
                <text:p>283.5</text:p>
              </table:table-cell>
              <table:table-cell office:value-type="float" office:value="284">
                <text:p>2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75">
                <text:p>283.75</text:p>
              </table:table-cell>
              <table:table-cell office:value-type="float" office:value="284.3">
                <text:p>28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.6">
                <text:p>2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25">
                <text:p>284.25</text:p>
              </table:table-cell>
              <table:table-cell office:value-type="float" office:value="284.9">
                <text:p>28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5">
                <text:p>284.5</text:p>
              </table:table-cell>
              <table:table-cell office:value-type="float" office:value="285.2">
                <text:p>28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75">
                <text:p>284.75</text:p>
              </table:table-cell>
              <table:table-cell office:value-type="float" office:value="285.5">
                <text:p>28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.8">
                <text:p>2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.25">
                <text:p>285.25</text:p>
              </table:table-cell>
              <table:table-cell office:value-type="float" office:value="286.1">
                <text:p>28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.5">
                <text:p>285.5</text:p>
              </table:table-cell>
              <table:table-cell office:value-type="float" office:value="293.7">
                <text:p>293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285.75">
                <text:p>285.75</text:p>
              </table:table-cell>
              <table:table-cell office:value-type="float" office:value="295.1">
                <text:p>295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96.4">
                <text:p>29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25">
                <text:p>286.25</text:p>
              </table:table-cell>
              <table:table-cell office:value-type="float" office:value="297.7">
                <text:p>29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5">
                <text:p>286.5</text:p>
              </table:table-cell>
              <table:table-cell office:value-type="float" office:value="299">
                <text:p>29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75">
                <text:p>286.75</text:p>
              </table:table-cell>
              <table:table-cell office:value-type="float" office:value="300.3">
                <text:p>300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01.4">
                <text:p>301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25">
                <text:p>287.25</text:p>
              </table:table-cell>
              <table:table-cell office:value-type="float" office:value="302.5">
                <text:p>302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5">
                <text:p>287.5</text:p>
              </table:table-cell>
              <table:table-cell office:value-type="float" office:value="303.6">
                <text:p>303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75">
                <text:p>287.75</text:p>
              </table:table-cell>
              <table:table-cell office:value-type="float" office:value="304.7">
                <text:p>304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05.8">
                <text:p>30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.25">
                <text:p>288.25</text:p>
              </table:table-cell>
              <table:table-cell office:value-type="float" office:value="306.9">
                <text:p>306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.5">
                <text:p>288.5</text:p>
              </table:table-cell>
              <table:table-cell office:value-type="float" office:value="307.6">
                <text:p>307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8.75">
                <text:p>288.75</text:p>
              </table:table-cell>
              <table:table-cell office:value-type="float" office:value="307.9">
                <text:p>307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8.3">
                <text:p>308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25">
                <text:p>289.25</text:p>
              </table:table-cell>
              <table:table-cell office:value-type="float" office:value="308.6">
                <text:p>308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309">
                <text:p>30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75">
                <text:p>289.75</text:p>
              </table:table-cell>
              <table:table-cell office:value-type="float" office:value="309.3">
                <text:p>309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.7">
                <text:p>309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25">
                <text:p>290.25</text:p>
              </table:table-cell>
              <table:table-cell office:value-type="float" office:value="310">
                <text:p>3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5">
                <text:p>290.5</text:p>
              </table:table-cell>
              <table:table-cell office:value-type="float" office:value="310.4">
                <text:p>31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75">
                <text:p>290.75</text:p>
              </table:table-cell>
              <table:table-cell office:value-type="float" office:value="310.7">
                <text:p>310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11.1">
                <text:p>31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25">
                <text:p>291.25</text:p>
              </table:table-cell>
              <table:table-cell office:value-type="float" office:value="311.4">
                <text:p>31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5">
                <text:p>291.5</text:p>
              </table:table-cell>
              <table:table-cell office:value-type="float" office:value="311.8">
                <text:p>31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75">
                <text:p>291.75</text:p>
              </table:table-cell>
              <table:table-cell office:value-type="float" office:value="312.1">
                <text:p>312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25">
                <text:p>292.25</text:p>
              </table:table-cell>
              <table:table-cell office:value-type="float" office:value="312.8">
                <text:p>312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5">
                <text:p>292.5</text:p>
              </table:table-cell>
              <table:table-cell office:value-type="float" office:value="313.2">
                <text:p>31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75">
                <text:p>292.75</text:p>
              </table:table-cell>
              <table:table-cell office:value-type="float" office:value="313.6">
                <text:p>313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13.9">
                <text:p>31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.25">
                <text:p>293.25</text:p>
              </table:table-cell>
              <table:table-cell office:value-type="float" office:value="314.3">
                <text:p>31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314.5">
                <text:p>31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.75">
                <text:p>293.75</text:p>
              </table:table-cell>
              <table:table-cell office:value-type="float" office:value="314.7">
                <text:p>314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14.9">
                <text:p>314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25">
                <text:p>294.25</text:p>
              </table:table-cell>
              <table:table-cell office:value-type="float" office:value="315">
                <text:p>3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5">
                <text:p>294.5</text:p>
              </table:table-cell>
              <table:table-cell office:value-type="float" office:value="315.2">
                <text:p>315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75">
                <text:p>294.75</text:p>
              </table:table-cell>
              <table:table-cell office:value-type="float" office:value="315.4">
                <text:p>31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5.6">
                <text:p>315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25">
                <text:p>295.25</text:p>
              </table:table-cell>
              <table:table-cell office:value-type="float" office:value="315.7">
                <text:p>3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5">
                <text:p>295.5</text:p>
              </table:table-cell>
              <table:table-cell office:value-type="float" office:value="315.9">
                <text:p>315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75">
                <text:p>295.75</text:p>
              </table:table-cell>
              <table:table-cell office:value-type="float" office:value="316.1">
                <text:p>31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16.3">
                <text:p>31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25">
                <text:p>296.25</text:p>
              </table:table-cell>
              <table:table-cell office:value-type="float" office:value="316.4">
                <text:p>31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5">
                <text:p>296.5</text:p>
              </table:table-cell>
              <table:table-cell office:value-type="float" office:value="316.6">
                <text:p>31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75">
                <text:p>296.75</text:p>
              </table:table-cell>
              <table:table-cell office:value-type="float" office:value="316.8">
                <text:p>31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25">
                <text:p>297.25</text:p>
              </table:table-cell>
              <table:table-cell office:value-type="float" office:value="317.1">
                <text:p>31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5">
                <text:p>297.5</text:p>
              </table:table-cell>
              <table:table-cell office:value-type="float" office:value="317.3">
                <text:p>317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75">
                <text:p>297.75</text:p>
              </table:table-cell>
              <table:table-cell office:value-type="float" office:value="317.5">
                <text:p>31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17.7">
                <text:p>31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25">
                <text:p>298.25</text:p>
              </table:table-cell>
              <table:table-cell office:value-type="float" office:value="317.8">
                <text:p>31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5">
                <text:p>298.5</text:p>
              </table:table-cell>
              <table:table-cell office:value-type="float" office:value="318">
                <text:p>3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75">
                <text:p>298.75</text:p>
              </table:table-cell>
              <table:table-cell office:value-type="float" office:value="318.2">
                <text:p>318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18.4">
                <text:p>31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25">
                <text:p>299.25</text:p>
              </table:table-cell>
              <table:table-cell office:value-type="float" office:value="318.5">
                <text:p>31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5">
                <text:p>299.5</text:p>
              </table:table-cell>
              <table:table-cell office:value-type="float" office:value="318.7">
                <text:p>31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75">
                <text:p>299.75</text:p>
              </table:table-cell>
              <table:table-cell office:value-type="float" office:value="318.9">
                <text:p>31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.1">
                <text:p>31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25">
                <text:p>300.25</text:p>
              </table:table-cell>
              <table:table-cell office:value-type="float" office:value="319.3">
                <text:p>319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5">
                <text:p>300.5</text:p>
              </table:table-cell>
              <table:table-cell office:value-type="float" office:value="319.4">
                <text:p>319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75">
                <text:p>300.75</text:p>
              </table:table-cell>
              <table:table-cell office:value-type="float" office:value="319.6">
                <text:p>319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19.8">
                <text:p>31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25">
                <text:p>301.25</text:p>
              </table:table-cell>
              <table:table-cell office:value-type="float" office:value="320">
                <text:p>3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5">
                <text:p>301.5</text:p>
              </table:table-cell>
              <table:table-cell office:value-type="float" office:value="320.1">
                <text:p>32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75">
                <text:p>301.75</text:p>
              </table:table-cell>
              <table:table-cell office:value-type="float" office:value="320.3">
                <text:p>32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20.5">
                <text:p>32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25">
                <text:p>302.25</text:p>
              </table:table-cell>
              <table:table-cell office:value-type="float" office:value="320.7">
                <text:p>32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5">
                <text:p>302.5</text:p>
              </table:table-cell>
              <table:table-cell office:value-type="float" office:value="320.8">
                <text:p>32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75">
                <text:p>302.75</text:p>
              </table:table-cell>
              <table:table-cell office:value-type="float" office:value="321">
                <text:p>32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21.2">
                <text:p>32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.25">
                <text:p>303.25</text:p>
              </table:table-cell>
              <table:table-cell office:value-type="float" office:value="321.4">
                <text:p>32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.5">
                <text:p>303.5</text:p>
              </table:table-cell>
              <table:table-cell office:value-type="float" office:value="321.6">
                <text:p>32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03.75">
                <text:p>303.75</text:p>
              </table:table-cell>
              <table:table-cell office:value-type="float" office:value="321.9">
                <text:p>32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22.2">
                <text:p>32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25">
                <text:p>304.25</text:p>
              </table:table-cell>
              <table:table-cell office:value-type="float" office:value="322.5">
                <text:p>32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5">
                <text:p>304.5</text:p>
              </table:table-cell>
              <table:table-cell office:value-type="float" office:value="322.8">
                <text:p>32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323.1">
                <text:p>32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23.4">
                <text:p>32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25">
                <text:p>305.25</text:p>
              </table:table-cell>
              <table:table-cell office:value-type="float" office:value="323.7">
                <text:p>32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5">
                <text:p>305.5</text:p>
              </table:table-cell>
              <table:table-cell office:value-type="float" office:value="324">
                <text:p>3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75">
                <text:p>305.75</text:p>
              </table:table-cell>
              <table:table-cell office:value-type="float" office:value="324.3">
                <text:p>32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4.6">
                <text:p>32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25">
                <text:p>306.25</text:p>
              </table:table-cell>
              <table:table-cell office:value-type="float" office:value="324.9">
                <text:p>32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5">
                <text:p>306.5</text:p>
              </table:table-cell>
              <table:table-cell office:value-type="float" office:value="325.2">
                <text:p>32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75">
                <text:p>306.75</text:p>
              </table:table-cell>
              <table:table-cell office:value-type="float" office:value="325.5">
                <text:p>32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25.7">
                <text:p>325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25">
                <text:p>307.25</text:p>
              </table:table-cell>
              <table:table-cell office:value-type="float" office:value="326">
                <text:p>3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5">
                <text:p>307.5</text:p>
              </table:table-cell>
              <table:table-cell office:value-type="float" office:value="326.3">
                <text:p>326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75">
                <text:p>307.75</text:p>
              </table:table-cell>
              <table:table-cell office:value-type="float" office:value="326.6">
                <text:p>326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26.9">
                <text:p>326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25">
                <text:p>308.25</text:p>
              </table:table-cell>
              <table:table-cell office:value-type="float" office:value="327.2">
                <text:p>32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5">
                <text:p>308.5</text:p>
              </table:table-cell>
              <table:table-cell office:value-type="float" office:value="327.5">
                <text:p>32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75">
                <text:p>308.75</text:p>
              </table:table-cell>
              <table:table-cell office:value-type="float" office:value="327.8">
                <text:p>327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28.1">
                <text:p>32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.25">
                <text:p>309.25</text:p>
              </table:table-cell>
              <table:table-cell office:value-type="float" office:value="328.4">
                <text:p>328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.5">
                <text:p>309.5</text:p>
              </table:table-cell>
              <table:table-cell office:value-type="float" office:value="336.4">
                <text:p>336.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309.75">
                <text:p>309.75</text:p>
              </table:table-cell>
              <table:table-cell office:value-type="float" office:value="338.4">
                <text:p>338.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40.5">
                <text:p>340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.25">
                <text:p>310.25</text:p>
              </table:table-cell>
              <table:table-cell office:value-type="float" office:value="342.5">
                <text:p>342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.5">
                <text:p>310.5</text:p>
              </table:table-cell>
              <table:table-cell office:value-type="float" office:value="343.8">
                <text:p>343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10.75">
                <text:p>310.75</text:p>
              </table:table-cell>
              <table:table-cell office:value-type="float" office:value="344.9">
                <text:p>344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46.1">
                <text:p>346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25">
                <text:p>311.25</text:p>
              </table:table-cell>
              <table:table-cell office:value-type="float" office:value="347.2">
                <text:p>34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5">
                <text:p>311.5</text:p>
              </table:table-cell>
              <table:table-cell office:value-type="float" office:value="348.3">
                <text:p>348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75">
                <text:p>311.75</text:p>
              </table:table-cell>
              <table:table-cell office:value-type="float" office:value="349.5">
                <text:p>349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50.2">
                <text:p>350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2.25">
                <text:p>312.25</text:p>
              </table:table-cell>
              <table:table-cell office:value-type="float" office:value="350.7">
                <text:p>350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2.5">
                <text:p>312.5</text:p>
              </table:table-cell>
              <table:table-cell office:value-type="float" office:value="351.1">
                <text:p>351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2.75">
                <text:p>312.75</text:p>
              </table:table-cell>
              <table:table-cell office:value-type="float" office:value="351.6">
                <text:p>35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52">
                <text:p>3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25">
                <text:p>313.25</text:p>
              </table:table-cell>
              <table:table-cell office:value-type="float" office:value="352.5">
                <text:p>352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5">
                <text:p>313.5</text:p>
              </table:table-cell>
              <table:table-cell office:value-type="float" office:value="353">
                <text:p>3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75">
                <text:p>313.75</text:p>
              </table:table-cell>
              <table:table-cell office:value-type="float" office:value="353.4">
                <text:p>353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53.9">
                <text:p>353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25">
                <text:p>314.25</text:p>
              </table:table-cell>
              <table:table-cell office:value-type="float" office:value="354.3">
                <text:p>354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5">
                <text:p>314.5</text:p>
              </table:table-cell>
              <table:table-cell office:value-type="float" office:value="354.8">
                <text:p>35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75">
                <text:p>314.75</text:p>
              </table:table-cell>
              <table:table-cell office:value-type="float" office:value="355.2">
                <text:p>355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55.7">
                <text:p>35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25">
                <text:p>315.25</text:p>
              </table:table-cell>
              <table:table-cell office:value-type="float" office:value="356.1">
                <text:p>356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5">
                <text:p>315.5</text:p>
              </table:table-cell>
              <table:table-cell office:value-type="float" office:value="356.6">
                <text:p>356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75">
                <text:p>315.75</text:p>
              </table:table-cell>
              <table:table-cell office:value-type="float" office:value="357">
                <text:p>3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57.3">
                <text:p>35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16.25">
                <text:p>316.25</text:p>
              </table:table-cell>
              <table:table-cell office:value-type="float" office:value="357.5">
                <text:p>35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6.5">
                <text:p>316.5</text:p>
              </table:table-cell>
              <table:table-cell office:value-type="float" office:value="357.8">
                <text:p>35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6.75">
                <text:p>316.75</text:p>
              </table:table-cell>
              <table:table-cell office:value-type="float" office:value="358">
                <text:p>3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58.2">
                <text:p>35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25">
                <text:p>317.25</text:p>
              </table:table-cell>
              <table:table-cell office:value-type="float" office:value="358.4">
                <text:p>35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5">
                <text:p>317.5</text:p>
              </table:table-cell>
              <table:table-cell office:value-type="float" office:value="358.6">
                <text:p>35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75">
                <text:p>317.75</text:p>
              </table:table-cell>
              <table:table-cell office:value-type="float" office:value="358.9">
                <text:p>35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59.1">
                <text:p>35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25">
                <text:p>318.25</text:p>
              </table:table-cell>
              <table:table-cell office:value-type="float" office:value="359.3">
                <text:p>35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5">
                <text:p>318.5</text:p>
              </table:table-cell>
              <table:table-cell office:value-type="float" office:value="359.5">
                <text:p>359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75">
                <text:p>318.75</text:p>
              </table:table-cell>
              <table:table-cell office:value-type="float" office:value="359.8">
                <text:p>35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60">
                <text:p>3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25">
                <text:p>319.25</text:p>
              </table:table-cell>
              <table:table-cell office:value-type="float" office:value="360.2">
                <text:p>36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5">
                <text:p>319.5</text:p>
              </table:table-cell>
              <table:table-cell office:value-type="float" office:value="360.4">
                <text:p>36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75">
                <text:p>319.75</text:p>
              </table:table-cell>
              <table:table-cell office:value-type="float" office:value="360.7">
                <text:p>36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0.9">
                <text:p>36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25">
                <text:p>320.25</text:p>
              </table:table-cell>
              <table:table-cell office:value-type="float" office:value="361.1">
                <text:p>36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5">
                <text:p>320.5</text:p>
              </table:table-cell>
              <table:table-cell office:value-type="float" office:value="361.3">
                <text:p>36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75">
                <text:p>320.75</text:p>
              </table:table-cell>
              <table:table-cell office:value-type="float" office:value="361.5">
                <text:p>36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61.8">
                <text:p>36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25">
                <text:p>321.25</text:p>
              </table:table-cell>
              <table:table-cell office:value-type="float" office:value="362">
                <text:p>3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5">
                <text:p>321.5</text:p>
              </table:table-cell>
              <table:table-cell office:value-type="float" office:value="362.2">
                <text:p>362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75">
                <text:p>321.75</text:p>
              </table:table-cell>
              <table:table-cell office:value-type="float" office:value="362.4">
                <text:p>362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62.7">
                <text:p>362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25">
                <text:p>322.25</text:p>
              </table:table-cell>
              <table:table-cell office:value-type="float" office:value="362.9">
                <text:p>362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5">
                <text:p>322.5</text:p>
              </table:table-cell>
              <table:table-cell office:value-type="float" office:value="363.1">
                <text:p>363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75">
                <text:p>322.75</text:p>
              </table:table-cell>
              <table:table-cell office:value-type="float" office:value="363.3">
                <text:p>36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63.6">
                <text:p>36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25">
                <text:p>323.25</text:p>
              </table:table-cell>
              <table:table-cell office:value-type="float" office:value="363.8">
                <text:p>36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5">
                <text:p>323.5</text:p>
              </table:table-cell>
              <table:table-cell office:value-type="float" office:value="364">
                <text:p>3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75">
                <text:p>323.75</text:p>
              </table:table-cell>
              <table:table-cell office:value-type="float" office:value="364.2">
                <text:p>364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4.5">
                <text:p>36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.25">
                <text:p>324.25</text:p>
              </table:table-cell>
              <table:table-cell office:value-type="float" office:value="364.8">
                <text:p>36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4.5">
                <text:p>324.5</text:p>
              </table:table-cell>
              <table:table-cell office:value-type="float" office:value="365">
                <text:p>3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4.75">
                <text:p>324.75</text:p>
              </table:table-cell>
              <table:table-cell office:value-type="float" office:value="365.3">
                <text:p>36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65.6">
                <text:p>36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25">
                <text:p>325.25</text:p>
              </table:table-cell>
              <table:table-cell office:value-type="float" office:value="365.9">
                <text:p>36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5">
                <text:p>325.5</text:p>
              </table:table-cell>
              <table:table-cell office:value-type="float" office:value="366.2">
                <text:p>36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75">
                <text:p>325.75</text:p>
              </table:table-cell>
              <table:table-cell office:value-type="float" office:value="366.4">
                <text:p>36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66.7">
                <text:p>36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25">
                <text:p>326.25</text:p>
              </table:table-cell>
              <table:table-cell office:value-type="float" office:value="367">
                <text:p>3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5">
                <text:p>326.5</text:p>
              </table:table-cell>
              <table:table-cell office:value-type="float" office:value="367.3">
                <text:p>36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75">
                <text:p>326.75</text:p>
              </table:table-cell>
              <table:table-cell office:value-type="float" office:value="367.6">
                <text:p>36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67.9">
                <text:p>367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368.1">
                <text:p>368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5">
                <text:p>327.5</text:p>
              </table:table-cell>
              <table:table-cell office:value-type="float" office:value="368.4">
                <text:p>368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75">
                <text:p>327.75</text:p>
              </table:table-cell>
              <table:table-cell office:value-type="float" office:value="368.7">
                <text:p>36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9">
                <text:p>3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25">
                <text:p>328.25</text:p>
              </table:table-cell>
              <table:table-cell office:value-type="float" office:value="369.3">
                <text:p>36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5">
                <text:p>328.5</text:p>
              </table:table-cell>
              <table:table-cell office:value-type="float" office:value="369.5">
                <text:p>36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75">
                <text:p>328.75</text:p>
              </table:table-cell>
              <table:table-cell office:value-type="float" office:value="369.8">
                <text:p>36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70.1">
                <text:p>37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25">
                <text:p>329.25</text:p>
              </table:table-cell>
              <table:table-cell office:value-type="float" office:value="370.4">
                <text:p>370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5">
                <text:p>329.5</text:p>
              </table:table-cell>
              <table:table-cell office:value-type="float" office:value="370.7">
                <text:p>370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75">
                <text:p>329.75</text:p>
              </table:table-cell>
              <table:table-cell office:value-type="float" office:value="370.9">
                <text:p>37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71.2">
                <text:p>37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.25">
                <text:p>330.25</text:p>
              </table:table-cell>
              <table:table-cell office:value-type="float" office:value="371.5">
                <text:p>371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.5">
                <text:p>330.5</text:p>
              </table:table-cell>
              <table:table-cell office:value-type="float" office:value="372.1">
                <text:p>37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0.75">
                <text:p>330.75</text:p>
              </table:table-cell>
              <table:table-cell office:value-type="float" office:value="372.7">
                <text:p>372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73.2">
                <text:p>37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25">
                <text:p>331.25</text:p>
              </table:table-cell>
              <table:table-cell office:value-type="float" office:value="373.8">
                <text:p>373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5">
                <text:p>331.5</text:p>
              </table:table-cell>
              <table:table-cell office:value-type="float" office:value="374.4">
                <text:p>37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75">
                <text:p>331.75</text:p>
              </table:table-cell>
              <table:table-cell office:value-type="float" office:value="374.9">
                <text:p>374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75.5">
                <text:p>375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25">
                <text:p>332.25</text:p>
              </table:table-cell>
              <table:table-cell office:value-type="float" office:value="376.1">
                <text:p>376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5">
                <text:p>332.5</text:p>
              </table:table-cell>
              <table:table-cell office:value-type="float" office:value="376.7">
                <text:p>37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75">
                <text:p>332.75</text:p>
              </table:table-cell>
              <table:table-cell office:value-type="float" office:value="377.2">
                <text:p>377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77.8">
                <text:p>37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.25">
                <text:p>333.25</text:p>
              </table:table-cell>
              <table:table-cell office:value-type="float" office:value="378.4">
                <text:p>378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.5">
                <text:p>333.5</text:p>
              </table:table-cell>
              <table:table-cell office:value-type="float" office:value="386.4">
                <text:p>386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3.75">
                <text:p>333.75</text:p>
              </table:table-cell>
              <table:table-cell office:value-type="float" office:value="388.1">
                <text:p>388.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89.8">
                <text:p>389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.25">
                <text:p>334.25</text:p>
              </table:table-cell>
              <table:table-cell office:value-type="float" office:value="391.6">
                <text:p>391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.5">
                <text:p>334.5</text:p>
              </table:table-cell>
              <table:table-cell office:value-type="float" office:value="393.1">
                <text:p>393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34.75">
                <text:p>334.75</text:p>
              </table:table-cell>
              <table:table-cell office:value-type="float" office:value="393.2">
                <text:p>393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93.3">
                <text:p>39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25">
                <text:p>335.25</text:p>
              </table:table-cell>
              <table:table-cell office:value-type="float" office:value="393.4">
                <text:p>393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5">
                <text:p>335.5</text:p>
              </table:table-cell>
              <table:table-cell office:value-type="float" office:value="393.5">
                <text:p>393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75">
                <text:p>335.75</text:p>
              </table:table-cell>
              <table:table-cell office:value-type="float" office:value="393.6">
                <text:p>39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93.7">
                <text:p>39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25">
                <text:p>336.25</text:p>
              </table:table-cell>
              <table:table-cell office:value-type="float" office:value="393.8">
                <text:p>39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5">
                <text:p>336.5</text:p>
              </table:table-cell>
              <table:table-cell office:value-type="float" office:value="393.9">
                <text:p>393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75">
                <text:p>336.75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25">
                <text:p>337.25</text:p>
              </table:table-cell>
              <table:table-cell office:value-type="float" office:value="394.1">
                <text:p>39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5">
                <text:p>337.5</text:p>
              </table:table-cell>
              <table:table-cell office:value-type="float" office:value="394.2">
                <text:p>39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75">
                <text:p>337.75</text:p>
              </table:table-cell>
              <table:table-cell office:value-type="float" office:value="394.3">
                <text:p>39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94.4">
                <text:p>3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25">
                <text:p>338.25</text:p>
              </table:table-cell>
              <table:table-cell office:value-type="float" office:value="394.5">
                <text:p>39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394.6">
                <text:p>394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75">
                <text:p>338.75</text:p>
              </table:table-cell>
              <table:table-cell office:value-type="float" office:value="394.7">
                <text:p>39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94.8">
                <text:p>39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25">
                <text:p>339.25</text:p>
              </table:table-cell>
              <table:table-cell office:value-type="float" office:value="394.9">
                <text:p>394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5">
                <text:p>339.5</text:p>
              </table:table-cell>
              <table:table-cell office:value-type="float" office:value="395">
                <text:p>3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75">
                <text:p>339.75</text:p>
              </table:table-cell>
              <table:table-cell office:value-type="float" office:value="395.1">
                <text:p>39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95.2">
                <text:p>39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25">
                <text:p>340.25</text:p>
              </table:table-cell>
              <table:table-cell office:value-type="float" office:value="395.3">
                <text:p>39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5">
                <text:p>340.5</text:p>
              </table:table-cell>
              <table:table-cell office:value-type="float" office:value="395.4">
                <text:p>39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75">
                <text:p>340.75</text:p>
              </table:table-cell>
              <table:table-cell office:value-type="float" office:value="395.4">
                <text:p>39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95.5">
                <text:p>39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25">
                <text:p>341.25</text:p>
              </table:table-cell>
              <table:table-cell office:value-type="float" office:value="395.6">
                <text:p>39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5">
                <text:p>341.5</text:p>
              </table:table-cell>
              <table:table-cell office:value-type="float" office:value="395.7">
                <text:p>39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75">
                <text:p>341.75</text:p>
              </table:table-cell>
              <table:table-cell office:value-type="float" office:value="395.8">
                <text:p>395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95.9">
                <text:p>395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25">
                <text:p>342.25</text:p>
              </table:table-cell>
              <table:table-cell office:value-type="float" office:value="396">
                <text:p>3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5">
                <text:p>342.5</text:p>
              </table:table-cell>
              <table:table-cell office:value-type="float" office:value="396.1">
                <text:p>396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75">
                <text:p>342.75</text:p>
              </table:table-cell>
              <table:table-cell office:value-type="float" office:value="396.2">
                <text:p>39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96.3">
                <text:p>396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25">
                <text:p>343.25</text:p>
              </table:table-cell>
              <table:table-cell office:value-type="float" office:value="396.4">
                <text:p>396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5">
                <text:p>343.5</text:p>
              </table:table-cell>
              <table:table-cell office:value-type="float" office:value="396.5">
                <text:p>39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75">
                <text:p>343.75</text:p>
              </table:table-cell>
              <table:table-cell office:value-type="float" office:value="396.6">
                <text:p>396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25">
                <text:p>344.25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5">
                <text:p>344.5</text:p>
              </table:table-cell>
              <table:table-cell office:value-type="float" office:value="396.8">
                <text:p>39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75">
                <text:p>344.75</text:p>
              </table:table-cell>
              <table:table-cell office:value-type="float" office:value="396.9">
                <text:p>39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97">
                <text:p>3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25">
                <text:p>345.25</text:p>
              </table:table-cell>
              <table:table-cell office:value-type="float" office:value="397.1">
                <text:p>397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5">
                <text:p>345.5</text:p>
              </table:table-cell>
              <table:table-cell office:value-type="float" office:value="397.2">
                <text:p>39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75">
                <text:p>345.75</text:p>
              </table:table-cell>
              <table:table-cell office:value-type="float" office:value="397.3">
                <text:p>397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97.4">
                <text:p>39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25">
                <text:p>346.25</text:p>
              </table:table-cell>
              <table:table-cell office:value-type="float" office:value="397.5">
                <text:p>39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5">
                <text:p>346.5</text:p>
              </table:table-cell>
              <table:table-cell office:value-type="float" office:value="397.6">
                <text:p>397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75">
                <text:p>346.75</text:p>
              </table:table-cell>
              <table:table-cell office:value-type="float" office:value="397.7">
                <text:p>397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97.8">
                <text:p>39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25">
                <text:p>347.25</text:p>
              </table:table-cell>
              <table:table-cell office:value-type="float" office:value="397.9">
                <text:p>397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5">
                <text:p>347.5</text:p>
              </table:table-cell>
              <table:table-cell office:value-type="float" office:value="398">
                <text:p>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75">
                <text:p>347.75</text:p>
              </table:table-cell>
              <table:table-cell office:value-type="float" office:value="398">
                <text:p>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98.1">
                <text:p>39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25">
                <text:p>348.25</text:p>
              </table:table-cell>
              <table:table-cell office:value-type="float" office:value="398.2">
                <text:p>398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5">
                <text:p>348.5</text:p>
              </table:table-cell>
              <table:table-cell office:value-type="float" office:value="398.3">
                <text:p>398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75">
                <text:p>348.75</text:p>
              </table:table-cell>
              <table:table-cell office:value-type="float" office:value="398.4">
                <text:p>398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98.5">
                <text:p>398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25">
                <text:p>349.25</text:p>
              </table:table-cell>
              <table:table-cell office:value-type="float" office:value="398.6">
                <text:p>39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5">
                <text:p>349.5</text:p>
              </table:table-cell>
              <table:table-cell office:value-type="float" office:value="398.7">
                <text:p>398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398.8">
                <text:p>398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98.9">
                <text:p>398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25">
                <text:p>350.25</text:p>
              </table:table-cell>
              <table:table-cell office:value-type="float" office:value="399">
                <text:p>3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5">
                <text:p>350.5</text:p>
              </table:table-cell>
              <table:table-cell office:value-type="float" office:value="399.1">
                <text:p>399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75">
                <text:p>350.75</text:p>
              </table:table-cell>
              <table:table-cell office:value-type="float" office:value="399.2">
                <text:p>39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25">
                <text:p>351.25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5">
                <text:p>351.5</text:p>
              </table:table-cell>
              <table:table-cell office:value-type="float" office:value="399.4">
                <text:p>399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75">
                <text:p>351.75</text:p>
              </table:table-cell>
              <table:table-cell office:value-type="float" office:value="399.5">
                <text:p>399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99.6">
                <text:p>39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25">
                <text:p>352.25</text:p>
              </table:table-cell>
              <table:table-cell office:value-type="float" office:value="399.7">
                <text:p>399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5">
                <text:p>352.5</text:p>
              </table:table-cell>
              <table:table-cell office:value-type="float" office:value="399.8">
                <text:p>399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75">
                <text:p>352.75</text:p>
              </table:table-cell>
              <table:table-cell office:value-type="float" office:value="399.9">
                <text:p>3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00">
                <text:p>4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25">
                <text:p>353.25</text:p>
              </table:table-cell>
              <table:table-cell office:value-type="float" office:value="400.1">
                <text:p>40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5">
                <text:p>353.5</text:p>
              </table:table-cell>
              <table:table-cell office:value-type="float" office:value="400.2">
                <text:p>40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75">
                <text:p>353.75</text:p>
              </table:table-cell>
              <table:table-cell office:value-type="float" office:value="400.3">
                <text:p>40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00.4">
                <text:p>40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4.25">
                <text:p>354.25</text:p>
              </table:table-cell>
              <table:table-cell office:value-type="float" office:value="401">
                <text:p>4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4.5">
                <text:p>354.5</text:p>
              </table:table-cell>
              <table:table-cell office:value-type="float" office:value="401.5">
                <text:p>40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4.75">
                <text:p>354.75</text:p>
              </table:table-cell>
              <table:table-cell office:value-type="float" office:value="402">
                <text:p>4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02.6">
                <text:p>402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25">
                <text:p>355.25</text:p>
              </table:table-cell>
              <table:table-cell office:value-type="float" office:value="403.1">
                <text:p>40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5">
                <text:p>355.5</text:p>
              </table:table-cell>
              <table:table-cell office:value-type="float" office:value="403.6">
                <text:p>403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75">
                <text:p>355.75</text:p>
              </table:table-cell>
              <table:table-cell office:value-type="float" office:value="404.1">
                <text:p>404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04.7">
                <text:p>404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25">
                <text:p>356.25</text:p>
              </table:table-cell>
              <table:table-cell office:value-type="float" office:value="405.2">
                <text:p>405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5">
                <text:p>356.5</text:p>
              </table:table-cell>
              <table:table-cell office:value-type="float" office:value="405.7">
                <text:p>405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75">
                <text:p>356.75</text:p>
              </table:table-cell>
              <table:table-cell office:value-type="float" office:value="406.3">
                <text:p>406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06.8">
                <text:p>406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.25">
                <text:p>357.25</text:p>
              </table:table-cell>
              <table:table-cell office:value-type="float" office:value="407.3">
                <text:p>407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.5">
                <text:p>357.5</text:p>
              </table:table-cell>
              <table:table-cell office:value-type="float" office:value="415.6">
                <text:p>415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357.75">
                <text:p>357.75</text:p>
              </table:table-cell>
              <table:table-cell office:value-type="float" office:value="417.9">
                <text:p>417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20.1">
                <text:p>420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58.25">
                <text:p>358.25</text:p>
              </table:table-cell>
              <table:table-cell office:value-type="float" office:value="422.3">
                <text:p>422.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58.5">
                <text:p>358.5</text:p>
              </table:table-cell>
              <table:table-cell office:value-type="float" office:value="423.8">
                <text:p>42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8.75">
                <text:p>358.75</text:p>
              </table:table-cell>
              <table:table-cell office:value-type="float" office:value="425.3">
                <text:p>425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26.9">
                <text:p>426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.25">
                <text:p>359.25</text:p>
              </table:table-cell>
              <table:table-cell office:value-type="float" office:value="428.4">
                <text:p>428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.5">
                <text:p>359.5</text:p>
              </table:table-cell>
              <table:table-cell office:value-type="float" office:value="429.6">
                <text:p>429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59.75">
                <text:p>359.75</text:p>
              </table:table-cell>
              <table:table-cell office:value-type="float" office:value="430.2">
                <text:p>430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0.7">
                <text:p>430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25">
                <text:p>360.25</text:p>
              </table:table-cell>
              <table:table-cell office:value-type="float" office:value="431.2">
                <text:p>43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5">
                <text:p>360.5</text:p>
              </table:table-cell>
              <table:table-cell office:value-type="float" office:value="431.8">
                <text:p>43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75">
                <text:p>360.75</text:p>
              </table:table-cell>
              <table:table-cell office:value-type="float" office:value="432.3">
                <text:p>43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32.8">
                <text:p>43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25">
                <text:p>361.25</text:p>
              </table:table-cell>
              <table:table-cell office:value-type="float" office:value="433.4">
                <text:p>433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5">
                <text:p>361.5</text:p>
              </table:table-cell>
              <table:table-cell office:value-type="float" office:value="433.9">
                <text:p>433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75">
                <text:p>361.75</text:p>
              </table:table-cell>
              <table:table-cell office:value-type="float" office:value="434.4">
                <text:p>434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34.9">
                <text:p>434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25">
                <text:p>362.25</text:p>
              </table:table-cell>
              <table:table-cell office:value-type="float" office:value="435.5">
                <text:p>435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5">
                <text:p>362.5</text:p>
              </table:table-cell>
              <table:table-cell office:value-type="float" office:value="436">
                <text:p>43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75">
                <text:p>362.75</text:p>
              </table:table-cell>
              <table:table-cell office:value-type="float" office:value="436.5">
                <text:p>436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36.9">
                <text:p>43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63.25">
                <text:p>363.25</text:p>
              </table:table-cell>
              <table:table-cell office:value-type="float" office:value="437.2">
                <text:p>43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3.5">
                <text:p>363.5</text:p>
              </table:table-cell>
              <table:table-cell office:value-type="float" office:value="437.5">
                <text:p>43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3.75">
                <text:p>363.75</text:p>
              </table:table-cell>
              <table:table-cell office:value-type="float" office:value="437.8">
                <text:p>437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38.1">
                <text:p>43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25">
                <text:p>364.25</text:p>
              </table:table-cell>
              <table:table-cell office:value-type="float" office:value="438.5">
                <text:p>438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5">
                <text:p>364.5</text:p>
              </table:table-cell>
              <table:table-cell office:value-type="float" office:value="438.8">
                <text:p>438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75">
                <text:p>364.75</text:p>
              </table:table-cell>
              <table:table-cell office:value-type="float" office:value="439.1">
                <text:p>439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39.4">
                <text:p>439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25">
                <text:p>365.25</text:p>
              </table:table-cell>
              <table:table-cell office:value-type="float" office:value="439.7">
                <text:p>439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5">
                <text:p>365.5</text:p>
              </table:table-cell>
              <table:table-cell office:value-type="float" office:value="440">
                <text:p>44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75">
                <text:p>365.75</text:p>
              </table:table-cell>
              <table:table-cell office:value-type="float" office:value="440.3">
                <text:p>44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40.6">
                <text:p>44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25">
                <text:p>366.25</text:p>
              </table:table-cell>
              <table:table-cell office:value-type="float" office:value="440.9">
                <text:p>44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5">
                <text:p>366.5</text:p>
              </table:table-cell>
              <table:table-cell office:value-type="float" office:value="441.2">
                <text:p>44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75">
                <text:p>366.75</text:p>
              </table:table-cell>
              <table:table-cell office:value-type="float" office:value="441.5">
                <text:p>44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41.8">
                <text:p>44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25">
                <text:p>367.25</text:p>
              </table:table-cell>
              <table:table-cell office:value-type="float" office:value="442.1">
                <text:p>44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5">
                <text:p>367.5</text:p>
              </table:table-cell>
              <table:table-cell office:value-type="float" office:value="442.4">
                <text:p>44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75">
                <text:p>367.75</text:p>
              </table:table-cell>
              <table:table-cell office:value-type="float" office:value="442.7">
                <text:p>442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43">
                <text:p>4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25">
                <text:p>368.25</text:p>
              </table:table-cell>
              <table:table-cell office:value-type="float" office:value="443.3">
                <text:p>44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5">
                <text:p>368.5</text:p>
              </table:table-cell>
              <table:table-cell office:value-type="float" office:value="443.6">
                <text:p>443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75">
                <text:p>368.75</text:p>
              </table:table-cell>
              <table:table-cell office:value-type="float" office:value="443.9">
                <text:p>443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44.2">
                <text:p>44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25">
                <text:p>369.25</text:p>
              </table:table-cell>
              <table:table-cell office:value-type="float" office:value="444.5">
                <text:p>444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5">
                <text:p>369.5</text:p>
              </table:table-cell>
              <table:table-cell office:value-type="float" office:value="444.8">
                <text:p>44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75">
                <text:p>369.75</text:p>
              </table:table-cell>
              <table:table-cell office:value-type="float" office:value="445.1">
                <text:p>445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45.3">
                <text:p>4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25">
                <text:p>370.25</text:p>
              </table:table-cell>
              <table:table-cell office:value-type="float" office:value="445.6">
                <text:p>44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5">
                <text:p>370.5</text:p>
              </table:table-cell>
              <table:table-cell office:value-type="float" office:value="445.9">
                <text:p>44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75">
                <text:p>370.75</text:p>
              </table:table-cell>
              <table:table-cell office:value-type="float" office:value="446.2">
                <text:p>44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46.4">
                <text:p>44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25">
                <text:p>371.25</text:p>
              </table:table-cell>
              <table:table-cell office:value-type="float" office:value="446.7">
                <text:p>44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5">
                <text:p>371.5</text:p>
              </table:table-cell>
              <table:table-cell office:value-type="float" office:value="447">
                <text:p>4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75">
                <text:p>371.75</text:p>
              </table:table-cell>
              <table:table-cell office:value-type="float" office:value="447.3">
                <text:p>44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47.6">
                <text:p>44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25">
                <text:p>372.25</text:p>
              </table:table-cell>
              <table:table-cell office:value-type="float" office:value="447.8">
                <text:p>447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5">
                <text:p>372.5</text:p>
              </table:table-cell>
              <table:table-cell office:value-type="float" office:value="448.1">
                <text:p>448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75">
                <text:p>372.75</text:p>
              </table:table-cell>
              <table:table-cell office:value-type="float" office:value="448.4">
                <text:p>448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48.7">
                <text:p>44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25">
                <text:p>373.25</text:p>
              </table:table-cell>
              <table:table-cell office:value-type="float" office:value="448.9">
                <text:p>44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5">
                <text:p>373.5</text:p>
              </table:table-cell>
              <table:table-cell office:value-type="float" office:value="449.2">
                <text:p>449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75">
                <text:p>373.75</text:p>
              </table:table-cell>
              <table:table-cell office:value-type="float" office:value="449.5">
                <text:p>44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49.8">
                <text:p>44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25">
                <text:p>374.25</text:p>
              </table:table-cell>
              <table:table-cell office:value-type="float" office:value="450.1">
                <text:p>45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5">
                <text:p>374.5</text:p>
              </table:table-cell>
              <table:table-cell office:value-type="float" office:value="450.3">
                <text:p>45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75">
                <text:p>374.75</text:p>
              </table:table-cell>
              <table:table-cell office:value-type="float" office:value="450.6">
                <text:p>45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50.9">
                <text:p>45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25">
                <text:p>375.25</text:p>
              </table:table-cell>
              <table:table-cell office:value-type="float" office:value="451.2">
                <text:p>45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5">
                <text:p>375.5</text:p>
              </table:table-cell>
              <table:table-cell office:value-type="float" office:value="451.5">
                <text:p>451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75">
                <text:p>375.75</text:p>
              </table:table-cell>
              <table:table-cell office:value-type="float" office:value="451.8">
                <text:p>45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52.1">
                <text:p>452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25">
                <text:p>376.25</text:p>
              </table:table-cell>
              <table:table-cell office:value-type="float" office:value="452.5">
                <text:p>45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5">
                <text:p>376.5</text:p>
              </table:table-cell>
              <table:table-cell office:value-type="float" office:value="452.8">
                <text:p>452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75">
                <text:p>376.75</text:p>
              </table:table-cell>
              <table:table-cell office:value-type="float" office:value="453.2">
                <text:p>45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53.5">
                <text:p>45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25">
                <text:p>377.25</text:p>
              </table:table-cell>
              <table:table-cell office:value-type="float" office:value="453.9">
                <text:p>45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5">
                <text:p>377.5</text:p>
              </table:table-cell>
              <table:table-cell office:value-type="float" office:value="454.2">
                <text:p>454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75">
                <text:p>377.75</text:p>
              </table:table-cell>
              <table:table-cell office:value-type="float" office:value="454.6">
                <text:p>45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54.9">
                <text:p>454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25">
                <text:p>378.25</text:p>
              </table:table-cell>
              <table:table-cell office:value-type="float" office:value="455.2">
                <text:p>455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5">
                <text:p>378.5</text:p>
              </table:table-cell>
              <table:table-cell office:value-type="float" office:value="455.6">
                <text:p>45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75">
                <text:p>378.75</text:p>
              </table:table-cell>
              <table:table-cell office:value-type="float" office:value="455.9">
                <text:p>455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56.3">
                <text:p>456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25">
                <text:p>379.25</text:p>
              </table:table-cell>
              <table:table-cell office:value-type="float" office:value="456.6">
                <text:p>456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5">
                <text:p>379.5</text:p>
              </table:table-cell>
              <table:table-cell office:value-type="float" office:value="457">
                <text:p>45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75">
                <text:p>379.75</text:p>
              </table:table-cell>
              <table:table-cell office:value-type="float" office:value="457.3">
                <text:p>457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57.7">
                <text:p>457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25">
                <text:p>380.25</text:p>
              </table:table-cell>
              <table:table-cell office:value-type="float" office:value="458">
                <text:p>45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5">
                <text:p>380.5</text:p>
              </table:table-cell>
              <table:table-cell office:value-type="float" office:value="458.3">
                <text:p>458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75">
                <text:p>380.75</text:p>
              </table:table-cell>
              <table:table-cell office:value-type="float" office:value="458.7">
                <text:p>458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61.2">
                <text:p>461.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1.25">
                <text:p>381.25</text:p>
              </table:table-cell>
              <table:table-cell office:value-type="float" office:value="464.3">
                <text:p>464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81.5">
                <text:p>381.5</text:p>
              </table:table-cell>
              <table:table-cell office:value-type="float" office:value="467">
                <text:p>4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81.75">
                <text:p>381.75</text:p>
              </table:table-cell>
              <table:table-cell office:value-type="float" office:value="469.1">
                <text:p>469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1.3">
                <text:p>471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2.25">
                <text:p>382.25</text:p>
              </table:table-cell>
              <table:table-cell office:value-type="float" office:value="473.5">
                <text:p>473.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2.5">
                <text:p>382.5</text:p>
              </table:table-cell>
              <table:table-cell office:value-type="float" office:value="474.2">
                <text:p>474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2.75">
                <text:p>382.75</text:p>
              </table:table-cell>
              <table:table-cell office:value-type="float" office:value="474.9">
                <text:p>474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75.6">
                <text:p>47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25">
                <text:p>383.25</text:p>
              </table:table-cell>
              <table:table-cell office:value-type="float" office:value="476.3">
                <text:p>476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5">
                <text:p>383.5</text:p>
              </table:table-cell>
              <table:table-cell office:value-type="float" office:value="477">
                <text:p>4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75">
                <text:p>383.75</text:p>
              </table:table-cell>
              <table:table-cell office:value-type="float" office:value="477.7">
                <text:p>477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78.4">
                <text:p>478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25">
                <text:p>384.25</text:p>
              </table:table-cell>
              <table:table-cell office:value-type="float" office:value="479.1">
                <text:p>479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5">
                <text:p>384.5</text:p>
              </table:table-cell>
              <table:table-cell office:value-type="float" office:value="479.8">
                <text:p>479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75">
                <text:p>384.75</text:p>
              </table:table-cell>
              <table:table-cell office:value-type="float" office:value="480.6">
                <text:p>480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85.25">
                <text:p>385.25</text:p>
              </table:table-cell>
              <table:table-cell office:value-type="float" office:value="481.3">
                <text:p>48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5.5">
                <text:p>385.5</text:p>
              </table:table-cell>
              <table:table-cell office:value-type="float" office:value="481.6">
                <text:p>48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5.75">
                <text:p>385.75</text:p>
              </table:table-cell>
              <table:table-cell office:value-type="float" office:value="481.9">
                <text:p>48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82.2">
                <text:p>48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25">
                <text:p>386.25</text:p>
              </table:table-cell>
              <table:table-cell office:value-type="float" office:value="482.5">
                <text:p>48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5">
                <text:p>386.5</text:p>
              </table:table-cell>
              <table:table-cell office:value-type="float" office:value="482.8">
                <text:p>48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75">
                <text:p>386.75</text:p>
              </table:table-cell>
              <table:table-cell office:value-type="float" office:value="483.1">
                <text:p>48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83.4">
                <text:p>4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25">
                <text:p>387.25</text:p>
              </table:table-cell>
              <table:table-cell office:value-type="float" office:value="483.7">
                <text:p>48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5">
                <text:p>387.5</text:p>
              </table:table-cell>
              <table:table-cell office:value-type="float" office:value="484">
                <text:p>4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75">
                <text:p>387.75</text:p>
              </table:table-cell>
              <table:table-cell office:value-type="float" office:value="484.3">
                <text:p>48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84.6">
                <text:p>4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25">
                <text:p>388.25</text:p>
              </table:table-cell>
              <table:table-cell office:value-type="float" office:value="484.9">
                <text:p>48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5">
                <text:p>388.5</text:p>
              </table:table-cell>
              <table:table-cell office:value-type="float" office:value="485.2">
                <text:p>48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75">
                <text:p>388.75</text:p>
              </table:table-cell>
              <table:table-cell office:value-type="float" office:value="485.5">
                <text:p>48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85.8">
                <text:p>4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25">
                <text:p>389.25</text:p>
              </table:table-cell>
              <table:table-cell office:value-type="float" office:value="486.1">
                <text:p>48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5">
                <text:p>389.5</text:p>
              </table:table-cell>
              <table:table-cell office:value-type="float" office:value="486.4">
                <text:p>48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75">
                <text:p>389.75</text:p>
              </table:table-cell>
              <table:table-cell office:value-type="float" office:value="486.7">
                <text:p>4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7">
                <text:p>4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25">
                <text:p>390.25</text:p>
              </table:table-cell>
              <table:table-cell office:value-type="float" office:value="487.3">
                <text:p>487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5">
                <text:p>390.5</text:p>
              </table:table-cell>
              <table:table-cell office:value-type="float" office:value="487.6">
                <text:p>487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75">
                <text:p>390.75</text:p>
              </table:table-cell>
              <table:table-cell office:value-type="float" office:value="487.9">
                <text:p>487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88.2">
                <text:p>48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.25">
                <text:p>391.25</text:p>
              </table:table-cell>
              <table:table-cell office:value-type="float" office:value="488.5">
                <text:p>488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1.5">
                <text:p>391.5</text:p>
              </table:table-cell>
              <table:table-cell office:value-type="float" office:value="488.7">
                <text:p>48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1.75">
                <text:p>391.75</text:p>
              </table:table-cell>
              <table:table-cell office:value-type="float" office:value="489">
                <text:p>4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89.3">
                <text:p>48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25">
                <text:p>392.25</text:p>
              </table:table-cell>
              <table:table-cell office:value-type="float" office:value="489.5">
                <text:p>48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5">
                <text:p>392.5</text:p>
              </table:table-cell>
              <table:table-cell office:value-type="float" office:value="489.8">
                <text:p>48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75">
                <text:p>392.75</text:p>
              </table:table-cell>
              <table:table-cell office:value-type="float" office:value="490.1">
                <text:p>49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90.3">
                <text:p>49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25">
                <text:p>393.25</text:p>
              </table:table-cell>
              <table:table-cell office:value-type="float" office:value="490.6">
                <text:p>49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5">
                <text:p>393.5</text:p>
              </table:table-cell>
              <table:table-cell office:value-type="float" office:value="490.9">
                <text:p>49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75">
                <text:p>393.75</text:p>
              </table:table-cell>
              <table:table-cell office:value-type="float" office:value="491.2">
                <text:p>49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91.4">
                <text:p>49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25">
                <text:p>394.25</text:p>
              </table:table-cell>
              <table:table-cell office:value-type="float" office:value="491.7">
                <text:p>491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5">
                <text:p>394.5</text:p>
              </table:table-cell>
              <table:table-cell office:value-type="float" office:value="492">
                <text:p>4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75">
                <text:p>394.75</text:p>
              </table:table-cell>
              <table:table-cell office:value-type="float" office:value="492.2">
                <text:p>492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92.5">
                <text:p>49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25">
                <text:p>395.25</text:p>
              </table:table-cell>
              <table:table-cell office:value-type="float" office:value="492.8">
                <text:p>492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5">
                <text:p>395.5</text:p>
              </table:table-cell>
              <table:table-cell office:value-type="float" office:value="493">
                <text:p>4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75">
                <text:p>395.75</text:p>
              </table:table-cell>
              <table:table-cell office:value-type="float" office:value="493.3">
                <text:p>493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93.6">
                <text:p>493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25">
                <text:p>396.25</text:p>
              </table:table-cell>
              <table:table-cell office:value-type="float" office:value="493.9">
                <text:p>493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5">
                <text:p>396.5</text:p>
              </table:table-cell>
              <table:table-cell office:value-type="float" office:value="494.1">
                <text:p>494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75">
                <text:p>396.75</text:p>
              </table:table-cell>
              <table:table-cell office:value-type="float" office:value="494.4">
                <text:p>494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94.7">
                <text:p>494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25">
                <text:p>397.25</text:p>
              </table:table-cell>
              <table:table-cell office:value-type="float" office:value="494.9">
                <text:p>49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5">
                <text:p>397.5</text:p>
              </table:table-cell>
              <table:table-cell office:value-type="float" office:value="495.2">
                <text:p>495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75">
                <text:p>397.75</text:p>
              </table:table-cell>
              <table:table-cell office:value-type="float" office:value="495.5">
                <text:p>495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95.8">
                <text:p>49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25">
                <text:p>398.25</text:p>
              </table:table-cell>
              <table:table-cell office:value-type="float" office:value="496.1">
                <text:p>49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5">
                <text:p>398.5</text:p>
              </table:table-cell>
              <table:table-cell office:value-type="float" office:value="496.4">
                <text:p>49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75">
                <text:p>398.75</text:p>
              </table:table-cell>
              <table:table-cell office:value-type="float" office:value="496.7">
                <text:p>49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97">
                <text:p>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25">
                <text:p>399.25</text:p>
              </table:table-cell>
              <table:table-cell office:value-type="float" office:value="497.3">
                <text:p>497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5">
                <text:p>399.5</text:p>
              </table:table-cell>
              <table:table-cell office:value-type="float" office:value="497.6">
                <text:p>497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75">
                <text:p>399.75</text:p>
              </table:table-cell>
              <table:table-cell office:value-type="float" office:value="497.9">
                <text:p>497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.3">
                <text:p>498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25">
                <text:p>400.25</text:p>
              </table:table-cell>
              <table:table-cell office:value-type="float" office:value="498.6">
                <text:p>498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5">
                <text:p>400.5</text:p>
              </table:table-cell>
              <table:table-cell office:value-type="float" office:value="498.9">
                <text:p>498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75">
                <text:p>400.75</text:p>
              </table:table-cell>
              <table:table-cell office:value-type="float" office:value="499.2">
                <text:p>499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99.5">
                <text:p>49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25">
                <text:p>401.25</text:p>
              </table:table-cell>
              <table:table-cell office:value-type="float" office:value="499.8">
                <text:p>49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5">
                <text:p>401.5</text:p>
              </table:table-cell>
              <table:table-cell office:value-type="float" office:value="500.1">
                <text:p>500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75">
                <text:p>401.75</text:p>
              </table:table-cell>
              <table:table-cell office:value-type="float" office:value="500.4">
                <text:p>500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0.7">
                <text:p>50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25">
                <text:p>402.25</text:p>
              </table:table-cell>
              <table:table-cell office:value-type="float" office:value="501">
                <text:p>5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5">
                <text:p>402.5</text:p>
              </table:table-cell>
              <table:table-cell office:value-type="float" office:value="501.3">
                <text:p>50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75">
                <text:p>402.75</text:p>
              </table:table-cell>
              <table:table-cell office:value-type="float" office:value="501.6">
                <text:p>50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02">
                <text:p>5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25">
                <text:p>403.25</text:p>
              </table:table-cell>
              <table:table-cell office:value-type="float" office:value="502.3">
                <text:p>502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5">
                <text:p>403.5</text:p>
              </table:table-cell>
              <table:table-cell office:value-type="float" office:value="502.6">
                <text:p>502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75">
                <text:p>403.75</text:p>
              </table:table-cell>
              <table:table-cell office:value-type="float" office:value="502.9">
                <text:p>50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4">
                <text:p>50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4.25">
                <text:p>404.25</text:p>
              </table:table-cell>
              <table:table-cell office:value-type="float" office:value="505.1">
                <text:p>505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4.5">
                <text:p>404.5</text:p>
              </table:table-cell>
              <table:table-cell office:value-type="float" office:value="506.2">
                <text:p>506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4.75">
                <text:p>404.75</text:p>
              </table:table-cell>
              <table:table-cell office:value-type="float" office:value="507.4">
                <text:p>507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08.5">
                <text:p>508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.25">
                <text:p>405.25</text:p>
              </table:table-cell>
              <table:table-cell office:value-type="float" office:value="509.7">
                <text:p>509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.5">
                <text:p>405.5</text:p>
              </table:table-cell>
              <table:table-cell office:value-type="float" office:value="511.9">
                <text:p>511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05.75">
                <text:p>405.75</text:p>
              </table:table-cell>
              <table:table-cell office:value-type="float" office:value="515.5">
                <text:p>515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18">
                <text:p>51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06.25">
                <text:p>406.25</text:p>
              </table:table-cell>
              <table:table-cell office:value-type="float" office:value="518.6">
                <text:p>518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6.5">
                <text:p>406.5</text:p>
              </table:table-cell>
              <table:table-cell office:value-type="float" office:value="519.2">
                <text:p>519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6.75">
                <text:p>406.75</text:p>
              </table:table-cell>
              <table:table-cell office:value-type="float" office:value="519.8">
                <text:p>519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20.4">
                <text:p>52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25">
                <text:p>407.25</text:p>
              </table:table-cell>
              <table:table-cell office:value-type="float" office:value="521">
                <text:p>5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521.7">
                <text:p>521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75">
                <text:p>407.75</text:p>
              </table:table-cell>
              <table:table-cell office:value-type="float" office:value="522.3">
                <text:p>52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22.9">
                <text:p>52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25">
                <text:p>408.25</text:p>
              </table:table-cell>
              <table:table-cell office:value-type="float" office:value="523.5">
                <text:p>523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5">
                <text:p>408.5</text:p>
              </table:table-cell>
              <table:table-cell office:value-type="float" office:value="524.1">
                <text:p>524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75">
                <text:p>408.75</text:p>
              </table:table-cell>
              <table:table-cell office:value-type="float" office:value="524.7">
                <text:p>524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25.3">
                <text:p>525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09.25">
                <text:p>409.25</text:p>
              </table:table-cell>
              <table:table-cell office:value-type="float" office:value="525.6">
                <text:p>52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9.5">
                <text:p>409.5</text:p>
              </table:table-cell>
              <table:table-cell office:value-type="float" office:value="526">
                <text:p>5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9.75">
                <text:p>409.75</text:p>
              </table:table-cell>
              <table:table-cell office:value-type="float" office:value="526.4">
                <text:p>526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26.8">
                <text:p>526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25">
                <text:p>410.25</text:p>
              </table:table-cell>
              <table:table-cell office:value-type="float" office:value="527.1">
                <text:p>527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5">
                <text:p>410.5</text:p>
              </table:table-cell>
              <table:table-cell office:value-type="float" office:value="527.5">
                <text:p>527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75">
                <text:p>410.75</text:p>
              </table:table-cell>
              <table:table-cell office:value-type="float" office:value="527.9">
                <text:p>527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28.3">
                <text:p>528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25">
                <text:p>411.25</text:p>
              </table:table-cell>
              <table:table-cell office:value-type="float" office:value="528.7">
                <text:p>528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5">
                <text:p>411.5</text:p>
              </table:table-cell>
              <table:table-cell office:value-type="float" office:value="529">
                <text:p>52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75">
                <text:p>411.75</text:p>
              </table:table-cell>
              <table:table-cell office:value-type="float" office:value="529.4">
                <text:p>529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29.8">
                <text:p>52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25">
                <text:p>412.25</text:p>
              </table:table-cell>
              <table:table-cell office:value-type="float" office:value="530.2">
                <text:p>53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5">
                <text:p>412.5</text:p>
              </table:table-cell>
              <table:table-cell office:value-type="float" office:value="530.5">
                <text:p>53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75">
                <text:p>412.75</text:p>
              </table:table-cell>
              <table:table-cell office:value-type="float" office:value="530.9">
                <text:p>53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31.3">
                <text:p>53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25">
                <text:p>413.25</text:p>
              </table:table-cell>
              <table:table-cell office:value-type="float" office:value="531.7">
                <text:p>53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5">
                <text:p>413.5</text:p>
              </table:table-cell>
              <table:table-cell office:value-type="float" office:value="532">
                <text:p>5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75">
                <text:p>413.75</text:p>
              </table:table-cell>
              <table:table-cell office:value-type="float" office:value="532.4">
                <text:p>53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32.7">
                <text:p>532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4.25">
                <text:p>414.25</text:p>
              </table:table-cell>
              <table:table-cell office:value-type="float" office:value="532.9">
                <text:p>532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4.5">
                <text:p>414.5</text:p>
              </table:table-cell>
              <table:table-cell office:value-type="float" office:value="533.2">
                <text:p>533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4.75">
                <text:p>414.75</text:p>
              </table:table-cell>
              <table:table-cell office:value-type="float" office:value="533.4">
                <text:p>533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33.6">
                <text:p>53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25">
                <text:p>415.25</text:p>
              </table:table-cell>
              <table:table-cell office:value-type="float" office:value="533.8">
                <text:p>53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5">
                <text:p>415.5</text:p>
              </table:table-cell>
              <table:table-cell office:value-type="float" office:value="534.1">
                <text:p>534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75">
                <text:p>415.75</text:p>
              </table:table-cell>
              <table:table-cell office:value-type="float" office:value="534.3">
                <text:p>534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34.5">
                <text:p>53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25">
                <text:p>416.25</text:p>
              </table:table-cell>
              <table:table-cell office:value-type="float" office:value="534.8">
                <text:p>534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5">
                <text:p>416.5</text:p>
              </table:table-cell>
              <table:table-cell office:value-type="float" office:value="535">
                <text:p>5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75">
                <text:p>416.75</text:p>
              </table:table-cell>
              <table:table-cell office:value-type="float" office:value="535.2">
                <text:p>53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35.4">
                <text:p>53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25">
                <text:p>417.25</text:p>
              </table:table-cell>
              <table:table-cell office:value-type="float" office:value="535.7">
                <text:p>535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535.9">
                <text:p>535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75">
                <text:p>417.75</text:p>
              </table:table-cell>
              <table:table-cell office:value-type="float" office:value="536.1">
                <text:p>536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36.4">
                <text:p>53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25">
                <text:p>418.25</text:p>
              </table:table-cell>
              <table:table-cell office:value-type="float" office:value="536.6">
                <text:p>536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5">
                <text:p>418.5</text:p>
              </table:table-cell>
              <table:table-cell office:value-type="float" office:value="536.8">
                <text:p>536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75">
                <text:p>418.75</text:p>
              </table:table-cell>
              <table:table-cell office:value-type="float" office:value="537.1">
                <text:p>53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37.3">
                <text:p>53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25">
                <text:p>419.25</text:p>
              </table:table-cell>
              <table:table-cell office:value-type="float" office:value="537.5">
                <text:p>53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5">
                <text:p>419.5</text:p>
              </table:table-cell>
              <table:table-cell office:value-type="float" office:value="537.7">
                <text:p>537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75">
                <text:p>419.75</text:p>
              </table:table-cell>
              <table:table-cell office:value-type="float" office:value="538">
                <text:p>5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38.2">
                <text:p>53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25">
                <text:p>420.25</text:p>
              </table:table-cell>
              <table:table-cell office:value-type="float" office:value="538.4">
                <text:p>53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5">
                <text:p>420.5</text:p>
              </table:table-cell>
              <table:table-cell office:value-type="float" office:value="538.7">
                <text:p>538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75">
                <text:p>420.75</text:p>
              </table:table-cell>
              <table:table-cell office:value-type="float" office:value="538.9">
                <text:p>53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39.1">
                <text:p>53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25">
                <text:p>421.25</text:p>
              </table:table-cell>
              <table:table-cell office:value-type="float" office:value="539.4">
                <text:p>53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5">
                <text:p>421.5</text:p>
              </table:table-cell>
              <table:table-cell office:value-type="float" office:value="539.6">
                <text:p>53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75">
                <text:p>421.75</text:p>
              </table:table-cell>
              <table:table-cell office:value-type="float" office:value="539.8">
                <text:p>53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40.1">
                <text:p>54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.25">
                <text:p>422.25</text:p>
              </table:table-cell>
              <table:table-cell office:value-type="float" office:value="540.4">
                <text:p>54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540.8">
                <text:p>540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2.75">
                <text:p>422.75</text:p>
              </table:table-cell>
              <table:table-cell office:value-type="float" office:value="541.1">
                <text:p>54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41.5">
                <text:p>54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25">
                <text:p>423.25</text:p>
              </table:table-cell>
              <table:table-cell office:value-type="float" office:value="541.8">
                <text:p>54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5">
                <text:p>423.5</text:p>
              </table:table-cell>
              <table:table-cell office:value-type="float" office:value="542.2">
                <text:p>54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75">
                <text:p>423.75</text:p>
              </table:table-cell>
              <table:table-cell office:value-type="float" office:value="542.5">
                <text:p>54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42.9">
                <text:p>542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25">
                <text:p>424.25</text:p>
              </table:table-cell>
              <table:table-cell office:value-type="float" office:value="543.2">
                <text:p>54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5">
                <text:p>424.5</text:p>
              </table:table-cell>
              <table:table-cell office:value-type="float" office:value="543.6">
                <text:p>543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75">
                <text:p>424.75</text:p>
              </table:table-cell>
              <table:table-cell office:value-type="float" office:value="543.9">
                <text:p>54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44.3">
                <text:p>54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25">
                <text:p>425.25</text:p>
              </table:table-cell>
              <table:table-cell office:value-type="float" office:value="544.6">
                <text:p>54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5">
                <text:p>425.5</text:p>
              </table:table-cell>
              <table:table-cell office:value-type="float" office:value="545">
                <text:p>5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75">
                <text:p>425.75</text:p>
              </table:table-cell>
              <table:table-cell office:value-type="float" office:value="545.3">
                <text:p>545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45.7">
                <text:p>54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25">
                <text:p>426.25</text:p>
              </table:table-cell>
              <table:table-cell office:value-type="float" office:value="546">
                <text:p>5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5">
                <text:p>426.5</text:p>
              </table:table-cell>
              <table:table-cell office:value-type="float" office:value="546.4">
                <text:p>546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75">
                <text:p>426.75</text:p>
              </table:table-cell>
              <table:table-cell office:value-type="float" office:value="546.7">
                <text:p>546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47.1">
                <text:p>54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.25">
                <text:p>427.25</text:p>
              </table:table-cell>
              <table:table-cell office:value-type="float" office:value="547.4">
                <text:p>547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548.2">
                <text:p>548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7.75">
                <text:p>427.75</text:p>
              </table:table-cell>
              <table:table-cell office:value-type="float" office:value="549.1">
                <text:p>549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50">
                <text:p>5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25">
                <text:p>428.25</text:p>
              </table:table-cell>
              <table:table-cell office:value-type="float" office:value="550.9">
                <text:p>55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5">
                <text:p>428.5</text:p>
              </table:table-cell>
              <table:table-cell office:value-type="float" office:value="551.8">
                <text:p>551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75">
                <text:p>428.75</text:p>
              </table:table-cell>
              <table:table-cell office:value-type="float" office:value="552.7">
                <text:p>552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53.6">
                <text:p>55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.25">
                <text:p>429.25</text:p>
              </table:table-cell>
              <table:table-cell office:value-type="float" office:value="554.5">
                <text:p>55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.5">
                <text:p>429.5</text:p>
              </table:table-cell>
              <table:table-cell office:value-type="float" office:value="555">
                <text:p>555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